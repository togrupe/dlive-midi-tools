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7.017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3.348cm"/>
    </style:style>
    <style:style style:name="co33" style:family="table-column">
      <style:table-column-properties fo:break-before="auto" style:column-width="3.25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0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3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3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5" table:base-cell-address="Socket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Sockets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Sockets.M3">
          <table:error-message table:message-type="stop" table:display="true"/>
        </table:content-validation>
        <table:content-validation table:name="val13" table:base-cell-address="Sockets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AB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I15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2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18"/>
        <table:table-column table:style-name="co8" table:number-columns-repeated="12" table:default-cell-style-name="ce5"/>
        <table:table-column table:style-name="co7" table:default-cell-style-name="ce5"/>
        <table:table-column table:style-name="co8" table:number-columns-repeated="12" table:default-cell-style-name="ce5"/>
        <table:table-column table:style-name="co7" table:default-cell-style-name="ce18"/>
        <table:table-column table:style-name="co7" table:default-cell-style-name="ce12"/>
        <table:table-column table:style-name="co1" table:default-cell-style-name="ce5"/>
        <table:table-column table:style-name="co1" table:default-cell-style-name="Default"/>
        <table:table-column table:style-name="co8" table:number-columns-repeated="24" table:default-cell-style-name="ce5"/>
        <table:table-column table:style-name="co1" table:default-cell-style-name="Default"/>
        <table:table-column table:style-name="co8" table:number-columns-repeated="8" table:default-cell-style-name="ce5"/>
        <table:table-column table:style-name="co1" table:default-cell-style-name="Default"/>
        <table:table-column table:style-name="co8" table:visibility="collapse" table:number-columns-repeated="24" table:default-cell-style-name="ce5"/>
        <table:table-column table:style-name="co1" table:visibility="collapse" table:default-cell-style-name="ce5"/>
        <table:table-column table:style-name="co8" table:visibility="collapse" table:number-columns-repeated="12" table:default-cell-style-name="ce5"/>
        <table:table-column table:style-name="co7" table:visibility="collapse" table:default-cell-style-name="ce5"/>
        <table:table-column table:style-name="co8" table:visibility="collapse" table:number-columns-repeated="12" table:default-cell-style-name="ce5"/>
        <table:table-column table:style-name="co9" table:default-cell-style-name="ce18"/>
        <table:table-column table:style-name="co1" table:number-columns-repeated="16255"/>
        <table:table-row table:style-name="ro1">
          <table:table-cell table:style-name="ce2" office:value-type="string" calcext:value-type="string">
            <text:p>Enabled</text:p>
          </table:table-cell>
          <table:table-cell table:style-name="ce4" office:value-type="string" calcext:value-type="string">
            <text:p>Channel</text:p>
          </table:table-cell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3" office:value-type="string" calcext:value-type="string">
            <office:annotation office:display="true" draw:style-name="gr1" draw:text-style-name="P1" svg:width="5.404cm" svg:height="2.585cm" svg:x="12.131cm" svg:y="0.017cm" draw:caption-point-x="-0.027cm" draw:caption-point-y="-0.007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3" office:value-type="string" calcext:value-type="string">
            <text:p>Socket*</text:p>
          </table:table-cell>
          <table:table-cell table:style-name="ce13" office:value-type="string" calcext:value-type="string">
            <text:p>Gain*</text:p>
          </table:table-cell>
          <table:table-cell table:style-name="ce13" office:value-type="string" calcext:value-type="string">
            <text:p>Pad*</text:p>
          </table:table-cell>
          <table:table-cell table:style-name="ce13" office:value-type="string" calcext:value-type="string">
            <text:p>Phantom*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Fader Level</text:p>
          </table:table-cell>
          <table:table-cell table:style-name="ce4" office:value-type="string" calcext:value-type="string">
            <text:p>HPF On</text:p>
          </table:table-cell>
          <table:table-cell table:style-name="ce4" office:value-type="string" calcext:value-type="string">
            <text:p>HPF Value</text:p>
          </table:table-cell>
          <table:table-cell table:style-name="ce4" office:value-type="string" calcext:value-type="string">
            <text:p>Main Mix</text:p>
          </table:table-cell>
          <table:table-cell table:style-name="ce19"/>
          <table:table-cell table:style-name="ce20" table:formula="of:=CONCATENATE(&quot;Grp1 - &quot;;['file:///Users/togrupe/dev/dlive-midi-tools/dLiveChannelList.ods'#$Groups.P2])" office:value-type="string" office:string-value="Grp1 - Grp1" calcext:value-type="string">
            <text:p>Grp1 - Grp1</text:p>
          </table:table-cell>
          <table:table-cell table:style-name="ce20" table:formula="of:=CONCATENATE(&quot;Grp2 - &quot;;['file:///Users/togrupe/dev/dlive-midi-tools/dLiveChannelList.ods'#$Groups.P3])" office:value-type="string" office:string-value="Grp2 - Grp2" calcext:value-type="string">
            <text:p>Grp2 - Grp2</text:p>
          </table:table-cell>
          <table:table-cell table:style-name="ce20" table:formula="of:=CONCATENATE(&quot;Grp3 - &quot;;['file:///Users/togrupe/dev/dlive-midi-tools/dLiveChannelList.ods'#$Groups.P4])" office:value-type="string" office:string-value="Grp3 - Grp3" calcext:value-type="string">
            <text:p>Grp3 - Grp3</text:p>
          </table:table-cell>
          <table:table-cell table:style-name="ce20" table:formula="of:=CONCATENATE(&quot;Grp4 - &quot;;['file:///Users/togrupe/dev/dlive-midi-tools/dLiveChannelList.ods'#$Groups.P5])" office:value-type="string" office:string-value="Grp4 - Grp4" calcext:value-type="string">
            <text:p>Grp4 - Grp4</text:p>
          </table:table-cell>
          <table:table-cell table:style-name="ce20" table:formula="of:=CONCATENATE(&quot;Grp5 - &quot;;['file:///Users/togrupe/dev/dlive-midi-tools/dLiveChannelList.ods'#$Groups.P6])" office:value-type="string" office:string-value="Grp5 - Grp5" calcext:value-type="string">
            <text:p>Grp5 - Grp5</text:p>
          </table:table-cell>
          <table:table-cell table:style-name="ce20" table:formula="of:=CONCATENATE(&quot;Grp6 - &quot;;['file:///Users/togrupe/dev/dlive-midi-tools/dLiveChannelList.ods'#$Groups.P7])" office:value-type="string" office:string-value="Grp6 - Grp6" calcext:value-type="string">
            <text:p>Grp6 - Grp6</text:p>
          </table:table-cell>
          <table:table-cell table:style-name="ce20" table:formula="of:=CONCATENATE(&quot;Grp7 - &quot;;['file:///Users/togrupe/dev/dlive-midi-tools/dLiveChannelList.ods'#$Groups.P8])" office:value-type="string" office:string-value="Grp7 - Grp7" calcext:value-type="string">
            <text:p>Grp7 - Grp7</text:p>
          </table:table-cell>
          <table:table-cell table:style-name="ce20" table:formula="of:=CONCATENATE(&quot;Grp8 - &quot;;['file:///Users/togrupe/dev/dlive-midi-tools/dLiveChannelList.ods'#$Groups.$P9])" office:value-type="string" office:string-value="Grp8 - Grp8" calcext:value-type="string">
            <text:p>Grp8 - Grp8</text:p>
          </table:table-cell>
          <table:table-cell table:style-name="ce20" table:formula="of:=CONCATENATE(&quot;Grp9 - &quot;;['file:///Users/togrupe/dev/dlive-midi-tools/dLiveChannelList.ods'#$Groups.$P10])" office:value-type="string" office:string-value="Grp9 - Grp9" calcext:value-type="string">
            <text:p>Grp9 - Grp9</text:p>
          </table:table-cell>
          <table:table-cell table:style-name="ce20" table:formula="of:=CONCATENATE(&quot;Grp10 - &quot;;['file:///Users/togrupe/dev/dlive-midi-tools/dLiveChannelList.ods'#$Groups.$P11])" office:value-type="string" office:string-value="Grp10 - Grp10" calcext:value-type="string">
            <text:p>Grp10 - Grp10</text:p>
          </table:table-cell>
          <table:table-cell table:style-name="ce20" table:formula="of:=CONCATENATE(&quot;Grp11 - &quot;;['file:///Users/togrupe/dev/dlive-midi-tools/dLiveChannelList.ods'#$Groups.$P12])" office:value-type="string" office:string-value="Grp11 - Grp11" calcext:value-type="string">
            <text:p>Grp11 - Grp11</text:p>
          </table:table-cell>
          <table:table-cell table:style-name="ce20" table:formula="of:=CONCATENATE(&quot;Grp12 - &quot;;['file:///Users/togrupe/dev/dlive-midi-tools/dLiveChannelList.ods'#$Groups.$P13])" office:value-type="string" office:string-value="Grp12 - Grp12" calcext:value-type="string">
            <text:p>Grp12 - Grp12</text:p>
          </table:table-cell>
          <table:table-cell table:style-name="ce4"/>
          <table:table-cell table:style-name="ce20" table:formula="of:=CONCATENATE(&quot;StGrp1 - &quot;;['file:///Users/togrupe/dev/dlive-midi-tools/dLiveChannelList.ods'#$Groups.U2])" office:value-type="string" office:string-value="StGrp1 - StGrp1" calcext:value-type="string">
            <text:p>StGrp1 - StGrp1</text:p>
          </table:table-cell>
          <table:table-cell table:style-name="ce20" table:formula="of:=CONCATENATE(&quot;StGrp2 - &quot;;['file:///Users/togrupe/dev/dlive-midi-tools/dLiveChannelList.ods'#$Groups.U3])" office:value-type="string" office:string-value="StGrp2 - StGrp2" calcext:value-type="string">
            <text:p>StGrp2 - StGrp2</text:p>
          </table:table-cell>
          <table:table-cell table:style-name="ce20" table:formula="of:=CONCATENATE(&quot;StGrp3 - &quot;;['file:///Users/togrupe/dev/dlive-midi-tools/dLiveChannelList.ods'#$Groups.U4])" office:value-type="string" office:string-value="StGrp3 - StGrp3" calcext:value-type="string">
            <text:p>StGrp3 - StGrp3</text:p>
          </table:table-cell>
          <table:table-cell table:style-name="ce20" table:formula="of:=CONCATENATE(&quot;StGrp4 - &quot;;['file:///Users/togrupe/dev/dlive-midi-tools/dLiveChannelList.ods'#$Groups.U5])" office:value-type="string" office:string-value="StGrp4 - StGrp4" calcext:value-type="string">
            <text:p>StGrp4 - StGrp4</text:p>
          </table:table-cell>
          <table:table-cell table:style-name="ce20" table:formula="of:=CONCATENATE(&quot;StGrp5 - &quot;;['file:///Users/togrupe/dev/dlive-midi-tools/dLiveChannelList.ods'#$Groups.U6])" office:value-type="string" office:string-value="StGrp5 - StGrp5" calcext:value-type="string">
            <text:p>StGrp5 - StGrp5</text:p>
          </table:table-cell>
          <table:table-cell table:style-name="ce20" table:formula="of:=CONCATENATE(&quot;StGrp6 - &quot;;['file:///Users/togrupe/dev/dlive-midi-tools/dLiveChannelList.ods'#$Groups.U7])" office:value-type="string" office:string-value="StGrp6 - StGrp6" calcext:value-type="string">
            <text:p>StGrp6 - StGrp6</text:p>
          </table:table-cell>
          <table:table-cell table:style-name="ce20" table:formula="of:=CONCATENATE(&quot;StGrp7 - &quot;;['file:///Users/togrupe/dev/dlive-midi-tools/dLiveChannelList.ods'#$Groups.U8])" office:value-type="string" office:string-value="StGrp7 - StGrp7" calcext:value-type="string">
            <text:p>StGrp7 - StGrp7</text:p>
          </table:table-cell>
          <table:table-cell table:style-name="ce20" table:formula="of:=CONCATENATE(&quot;StGrp8 - &quot;;['file:///Users/togrupe/dev/dlive-midi-tools/dLiveChannelList.ods'#$Groups.U9])" office:value-type="string" office:string-value="StGrp8 - StGrp8" calcext:value-type="string">
            <text:p>StGrp8 - StGrp8</text:p>
          </table:table-cell>
          <table:table-cell table:style-name="ce20" table:formula="of:=CONCATENATE(&quot;StGrp9 - &quot;;['file:///Users/togrupe/dev/dlive-midi-tools/dLiveChannelList.ods'#$Groups.U10])" office:value-type="string" office:string-value="StGrp9 - StGrp9" calcext:value-type="string">
            <text:p>StGrp9 - StGrp9</text:p>
          </table:table-cell>
          <table:table-cell table:style-name="ce20" table:formula="of:=CONCATENATE(&quot;StGrp10 - &quot;;['file:///Users/togrupe/dev/dlive-midi-tools/dLiveChannelList.ods'#$Groups.U11])" office:value-type="string" office:string-value="StGrp10 - StGrp10" calcext:value-type="string">
            <text:p>StGrp10 - StGrp10</text:p>
          </table:table-cell>
          <table:table-cell table:style-name="ce20" table:formula="of:=CONCATENATE(&quot;StGrp11 - &quot;;['file:///Users/togrupe/dev/dlive-midi-tools/dLiveChannelList.ods'#$Groups.U12])" office:value-type="string" office:string-value="StGrp11 - StGrp11" calcext:value-type="string">
            <text:p>StGrp11 - StGrp11</text:p>
          </table:table-cell>
          <table:table-cell table:style-name="ce20" table:formula="of:=CONCATENATE(&quot;StGrp12 - &quot;;['file:///Users/togrupe/dev/dlive-midi-tools/dLiveChannelList.ods'#$Groups.U13])" office:value-type="string" office:string-value="StGrp12 - StGrp12" calcext:value-type="string">
            <text:p>StGrp12 - StGrp12</text:p>
          </table:table-cell>
          <table:table-cell table:style-name="ce19"/>
          <table:table-cell table:style-name="ce9" office:value-type="string" calcext:value-type="string">
            <text:p>Recording</text:p>
          </table:table-cell>
          <table:table-cell table:style-name="ce4" office:value-type="string" calcext:value-type="string">
            <text:p>Record Arm</text:p>
          </table:table-cell>
          <table:table-cell table:style-name="ce21"/>
          <table:table-cell table:style-name="ce20" table:formula="of:=CONCATENATE(&quot;DCA1 - &quot;;[$Groups.B2])" office:value-type="string" office:string-value="DCA1 - Dca1" calcext:value-type="string">
            <text:p>DCA1 - Dca1</text:p>
          </table:table-cell>
          <table:table-cell table:style-name="ce20" table:formula="of:=CONCATENATE(&quot;DCA2 - &quot;;[$Groups.B3])" office:value-type="string" office:string-value="DCA2 - Dca2" calcext:value-type="string">
            <text:p>DCA2 - Dca2</text:p>
          </table:table-cell>
          <table:table-cell table:style-name="ce20" table:formula="of:=CONCATENATE(&quot;DCA3 - &quot;;[$Groups.B4])" office:value-type="string" office:string-value="DCA3 - Dca3" calcext:value-type="string">
            <text:p>DCA3 - Dca3</text:p>
          </table:table-cell>
          <table:table-cell table:style-name="ce20" table:formula="of:=CONCATENATE(&quot;DCA4 - &quot;;[$Groups.B5])" office:value-type="string" office:string-value="DCA4 - Dca4" calcext:value-type="string">
            <text:p>DCA4 - Dca4</text:p>
          </table:table-cell>
          <table:table-cell table:style-name="ce20" table:formula="of:=CONCATENATE(&quot;DCA5 - &quot;;[$Groups.B6])" office:value-type="string" office:string-value="DCA5 - Dca5" calcext:value-type="string">
            <text:p>DCA5 - Dca5</text:p>
          </table:table-cell>
          <table:table-cell table:style-name="ce20" table:formula="of:=CONCATENATE(&quot;DCA6 - &quot;;[$Groups.B7])" office:value-type="string" office:string-value="DCA6 - Dca6" calcext:value-type="string">
            <text:p>DCA6 - Dca6</text:p>
          </table:table-cell>
          <table:table-cell table:style-name="ce20" table:formula="of:=CONCATENATE(&quot;DCA7 - &quot;;[$Groups.B8])" office:value-type="string" office:string-value="DCA7 - Dca7" calcext:value-type="string">
            <text:p>DCA7 - Dca7</text:p>
          </table:table-cell>
          <table:table-cell table:style-name="ce20" table:formula="of:=CONCATENATE(&quot;DCA8 - &quot;;[$Groups.B9])" office:value-type="string" office:string-value="DCA8 - Dca8" calcext:value-type="string">
            <text:p>DCA8 - Dca8</text:p>
          </table:table-cell>
          <table:table-cell table:style-name="ce20" table:formula="of:=CONCATENATE(&quot;DCA9 - &quot;;[$Groups.B10])" office:value-type="string" office:string-value="DCA9 - Dca9" calcext:value-type="string">
            <text:p>DCA9 - Dca9</text:p>
          </table:table-cell>
          <table:table-cell table:style-name="ce20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0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0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0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0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0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0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0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0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0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0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0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0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0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0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1"/>
          <table:table-cell table:style-name="ce20" office:value-type="string" calcext:value-type="string">
            <text:p>Mute1</text:p>
          </table:table-cell>
          <table:table-cell table:style-name="ce20" office:value-type="string" calcext:value-type="string">
            <text:p>Mute2</text:p>
          </table:table-cell>
          <table:table-cell table:style-name="ce20" office:value-type="string" calcext:value-type="string">
            <text:p>Mute3</text:p>
          </table:table-cell>
          <table:table-cell table:style-name="ce20" office:value-type="string" calcext:value-type="string">
            <text:p>Mute4</text:p>
          </table:table-cell>
          <table:table-cell table:style-name="ce20" office:value-type="string" calcext:value-type="string">
            <text:p>Mute5</text:p>
          </table:table-cell>
          <table:table-cell table:style-name="ce20" office:value-type="string" calcext:value-type="string">
            <text:p>Mute6</text:p>
          </table:table-cell>
          <table:table-cell table:style-name="ce20" office:value-type="string" calcext:value-type="string">
            <text:p>Mute7</text:p>
          </table:table-cell>
          <table:table-cell table:style-name="ce20" office:value-type="string" calcext:value-type="string">
            <text:p>Mute8</text:p>
          </table:table-cell>
          <table:table-cell table:style-name="ce21"/>
          <table:table-cell table:style-name="ce20" office:value-type="string" calcext:value-type="string">
            <text:p>DCA1</text:p>
          </table:table-cell>
          <table:table-cell table:style-name="ce20" office:value-type="string" calcext:value-type="string">
            <text:p>DCA2</text:p>
          </table:table-cell>
          <table:table-cell table:style-name="ce20" office:value-type="string" calcext:value-type="string">
            <text:p>DCA3</text:p>
          </table:table-cell>
          <table:table-cell table:style-name="ce20" office:value-type="string" calcext:value-type="string">
            <text:p>DCA4</text:p>
          </table:table-cell>
          <table:table-cell table:style-name="ce20" office:value-type="string" calcext:value-type="string">
            <text:p>DCA5</text:p>
          </table:table-cell>
          <table:table-cell table:style-name="ce20" office:value-type="string" calcext:value-type="string">
            <text:p>DCA6</text:p>
          </table:table-cell>
          <table:table-cell table:style-name="ce20" office:value-type="string" calcext:value-type="string">
            <text:p>DCA7</text:p>
          </table:table-cell>
          <table:table-cell table:style-name="ce20" office:value-type="string" calcext:value-type="string">
            <text:p>DCA8</text:p>
          </table:table-cell>
          <table:table-cell table:style-name="ce20" office:value-type="string" calcext:value-type="string">
            <text:p>DCA9</text:p>
          </table:table-cell>
          <table:table-cell table:style-name="ce20" office:value-type="string" calcext:value-type="string">
            <text:p>DCA10</text:p>
          </table:table-cell>
          <table:table-cell table:style-name="ce20" office:value-type="string" calcext:value-type="string">
            <text:p>DCA11</text:p>
          </table:table-cell>
          <table:table-cell table:style-name="ce20" office:value-type="string" calcext:value-type="string">
            <text:p>DCA12</text:p>
          </table:table-cell>
          <table:table-cell table:style-name="ce20" office:value-type="string" calcext:value-type="string">
            <text:p>DCA13</text:p>
          </table:table-cell>
          <table:table-cell table:style-name="ce20" office:value-type="string" calcext:value-type="string">
            <text:p>DCA14</text:p>
          </table:table-cell>
          <table:table-cell table:style-name="ce20" office:value-type="string" calcext:value-type="string">
            <text:p>DCA15</text:p>
          </table:table-cell>
          <table:table-cell table:style-name="ce20" office:value-type="string" calcext:value-type="string">
            <text:p>DCA16</text:p>
          </table:table-cell>
          <table:table-cell table:style-name="ce20" office:value-type="string" calcext:value-type="string">
            <text:p>DCA17</text:p>
          </table:table-cell>
          <table:table-cell table:style-name="ce20" office:value-type="string" calcext:value-type="string">
            <text:p>DCA18</text:p>
          </table:table-cell>
          <table:table-cell table:style-name="ce20" office:value-type="string" calcext:value-type="string">
            <text:p>DCA19</text:p>
          </table:table-cell>
          <table:table-cell table:style-name="ce20" office:value-type="string" calcext:value-type="string">
            <text:p>DCA20</text:p>
          </table:table-cell>
          <table:table-cell table:style-name="ce20" office:value-type="string" calcext:value-type="string">
            <text:p>DCA21</text:p>
          </table:table-cell>
          <table:table-cell table:style-name="ce20" office:value-type="string" calcext:value-type="string">
            <text:p>DCA22</text:p>
          </table:table-cell>
          <table:table-cell table:style-name="ce20" office:value-type="string" calcext:value-type="string">
            <text:p>DCA23</text:p>
          </table:table-cell>
          <table:table-cell table:style-name="ce20" office:value-type="string" calcext:value-type="string">
            <text:p>DCA24</text:p>
          </table:table-cell>
          <table:table-cell table:style-name="ce20"/>
          <table:table-cell table:style-name="ce20" office:value-type="string" calcext:value-type="string">
            <text:p>Grp1</text:p>
          </table:table-cell>
          <table:table-cell table:style-name="ce20" office:value-type="string" calcext:value-type="string">
            <text:p>Grp2</text:p>
          </table:table-cell>
          <table:table-cell table:style-name="ce20" office:value-type="string" calcext:value-type="string">
            <text:p>Grp3</text:p>
          </table:table-cell>
          <table:table-cell table:style-name="ce20" office:value-type="string" calcext:value-type="string">
            <text:p>Grp4</text:p>
          </table:table-cell>
          <table:table-cell table:style-name="ce20" office:value-type="string" calcext:value-type="string">
            <text:p>Grp5</text:p>
          </table:table-cell>
          <table:table-cell table:style-name="ce20" office:value-type="string" calcext:value-type="string">
            <text:p>Grp6</text:p>
          </table:table-cell>
          <table:table-cell table:style-name="ce20" office:value-type="string" calcext:value-type="string">
            <text:p>Grp7</text:p>
          </table:table-cell>
          <table:table-cell table:style-name="ce20" office:value-type="string" calcext:value-type="string">
            <text:p>Grp8</text:p>
          </table:table-cell>
          <table:table-cell table:style-name="ce20" office:value-type="string" calcext:value-type="string">
            <text:p>Grp9</text:p>
          </table:table-cell>
          <table:table-cell table:style-name="ce20" office:value-type="string" calcext:value-type="string">
            <text:p>Grp10</text:p>
          </table:table-cell>
          <table:table-cell table:style-name="ce20" office:value-type="string" calcext:value-type="string">
            <text:p>Grp11</text:p>
          </table:table-cell>
          <table:table-cell table:style-name="ce20" office:value-type="string" calcext:value-type="string">
            <text:p>Grp12</text:p>
          </table:table-cell>
          <table:table-cell table:style-name="ce4"/>
          <table:table-cell table:style-name="ce20" office:value-type="string" calcext:value-type="string">
            <text:p>StGrp1</text:p>
          </table:table-cell>
          <table:table-cell table:style-name="ce20" office:value-type="string" calcext:value-type="string">
            <text:p>StGrp2</text:p>
          </table:table-cell>
          <table:table-cell table:style-name="ce20" office:value-type="string" calcext:value-type="string">
            <text:p>StGrp3</text:p>
          </table:table-cell>
          <table:table-cell table:style-name="ce20" office:value-type="string" calcext:value-type="string">
            <text:p>StGrp4</text:p>
          </table:table-cell>
          <table:table-cell table:style-name="ce20" office:value-type="string" calcext:value-type="string">
            <text:p>StGrp5</text:p>
          </table:table-cell>
          <table:table-cell table:style-name="ce20" office:value-type="string" calcext:value-type="string">
            <text:p>StGrp6</text:p>
          </table:table-cell>
          <table:table-cell table:style-name="ce20" office:value-type="string" calcext:value-type="string">
            <text:p>StGrp7</text:p>
          </table:table-cell>
          <table:table-cell table:style-name="ce20" office:value-type="string" calcext:value-type="string">
            <text:p>StGrp8</text:p>
          </table:table-cell>
          <table:table-cell table:style-name="ce20" office:value-type="string" calcext:value-type="string">
            <text:p>StGrp9</text:p>
          </table:table-cell>
          <table:table-cell table:style-name="ce20" office:value-type="string" calcext:value-type="string">
            <text:p>StGrp10</text:p>
          </table:table-cell>
          <table:table-cell table:style-name="ce20" office:value-type="string" calcext:value-type="string">
            <text:p>StGrp11</text:p>
          </table:table-cell>
          <table:table-cell table:style-name="ce20" office:value-type="string" calcext:value-type="string">
            <text:p>StGrp12</text:p>
          </table:table-cell>
          <table:table-cell table:style-name="ce21" office:value-type="string" calcext:value-type="string">
            <text:p>Hidden Helper Cells – Please dont touch</text:p>
          </table:table-cell>
          <table:table-cell table:style-name="ce21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ST00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1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number-columns-repeated="2"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style-name="ce16" table:content-validation-name="val14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ST00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0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number-columns-repeated="2"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style-name="ce16" table:content-validation-name="val14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ST003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9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style-name="ce16" table:content-validation-name="val14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TST004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8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style-name="ce16" table:content-validation-name="val14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TST005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style-name="ce16" table:content-validation-name="val14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TST006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style-name="ce16" table:content-validation-name="val14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TST007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style-name="ce16" table:content-validation-name="val14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TST008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style-name="ce16" table:content-validation-name="val14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TST009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 office:value-type="string" office:string-value="x" calcext:value-type="string">
            <text:p>x</text:p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style-name="ce16" table:content-validation-name="val14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TST010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 office:value-type="string" office:string-value="x" calcext:value-type="string">
            <text:p>x</text:p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style-name="ce16" table:content-validation-name="val14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TST01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 office:value-type="string" office:string-value="x" calcext:value-type="string">
            <text:p>x</text:p>
          </table:table-cell>
          <table:table-cell table:formula="of:=IF([.AA12]=&quot;x&quot;;&quot;x&quot;;IF([.AA12]=&quot;-&quot;;&quot;-&quot;;&quot;&quot;))">
            <text:p/>
          </table:table-cell>
          <table:table-cell table:style-name="ce16" table:content-validation-name="val14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TST01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11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 office:value-type="string" office:string-value="x" calcext:value-type="string">
            <text:p>x</text:p>
          </table:table-cell>
          <table:table-cell table:style-name="ce16" table:content-validation-name="val14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TST01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8" table:number-columns-repeated="3"/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1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4]=&quot;x&quot;;&quot;x&quot;;IF([.AC14]=&quot;-&quot;;&quot;-&quot;;&quot;&quot;))" office:value-type="string" office:string-value="x" calcext:value-type="string">
            <text:p>x</text:p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TST01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0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 office:value-type="string" office:string-value="x" calcext:value-type="string">
            <text:p>x</text:p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 office:value-type="string" office:string-value="x" calcext:value-type="string">
            <text:p>x</text:p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TST015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9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 office:value-type="string" office:string-value="x" calcext:value-type="string">
            <text:p>x</text:p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 office:value-type="string" office:string-value="x" calcext:value-type="string">
            <text:p>x</text:p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TST016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8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 office:value-type="string" office:string-value="x" calcext:value-type="string">
            <text:p>x</text:p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 office:value-type="string" office:string-value="x" calcext:value-type="string">
            <text:p>x</text:p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TST017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 office:value-type="string" office:string-value="x" calcext:value-type="string">
            <text:p>x</text:p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 office:value-type="string" office:string-value="x" calcext:value-type="string">
            <text:p>x</text:p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TST018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 office:value-type="string" office:string-value="x" calcext:value-type="string">
            <text:p>x</text:p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 office:value-type="string" office:string-value="x" calcext:value-type="string">
            <text:p>x</text:p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TST019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 office:value-type="string" office:string-value="x" calcext:value-type="string">
            <text:p>x</text:p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 office:value-type="string" office:string-value="x" calcext:value-type="string">
            <text:p>x</text:p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TST020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 office:value-type="string" office:string-value="x" calcext:value-type="string">
            <text:p>x</text:p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 office:value-type="string" office:string-value="x" calcext:value-type="string">
            <text:p>x</text:p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TST021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 office:value-type="string" office:string-value="x" calcext:value-type="string">
            <text:p>x</text:p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 office:value-type="string" office:string-value="x" calcext:value-type="string">
            <text:p>x</text:p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TST0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 office:value-type="string" office:string-value="x" calcext:value-type="string">
            <text:p>x</text:p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TST02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 office:value-type="string" office:string-value="x" calcext:value-type="string">
            <text:p>x</text:p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 office:value-type="string" office:string-value="x" calcext:value-type="string">
            <text:p>x</text:p>
          </table:table-cell>
          <table:table-cell table:formula="of:=IF([.AN24]=&quot;x&quot;;&quot;x&quot;;IF([.AN2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TST02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style-name="ce16" table:content-validation-name="val13" table:number-columns-repeated="11"/>
          <table:table-cell table:style-name="ce16" table:content-validation-name="val13" office:value-type="string" calcext:value-type="string">
            <text:p>x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 office:value-type="string" office:string-value="x" calcext:value-type="string">
            <text:p>x</text:p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 office:value-type="string" office:string-value="x" calcext:value-type="string">
            <text:p>x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TST02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 office:value-type="string" office:string-value="x" calcext:value-type="string">
            <text:p>x</text:p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TST02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 office:value-type="string" office:string-value="x" calcext:value-type="string">
            <text:p>x</text:p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TST027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number-columns-repeated="3" table:style-name="ce17" table:content-validation-name="val6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 office:value-type="string" office:string-value="x" calcext:value-type="string">
            <text:p>x</text:p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ST028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 office:value-type="string" office:string-value="x" calcext:value-type="string">
            <text:p>x</text:p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ST029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 office:value-type="string" office:string-value="x" calcext:value-type="string">
            <text:p>x</text:p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TST030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 office:value-type="string" office:string-value="x" calcext:value-type="string">
            <text:p>x</text:p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TST031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 office:value-type="string" office:string-value="x" calcext:value-type="string">
            <text:p>x</text:p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TST032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 office:value-type="string" office:string-value="x" calcext:value-type="string">
            <text:p>x</text:p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TST03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 office:value-type="string" office:string-value="x" calcext:value-type="string">
            <text:p>x</text:p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TST034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 office:value-type="string" office:string-value="x" calcext:value-type="string">
            <text:p>x</text:p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TST03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 office:value-type="string" office:string-value="x" calcext:value-type="string">
            <text:p>x</text:p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TST03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 office:value-type="string" office:string-value="x" calcext:value-type="string">
            <text:p>x</text:p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TST03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 office:value-type="string" office:string-value="x" calcext:value-type="string">
            <text:p>x</text:p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TST03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 office:value-type="string" office:string-value="x" calcext:value-type="string">
            <text:p>x</text:p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TST039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 office:value-type="string" office:string-value="x" calcext:value-type="string">
            <text:p>x</text:p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TST040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 office:value-type="string" office:string-value="x" calcext:value-type="string">
            <text:p>x</text:p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TST041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 office:value-type="string" office:string-value="x" calcext:value-type="string">
            <text:p>x</text:p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TST042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 office:value-type="string" office:string-value="x" calcext:value-type="string">
            <text:p>x</text:p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TST043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 office:value-type="string" office:string-value="x" calcext:value-type="string">
            <text:p>x</text:p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TST04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 office:value-type="string" office:string-value="x" calcext:value-type="string">
            <text:p>x</text:p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TST045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 office:value-type="string" office:string-value="x" calcext:value-type="string">
            <text:p>x</text:p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TST046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 office:value-type="string" office:string-value="x" calcext:value-type="string">
            <text:p>x</text:p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TST04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 office:value-type="string" office:string-value="x" calcext:value-type="string">
            <text:p>x</text:p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TST04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 office:value-type="string" office:string-value="x" calcext:value-type="string">
            <text:p>x</text:p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TST04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 office:value-type="string" office:string-value="x" calcext:value-type="string">
            <text:p>x</text:p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 table:formula="of:=IF([.BI50]=&quot;x&quot;;&quot;x&quot;;IF([.BI50]=&quot;-&quot;;&quot;-&quot;;&quot;&quot;))">
            <text:p/>
          </table:table-cell>
          <table:table-cell table:formula="of:=IF([.BJ50]=&quot;x&quot;;&quot;x&quot;;IF([.BJ50]=&quot;-&quot;;&quot;-&quot;;&quot;&quot;))">
            <text:p/>
          </table:table-cell>
          <table:table-cell table:formula="of:=IF([.BK50]=&quot;x&quot;;&quot;x&quot;;IF([.BK50]=&quot;-&quot;;&quot;-&quot;;&quot;&quot;))">
            <text:p/>
          </table:table-cell>
          <table:table-cell table:formula="of:=IF([.BL50]=&quot;x&quot;;&quot;x&quot;;IF([.BL50]=&quot;-&quot;;&quot;-&quot;;&quot;&quot;))">
            <text:p/>
          </table:table-cell>
          <table:table-cell table:formula="of:=IF([.BM50]=&quot;x&quot;;&quot;x&quot;;IF([.BM50]=&quot;-&quot;;&quot;-&quot;;&quot;&quot;))">
            <text:p/>
          </table:table-cell>
          <table:table-cell table:formula="of:=IF([.BN50]=&quot;x&quot;;&quot;x&quot;;IF([.BN50]=&quot;-&quot;;&quot;-&quot;;&quot;&quot;))">
            <text:p/>
          </table:table-cell>
          <table:table-cell table:formula="of:=IF([.BO50]=&quot;x&quot;;&quot;x&quot;;IF([.BO50]=&quot;-&quot;;&quot;-&quot;;&quot;&quot;))">
            <text:p/>
          </table:table-cell>
          <table:table-cell table:formula="of:=IF([.BP50]=&quot;x&quot;;&quot;x&quot;;IF([.BP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TST05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 office:value-type="string" office:string-value="x" calcext:value-type="string">
            <text:p>x</text:p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 table:formula="of:=IF([.BI51]=&quot;x&quot;;&quot;x&quot;;IF([.BI51]=&quot;-&quot;;&quot;-&quot;;&quot;&quot;))">
            <text:p/>
          </table:table-cell>
          <table:table-cell table:formula="of:=IF([.BJ51]=&quot;x&quot;;&quot;x&quot;;IF([.BJ51]=&quot;-&quot;;&quot;-&quot;;&quot;&quot;))">
            <text:p/>
          </table:table-cell>
          <table:table-cell table:formula="of:=IF([.BK51]=&quot;x&quot;;&quot;x&quot;;IF([.BK51]=&quot;-&quot;;&quot;-&quot;;&quot;&quot;))">
            <text:p/>
          </table:table-cell>
          <table:table-cell table:formula="of:=IF([.BL51]=&quot;x&quot;;&quot;x&quot;;IF([.BL51]=&quot;-&quot;;&quot;-&quot;;&quot;&quot;))">
            <text:p/>
          </table:table-cell>
          <table:table-cell table:formula="of:=IF([.BM51]=&quot;x&quot;;&quot;x&quot;;IF([.BM51]=&quot;-&quot;;&quot;-&quot;;&quot;&quot;))">
            <text:p/>
          </table:table-cell>
          <table:table-cell table:formula="of:=IF([.BN51]=&quot;x&quot;;&quot;x&quot;;IF([.BN51]=&quot;-&quot;;&quot;-&quot;;&quot;&quot;))">
            <text:p/>
          </table:table-cell>
          <table:table-cell table:formula="of:=IF([.BO51]=&quot;x&quot;;&quot;x&quot;;IF([.BO51]=&quot;-&quot;;&quot;-&quot;;&quot;&quot;))">
            <text:p/>
          </table:table-cell>
          <table:table-cell table:formula="of:=IF([.BP51]=&quot;x&quot;;&quot;x&quot;;IF([.BP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TST051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 office:value-type="string" office:string-value="x" calcext:value-type="string">
            <text:p>x</text:p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 table:formula="of:=IF([.BI52]=&quot;x&quot;;&quot;x&quot;;IF([.BI52]=&quot;-&quot;;&quot;-&quot;;&quot;&quot;))">
            <text:p/>
          </table:table-cell>
          <table:table-cell table:formula="of:=IF([.BJ52]=&quot;x&quot;;&quot;x&quot;;IF([.BJ52]=&quot;-&quot;;&quot;-&quot;;&quot;&quot;))">
            <text:p/>
          </table:table-cell>
          <table:table-cell table:formula="of:=IF([.BK52]=&quot;x&quot;;&quot;x&quot;;IF([.BK52]=&quot;-&quot;;&quot;-&quot;;&quot;&quot;))">
            <text:p/>
          </table:table-cell>
          <table:table-cell table:formula="of:=IF([.BL52]=&quot;x&quot;;&quot;x&quot;;IF([.BL52]=&quot;-&quot;;&quot;-&quot;;&quot;&quot;))">
            <text:p/>
          </table:table-cell>
          <table:table-cell table:formula="of:=IF([.BM52]=&quot;x&quot;;&quot;x&quot;;IF([.BM52]=&quot;-&quot;;&quot;-&quot;;&quot;&quot;))">
            <text:p/>
          </table:table-cell>
          <table:table-cell table:formula="of:=IF([.BN52]=&quot;x&quot;;&quot;x&quot;;IF([.BN52]=&quot;-&quot;;&quot;-&quot;;&quot;&quot;))">
            <text:p/>
          </table:table-cell>
          <table:table-cell table:formula="of:=IF([.BO52]=&quot;x&quot;;&quot;x&quot;;IF([.BO52]=&quot;-&quot;;&quot;-&quot;;&quot;&quot;))">
            <text:p/>
          </table:table-cell>
          <table:table-cell table:formula="of:=IF([.BP52]=&quot;x&quot;;&quot;x&quot;;IF([.BP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TST052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 office:value-type="string" office:string-value="x" calcext:value-type="string">
            <text:p>x</text:p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 table:formula="of:=IF([.BI53]=&quot;x&quot;;&quot;x&quot;;IF([.BI53]=&quot;-&quot;;&quot;-&quot;;&quot;&quot;))">
            <text:p/>
          </table:table-cell>
          <table:table-cell table:formula="of:=IF([.BJ53]=&quot;x&quot;;&quot;x&quot;;IF([.BJ53]=&quot;-&quot;;&quot;-&quot;;&quot;&quot;))">
            <text:p/>
          </table:table-cell>
          <table:table-cell table:formula="of:=IF([.BK53]=&quot;x&quot;;&quot;x&quot;;IF([.BK53]=&quot;-&quot;;&quot;-&quot;;&quot;&quot;))">
            <text:p/>
          </table:table-cell>
          <table:table-cell table:formula="of:=IF([.BL53]=&quot;x&quot;;&quot;x&quot;;IF([.BL53]=&quot;-&quot;;&quot;-&quot;;&quot;&quot;))">
            <text:p/>
          </table:table-cell>
          <table:table-cell table:formula="of:=IF([.BM53]=&quot;x&quot;;&quot;x&quot;;IF([.BM53]=&quot;-&quot;;&quot;-&quot;;&quot;&quot;))">
            <text:p/>
          </table:table-cell>
          <table:table-cell table:formula="of:=IF([.BN53]=&quot;x&quot;;&quot;x&quot;;IF([.BN53]=&quot;-&quot;;&quot;-&quot;;&quot;&quot;))">
            <text:p/>
          </table:table-cell>
          <table:table-cell table:formula="of:=IF([.BO53]=&quot;x&quot;;&quot;x&quot;;IF([.BO53]=&quot;-&quot;;&quot;-&quot;;&quot;&quot;))">
            <text:p/>
          </table:table-cell>
          <table:table-cell table:formula="of:=IF([.BP53]=&quot;x&quot;;&quot;x&quot;;IF([.BP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TST053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 office:value-type="string" office:string-value="x" calcext:value-type="string">
            <text:p>x</text:p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 table:formula="of:=IF([.BI54]=&quot;x&quot;;&quot;x&quot;;IF([.BI54]=&quot;-&quot;;&quot;-&quot;;&quot;&quot;))">
            <text:p/>
          </table:table-cell>
          <table:table-cell table:formula="of:=IF([.BJ54]=&quot;x&quot;;&quot;x&quot;;IF([.BJ54]=&quot;-&quot;;&quot;-&quot;;&quot;&quot;))">
            <text:p/>
          </table:table-cell>
          <table:table-cell table:formula="of:=IF([.BK54]=&quot;x&quot;;&quot;x&quot;;IF([.BK54]=&quot;-&quot;;&quot;-&quot;;&quot;&quot;))">
            <text:p/>
          </table:table-cell>
          <table:table-cell table:formula="of:=IF([.BL54]=&quot;x&quot;;&quot;x&quot;;IF([.BL54]=&quot;-&quot;;&quot;-&quot;;&quot;&quot;))">
            <text:p/>
          </table:table-cell>
          <table:table-cell table:formula="of:=IF([.BM54]=&quot;x&quot;;&quot;x&quot;;IF([.BM54]=&quot;-&quot;;&quot;-&quot;;&quot;&quot;))">
            <text:p/>
          </table:table-cell>
          <table:table-cell table:formula="of:=IF([.BN54]=&quot;x&quot;;&quot;x&quot;;IF([.BN54]=&quot;-&quot;;&quot;-&quot;;&quot;&quot;))">
            <text:p/>
          </table:table-cell>
          <table:table-cell table:formula="of:=IF([.BO54]=&quot;x&quot;;&quot;x&quot;;IF([.BO54]=&quot;-&quot;;&quot;-&quot;;&quot;&quot;))">
            <text:p/>
          </table:table-cell>
          <table:table-cell table:formula="of:=IF([.BP54]=&quot;x&quot;;&quot;x&quot;;IF([.BP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TST054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 office:value-type="string" office:string-value="x" calcext:value-type="string">
            <text:p>x</text:p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 table:formula="of:=IF([.BI55]=&quot;x&quot;;&quot;x&quot;;IF([.BI55]=&quot;-&quot;;&quot;-&quot;;&quot;&quot;))">
            <text:p/>
          </table:table-cell>
          <table:table-cell table:formula="of:=IF([.BJ55]=&quot;x&quot;;&quot;x&quot;;IF([.BJ55]=&quot;-&quot;;&quot;-&quot;;&quot;&quot;))">
            <text:p/>
          </table:table-cell>
          <table:table-cell table:formula="of:=IF([.BK55]=&quot;x&quot;;&quot;x&quot;;IF([.BK55]=&quot;-&quot;;&quot;-&quot;;&quot;&quot;))">
            <text:p/>
          </table:table-cell>
          <table:table-cell table:formula="of:=IF([.BL55]=&quot;x&quot;;&quot;x&quot;;IF([.BL55]=&quot;-&quot;;&quot;-&quot;;&quot;&quot;))">
            <text:p/>
          </table:table-cell>
          <table:table-cell table:formula="of:=IF([.BM55]=&quot;x&quot;;&quot;x&quot;;IF([.BM55]=&quot;-&quot;;&quot;-&quot;;&quot;&quot;))">
            <text:p/>
          </table:table-cell>
          <table:table-cell table:formula="of:=IF([.BN55]=&quot;x&quot;;&quot;x&quot;;IF([.BN55]=&quot;-&quot;;&quot;-&quot;;&quot;&quot;))">
            <text:p/>
          </table:table-cell>
          <table:table-cell table:formula="of:=IF([.BO55]=&quot;x&quot;;&quot;x&quot;;IF([.BO55]=&quot;-&quot;;&quot;-&quot;;&quot;&quot;))">
            <text:p/>
          </table:table-cell>
          <table:table-cell table:formula="of:=IF([.BP55]=&quot;x&quot;;&quot;x&quot;;IF([.BP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TST05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 office:value-type="string" office:string-value="x" calcext:value-type="string">
            <text:p>x</text:p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 table:formula="of:=IF([.BI56]=&quot;x&quot;;&quot;x&quot;;IF([.BI56]=&quot;-&quot;;&quot;-&quot;;&quot;&quot;))">
            <text:p/>
          </table:table-cell>
          <table:table-cell table:formula="of:=IF([.BJ56]=&quot;x&quot;;&quot;x&quot;;IF([.BJ56]=&quot;-&quot;;&quot;-&quot;;&quot;&quot;))">
            <text:p/>
          </table:table-cell>
          <table:table-cell table:formula="of:=IF([.BK56]=&quot;x&quot;;&quot;x&quot;;IF([.BK56]=&quot;-&quot;;&quot;-&quot;;&quot;&quot;))">
            <text:p/>
          </table:table-cell>
          <table:table-cell table:formula="of:=IF([.BL56]=&quot;x&quot;;&quot;x&quot;;IF([.BL56]=&quot;-&quot;;&quot;-&quot;;&quot;&quot;))">
            <text:p/>
          </table:table-cell>
          <table:table-cell table:formula="of:=IF([.BM56]=&quot;x&quot;;&quot;x&quot;;IF([.BM56]=&quot;-&quot;;&quot;-&quot;;&quot;&quot;))">
            <text:p/>
          </table:table-cell>
          <table:table-cell table:formula="of:=IF([.BN56]=&quot;x&quot;;&quot;x&quot;;IF([.BN56]=&quot;-&quot;;&quot;-&quot;;&quot;&quot;))">
            <text:p/>
          </table:table-cell>
          <table:table-cell table:formula="of:=IF([.BO56]=&quot;x&quot;;&quot;x&quot;;IF([.BO56]=&quot;-&quot;;&quot;-&quot;;&quot;&quot;))">
            <text:p/>
          </table:table-cell>
          <table:table-cell table:formula="of:=IF([.BP56]=&quot;x&quot;;&quot;x&quot;;IF([.BP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TST056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 office:value-type="string" office:string-value="x" calcext:value-type="string">
            <text:p>x</text:p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 table:formula="of:=IF([.BI57]=&quot;x&quot;;&quot;x&quot;;IF([.BI57]=&quot;-&quot;;&quot;-&quot;;&quot;&quot;))">
            <text:p/>
          </table:table-cell>
          <table:table-cell table:formula="of:=IF([.BJ57]=&quot;x&quot;;&quot;x&quot;;IF([.BJ57]=&quot;-&quot;;&quot;-&quot;;&quot;&quot;))">
            <text:p/>
          </table:table-cell>
          <table:table-cell table:formula="of:=IF([.BK57]=&quot;x&quot;;&quot;x&quot;;IF([.BK57]=&quot;-&quot;;&quot;-&quot;;&quot;&quot;))">
            <text:p/>
          </table:table-cell>
          <table:table-cell table:formula="of:=IF([.BL57]=&quot;x&quot;;&quot;x&quot;;IF([.BL57]=&quot;-&quot;;&quot;-&quot;;&quot;&quot;))">
            <text:p/>
          </table:table-cell>
          <table:table-cell table:formula="of:=IF([.BM57]=&quot;x&quot;;&quot;x&quot;;IF([.BM57]=&quot;-&quot;;&quot;-&quot;;&quot;&quot;))">
            <text:p/>
          </table:table-cell>
          <table:table-cell table:formula="of:=IF([.BN57]=&quot;x&quot;;&quot;x&quot;;IF([.BN57]=&quot;-&quot;;&quot;-&quot;;&quot;&quot;))">
            <text:p/>
          </table:table-cell>
          <table:table-cell table:formula="of:=IF([.BO57]=&quot;x&quot;;&quot;x&quot;;IF([.BO57]=&quot;-&quot;;&quot;-&quot;;&quot;&quot;))">
            <text:p/>
          </table:table-cell>
          <table:table-cell table:formula="of:=IF([.BP57]=&quot;x&quot;;&quot;x&quot;;IF([.BP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TST057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 office:value-type="string" office:string-value="x" calcext:value-type="string">
            <text:p>x</text:p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 table:formula="of:=IF([.BI58]=&quot;x&quot;;&quot;x&quot;;IF([.BI58]=&quot;-&quot;;&quot;-&quot;;&quot;&quot;))">
            <text:p/>
          </table:table-cell>
          <table:table-cell table:formula="of:=IF([.BJ58]=&quot;x&quot;;&quot;x&quot;;IF([.BJ58]=&quot;-&quot;;&quot;-&quot;;&quot;&quot;))">
            <text:p/>
          </table:table-cell>
          <table:table-cell table:formula="of:=IF([.BK58]=&quot;x&quot;;&quot;x&quot;;IF([.BK58]=&quot;-&quot;;&quot;-&quot;;&quot;&quot;))">
            <text:p/>
          </table:table-cell>
          <table:table-cell table:formula="of:=IF([.BL58]=&quot;x&quot;;&quot;x&quot;;IF([.BL58]=&quot;-&quot;;&quot;-&quot;;&quot;&quot;))">
            <text:p/>
          </table:table-cell>
          <table:table-cell table:formula="of:=IF([.BM58]=&quot;x&quot;;&quot;x&quot;;IF([.BM58]=&quot;-&quot;;&quot;-&quot;;&quot;&quot;))">
            <text:p/>
          </table:table-cell>
          <table:table-cell table:formula="of:=IF([.BN58]=&quot;x&quot;;&quot;x&quot;;IF([.BN58]=&quot;-&quot;;&quot;-&quot;;&quot;&quot;))">
            <text:p/>
          </table:table-cell>
          <table:table-cell table:formula="of:=IF([.BO58]=&quot;x&quot;;&quot;x&quot;;IF([.BO58]=&quot;-&quot;;&quot;-&quot;;&quot;&quot;))">
            <text:p/>
          </table:table-cell>
          <table:table-cell table:formula="of:=IF([.BP58]=&quot;x&quot;;&quot;x&quot;;IF([.BP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TST058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8" calcext:value-type="float">
            <text:p>5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 office:value-type="string" office:string-value="x" calcext:value-type="string">
            <text:p>x</text:p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 table:formula="of:=IF([.BI59]=&quot;x&quot;;&quot;x&quot;;IF([.BI59]=&quot;-&quot;;&quot;-&quot;;&quot;&quot;))">
            <text:p/>
          </table:table-cell>
          <table:table-cell table:formula="of:=IF([.BJ59]=&quot;x&quot;;&quot;x&quot;;IF([.BJ59]=&quot;-&quot;;&quot;-&quot;;&quot;&quot;))">
            <text:p/>
          </table:table-cell>
          <table:table-cell table:formula="of:=IF([.BK59]=&quot;x&quot;;&quot;x&quot;;IF([.BK59]=&quot;-&quot;;&quot;-&quot;;&quot;&quot;))">
            <text:p/>
          </table:table-cell>
          <table:table-cell table:formula="of:=IF([.BL59]=&quot;x&quot;;&quot;x&quot;;IF([.BL59]=&quot;-&quot;;&quot;-&quot;;&quot;&quot;))">
            <text:p/>
          </table:table-cell>
          <table:table-cell table:formula="of:=IF([.BM59]=&quot;x&quot;;&quot;x&quot;;IF([.BM59]=&quot;-&quot;;&quot;-&quot;;&quot;&quot;))">
            <text:p/>
          </table:table-cell>
          <table:table-cell table:formula="of:=IF([.BN59]=&quot;x&quot;;&quot;x&quot;;IF([.BN59]=&quot;-&quot;;&quot;-&quot;;&quot;&quot;))">
            <text:p/>
          </table:table-cell>
          <table:table-cell table:formula="of:=IF([.BO59]=&quot;x&quot;;&quot;x&quot;;IF([.BO59]=&quot;-&quot;;&quot;-&quot;;&quot;&quot;))">
            <text:p/>
          </table:table-cell>
          <table:table-cell table:formula="of:=IF([.BP59]=&quot;x&quot;;&quot;x&quot;;IF([.BP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TST05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9" calcext:value-type="float">
            <text:p>5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 office:value-type="string" office:string-value="x" calcext:value-type="string">
            <text:p>x</text:p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 table:formula="of:=IF([.BI60]=&quot;x&quot;;&quot;x&quot;;IF([.BI60]=&quot;-&quot;;&quot;-&quot;;&quot;&quot;))">
            <text:p/>
          </table:table-cell>
          <table:table-cell table:formula="of:=IF([.BJ60]=&quot;x&quot;;&quot;x&quot;;IF([.BJ60]=&quot;-&quot;;&quot;-&quot;;&quot;&quot;))">
            <text:p/>
          </table:table-cell>
          <table:table-cell table:formula="of:=IF([.BK60]=&quot;x&quot;;&quot;x&quot;;IF([.BK60]=&quot;-&quot;;&quot;-&quot;;&quot;&quot;))">
            <text:p/>
          </table:table-cell>
          <table:table-cell table:formula="of:=IF([.BL60]=&quot;x&quot;;&quot;x&quot;;IF([.BL60]=&quot;-&quot;;&quot;-&quot;;&quot;&quot;))">
            <text:p/>
          </table:table-cell>
          <table:table-cell table:formula="of:=IF([.BM60]=&quot;x&quot;;&quot;x&quot;;IF([.BM60]=&quot;-&quot;;&quot;-&quot;;&quot;&quot;))">
            <text:p/>
          </table:table-cell>
          <table:table-cell table:formula="of:=IF([.BN60]=&quot;x&quot;;&quot;x&quot;;IF([.BN60]=&quot;-&quot;;&quot;-&quot;;&quot;&quot;))">
            <text:p/>
          </table:table-cell>
          <table:table-cell table:formula="of:=IF([.BO60]=&quot;x&quot;;&quot;x&quot;;IF([.BO60]=&quot;-&quot;;&quot;-&quot;;&quot;&quot;))">
            <text:p/>
          </table:table-cell>
          <table:table-cell table:formula="of:=IF([.BP60]=&quot;x&quot;;&quot;x&quot;;IF([.BP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TST06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 office:value-type="string" office:string-value="x" calcext:value-type="string">
            <text:p>x</text:p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 table:formula="of:=IF([.BI61]=&quot;x&quot;;&quot;x&quot;;IF([.BI61]=&quot;-&quot;;&quot;-&quot;;&quot;&quot;))">
            <text:p/>
          </table:table-cell>
          <table:table-cell table:formula="of:=IF([.BJ61]=&quot;x&quot;;&quot;x&quot;;IF([.BJ61]=&quot;-&quot;;&quot;-&quot;;&quot;&quot;))">
            <text:p/>
          </table:table-cell>
          <table:table-cell table:formula="of:=IF([.BK61]=&quot;x&quot;;&quot;x&quot;;IF([.BK61]=&quot;-&quot;;&quot;-&quot;;&quot;&quot;))">
            <text:p/>
          </table:table-cell>
          <table:table-cell table:formula="of:=IF([.BL61]=&quot;x&quot;;&quot;x&quot;;IF([.BL61]=&quot;-&quot;;&quot;-&quot;;&quot;&quot;))">
            <text:p/>
          </table:table-cell>
          <table:table-cell table:formula="of:=IF([.BM61]=&quot;x&quot;;&quot;x&quot;;IF([.BM61]=&quot;-&quot;;&quot;-&quot;;&quot;&quot;))">
            <text:p/>
          </table:table-cell>
          <table:table-cell table:formula="of:=IF([.BN61]=&quot;x&quot;;&quot;x&quot;;IF([.BN61]=&quot;-&quot;;&quot;-&quot;;&quot;&quot;))">
            <text:p/>
          </table:table-cell>
          <table:table-cell table:formula="of:=IF([.BO61]=&quot;x&quot;;&quot;x&quot;;IF([.BO61]=&quot;-&quot;;&quot;-&quot;;&quot;&quot;))">
            <text:p/>
          </table:table-cell>
          <table:table-cell table:formula="of:=IF([.BP61]=&quot;x&quot;;&quot;x&quot;;IF([.BP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TST06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 office:value-type="string" office:string-value="x" calcext:value-type="string">
            <text:p>x</text:p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 table:formula="of:=IF([.BI62]=&quot;x&quot;;&quot;x&quot;;IF([.BI62]=&quot;-&quot;;&quot;-&quot;;&quot;&quot;))">
            <text:p/>
          </table:table-cell>
          <table:table-cell table:formula="of:=IF([.BJ62]=&quot;x&quot;;&quot;x&quot;;IF([.BJ62]=&quot;-&quot;;&quot;-&quot;;&quot;&quot;))">
            <text:p/>
          </table:table-cell>
          <table:table-cell table:formula="of:=IF([.BK62]=&quot;x&quot;;&quot;x&quot;;IF([.BK62]=&quot;-&quot;;&quot;-&quot;;&quot;&quot;))">
            <text:p/>
          </table:table-cell>
          <table:table-cell table:formula="of:=IF([.BL62]=&quot;x&quot;;&quot;x&quot;;IF([.BL62]=&quot;-&quot;;&quot;-&quot;;&quot;&quot;))">
            <text:p/>
          </table:table-cell>
          <table:table-cell table:formula="of:=IF([.BM62]=&quot;x&quot;;&quot;x&quot;;IF([.BM62]=&quot;-&quot;;&quot;-&quot;;&quot;&quot;))">
            <text:p/>
          </table:table-cell>
          <table:table-cell table:formula="of:=IF([.BN62]=&quot;x&quot;;&quot;x&quot;;IF([.BN62]=&quot;-&quot;;&quot;-&quot;;&quot;&quot;))">
            <text:p/>
          </table:table-cell>
          <table:table-cell table:formula="of:=IF([.BO62]=&quot;x&quot;;&quot;x&quot;;IF([.BO62]=&quot;-&quot;;&quot;-&quot;;&quot;&quot;))">
            <text:p/>
          </table:table-cell>
          <table:table-cell table:formula="of:=IF([.BP62]=&quot;x&quot;;&quot;x&quot;;IF([.BP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TST06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 office:value-type="string" office:string-value="x" calcext:value-type="string">
            <text:p>x</text:p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 table:formula="of:=IF([.BI63]=&quot;x&quot;;&quot;x&quot;;IF([.BI63]=&quot;-&quot;;&quot;-&quot;;&quot;&quot;))">
            <text:p/>
          </table:table-cell>
          <table:table-cell table:formula="of:=IF([.BJ63]=&quot;x&quot;;&quot;x&quot;;IF([.BJ63]=&quot;-&quot;;&quot;-&quot;;&quot;&quot;))">
            <text:p/>
          </table:table-cell>
          <table:table-cell table:formula="of:=IF([.BK63]=&quot;x&quot;;&quot;x&quot;;IF([.BK63]=&quot;-&quot;;&quot;-&quot;;&quot;&quot;))">
            <text:p/>
          </table:table-cell>
          <table:table-cell table:formula="of:=IF([.BL63]=&quot;x&quot;;&quot;x&quot;;IF([.BL63]=&quot;-&quot;;&quot;-&quot;;&quot;&quot;))">
            <text:p/>
          </table:table-cell>
          <table:table-cell table:formula="of:=IF([.BM63]=&quot;x&quot;;&quot;x&quot;;IF([.BM63]=&quot;-&quot;;&quot;-&quot;;&quot;&quot;))">
            <text:p/>
          </table:table-cell>
          <table:table-cell table:formula="of:=IF([.BN63]=&quot;x&quot;;&quot;x&quot;;IF([.BN63]=&quot;-&quot;;&quot;-&quot;;&quot;&quot;))">
            <text:p/>
          </table:table-cell>
          <table:table-cell table:formula="of:=IF([.BO63]=&quot;x&quot;;&quot;x&quot;;IF([.BO63]=&quot;-&quot;;&quot;-&quot;;&quot;&quot;))">
            <text:p/>
          </table:table-cell>
          <table:table-cell table:formula="of:=IF([.BP63]=&quot;x&quot;;&quot;x&quot;;IF([.BP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3" calcext:value-type="float">
            <text:p>63</text:p>
          </table:table-cell>
          <table:table-cell table:style-name="ce7" office:value-type="string" calcext:value-type="string">
            <text:p>TST063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3" calcext:value-type="float">
            <text:p>6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 office:value-type="string" office:string-value="x" calcext:value-type="string">
            <text:p>x</text:p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 table:formula="of:=IF([.BI64]=&quot;x&quot;;&quot;x&quot;;IF([.BI64]=&quot;-&quot;;&quot;-&quot;;&quot;&quot;))">
            <text:p/>
          </table:table-cell>
          <table:table-cell table:formula="of:=IF([.BJ64]=&quot;x&quot;;&quot;x&quot;;IF([.BJ64]=&quot;-&quot;;&quot;-&quot;;&quot;&quot;))">
            <text:p/>
          </table:table-cell>
          <table:table-cell table:formula="of:=IF([.BK64]=&quot;x&quot;;&quot;x&quot;;IF([.BK64]=&quot;-&quot;;&quot;-&quot;;&quot;&quot;))">
            <text:p/>
          </table:table-cell>
          <table:table-cell table:formula="of:=IF([.BL64]=&quot;x&quot;;&quot;x&quot;;IF([.BL64]=&quot;-&quot;;&quot;-&quot;;&quot;&quot;))">
            <text:p/>
          </table:table-cell>
          <table:table-cell table:formula="of:=IF([.BM64]=&quot;x&quot;;&quot;x&quot;;IF([.BM64]=&quot;-&quot;;&quot;-&quot;;&quot;&quot;))">
            <text:p/>
          </table:table-cell>
          <table:table-cell table:formula="of:=IF([.BN64]=&quot;x&quot;;&quot;x&quot;;IF([.BN64]=&quot;-&quot;;&quot;-&quot;;&quot;&quot;))">
            <text:p/>
          </table:table-cell>
          <table:table-cell table:formula="of:=IF([.BO64]=&quot;x&quot;;&quot;x&quot;;IF([.BO64]=&quot;-&quot;;&quot;-&quot;;&quot;&quot;))">
            <text:p/>
          </table:table-cell>
          <table:table-cell table:formula="of:=IF([.BP64]=&quot;x&quot;;&quot;x&quot;;IF([.BP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TST064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4" calcext:value-type="float">
            <text:p>6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 office:value-type="string" office:string-value="x" calcext:value-type="string">
            <text:p>x</text:p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 table:formula="of:=IF([.BI65]=&quot;x&quot;;&quot;x&quot;;IF([.BI65]=&quot;-&quot;;&quot;-&quot;;&quot;&quot;))">
            <text:p/>
          </table:table-cell>
          <table:table-cell table:formula="of:=IF([.BJ65]=&quot;x&quot;;&quot;x&quot;;IF([.BJ65]=&quot;-&quot;;&quot;-&quot;;&quot;&quot;))">
            <text:p/>
          </table:table-cell>
          <table:table-cell table:formula="of:=IF([.BK65]=&quot;x&quot;;&quot;x&quot;;IF([.BK65]=&quot;-&quot;;&quot;-&quot;;&quot;&quot;))">
            <text:p/>
          </table:table-cell>
          <table:table-cell table:formula="of:=IF([.BL65]=&quot;x&quot;;&quot;x&quot;;IF([.BL65]=&quot;-&quot;;&quot;-&quot;;&quot;&quot;))">
            <text:p/>
          </table:table-cell>
          <table:table-cell table:formula="of:=IF([.BM65]=&quot;x&quot;;&quot;x&quot;;IF([.BM65]=&quot;-&quot;;&quot;-&quot;;&quot;&quot;))">
            <text:p/>
          </table:table-cell>
          <table:table-cell table:formula="of:=IF([.BN65]=&quot;x&quot;;&quot;x&quot;;IF([.BN65]=&quot;-&quot;;&quot;-&quot;;&quot;&quot;))">
            <text:p/>
          </table:table-cell>
          <table:table-cell table:formula="of:=IF([.BO65]=&quot;x&quot;;&quot;x&quot;;IF([.BO65]=&quot;-&quot;;&quot;-&quot;;&quot;&quot;))">
            <text:p/>
          </table:table-cell>
          <table:table-cell table:formula="of:=IF([.BP65]=&quot;x&quot;;&quot;x&quot;;IF([.BP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5" calcext:value-type="float">
            <text:p>65</text:p>
          </table:table-cell>
          <table:table-cell table:style-name="ce7" office:value-type="string" calcext:value-type="string">
            <text:p>TST065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00" calcext:value-type="float">
            <text:p>13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6]=&quot;x&quot;;&quot;x&quot;;IF([.AS66]=&quot;-&quot;;&quot;-&quot;;&quot;&quot;))">
            <text:p/>
          </table:table-cell>
          <table:table-cell table:formula="of:=IF([.AT66]=&quot;x&quot;;&quot;x&quot;;IF([.AT66]=&quot;-&quot;;&quot;-&quot;;&quot;&quot;))">
            <text:p/>
          </table:table-cell>
          <table:table-cell table:formula="of:=IF([.AU66]=&quot;x&quot;;&quot;x&quot;;IF([.AU66]=&quot;-&quot;;&quot;-&quot;;&quot;&quot;))">
            <text:p/>
          </table:table-cell>
          <table:table-cell table:formula="of:=IF([.AV66]=&quot;x&quot;;&quot;x&quot;;IF([.AV66]=&quot;-&quot;;&quot;-&quot;;&quot;&quot;))">
            <text:p/>
          </table:table-cell>
          <table:table-cell table:formula="of:=IF([.AW66]=&quot;x&quot;;&quot;x&quot;;IF([.AW66]=&quot;-&quot;;&quot;-&quot;;&quot;&quot;))">
            <text:p/>
          </table:table-cell>
          <table:table-cell table:formula="of:=IF([.AX66]=&quot;x&quot;;&quot;x&quot;;IF([.AX66]=&quot;-&quot;;&quot;-&quot;;&quot;&quot;))" office:value-type="string" office:string-value="x" calcext:value-type="string">
            <text:p>x</text:p>
          </table:table-cell>
          <table:table-cell table:formula="of:=IF([.AY66]=&quot;x&quot;;&quot;x&quot;;IF([.AY66]=&quot;-&quot;;&quot;-&quot;;&quot;&quot;))">
            <text:p/>
          </table:table-cell>
          <table:table-cell table:formula="of:=IF([.AZ66]=&quot;x&quot;;&quot;x&quot;;IF([.AZ66]=&quot;-&quot;;&quot;-&quot;;&quot;&quot;))">
            <text:p/>
          </table:table-cell>
          <table:table-cell table:formula="of:=IF([.BA66]=&quot;x&quot;;&quot;x&quot;;IF([.BA66]=&quot;-&quot;;&quot;-&quot;;&quot;&quot;))">
            <text:p/>
          </table:table-cell>
          <table:table-cell table:formula="of:=IF([.BB66]=&quot;x&quot;;&quot;x&quot;;IF([.BB66]=&quot;-&quot;;&quot;-&quot;;&quot;&quot;))">
            <text:p/>
          </table:table-cell>
          <table:table-cell table:formula="of:=IF([.BC66]=&quot;x&quot;;&quot;x&quot;;IF([.BC66]=&quot;-&quot;;&quot;-&quot;;&quot;&quot;))">
            <text:p/>
          </table:table-cell>
          <table:table-cell table:formula="of:=IF([.BD66]=&quot;x&quot;;&quot;x&quot;;IF([.BD66]=&quot;-&quot;;&quot;-&quot;;&quot;&quot;))">
            <text:p/>
          </table:table-cell>
          <table:table-cell table:formula="of:=IF([.BE66]=&quot;x&quot;;&quot;x&quot;;IF([.BE66]=&quot;-&quot;;&quot;-&quot;;&quot;&quot;))">
            <text:p/>
          </table:table-cell>
          <table:table-cell table:formula="of:=IF([.BF66]=&quot;x&quot;;&quot;x&quot;;IF([.BF66]=&quot;-&quot;;&quot;-&quot;;&quot;&quot;))">
            <text:p/>
          </table:table-cell>
          <table:table-cell table:formula="of:=IF([.BG66]=&quot;x&quot;;&quot;x&quot;;IF([.BG66]=&quot;-&quot;;&quot;-&quot;;&quot;&quot;))">
            <text:p/>
          </table:table-cell>
          <table:table-cell table:formula="of:=IF([.BH66]=&quot;x&quot;;&quot;x&quot;;IF([.BH66]=&quot;-&quot;;&quot;-&quot;;&quot;&quot;))">
            <text:p/>
          </table:table-cell>
          <table:table-cell table:formula="of:=IF([.BI66]=&quot;x&quot;;&quot;x&quot;;IF([.BI66]=&quot;-&quot;;&quot;-&quot;;&quot;&quot;))">
            <text:p/>
          </table:table-cell>
          <table:table-cell table:formula="of:=IF([.BJ66]=&quot;x&quot;;&quot;x&quot;;IF([.BJ66]=&quot;-&quot;;&quot;-&quot;;&quot;&quot;))">
            <text:p/>
          </table:table-cell>
          <table:table-cell table:formula="of:=IF([.BK66]=&quot;x&quot;;&quot;x&quot;;IF([.BK66]=&quot;-&quot;;&quot;-&quot;;&quot;&quot;))">
            <text:p/>
          </table:table-cell>
          <table:table-cell table:formula="of:=IF([.BL66]=&quot;x&quot;;&quot;x&quot;;IF([.BL66]=&quot;-&quot;;&quot;-&quot;;&quot;&quot;))">
            <text:p/>
          </table:table-cell>
          <table:table-cell table:formula="of:=IF([.BM66]=&quot;x&quot;;&quot;x&quot;;IF([.BM66]=&quot;-&quot;;&quot;-&quot;;&quot;&quot;))">
            <text:p/>
          </table:table-cell>
          <table:table-cell table:formula="of:=IF([.BN66]=&quot;x&quot;;&quot;x&quot;;IF([.BN66]=&quot;-&quot;;&quot;-&quot;;&quot;&quot;))">
            <text:p/>
          </table:table-cell>
          <table:table-cell table:formula="of:=IF([.BO66]=&quot;x&quot;;&quot;x&quot;;IF([.BO66]=&quot;-&quot;;&quot;-&quot;;&quot;&quot;))">
            <text:p/>
          </table:table-cell>
          <table:table-cell table:formula="of:=IF([.BP66]=&quot;x&quot;;&quot;x&quot;;IF([.BP66]=&quot;-&quot;;&quot;-&quot;;&quot;&quot;))">
            <text:p/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string" calcext:value-type="string">
            <text:p>TST066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320" calcext:value-type="float">
            <text:p>1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7]=&quot;x&quot;;&quot;x&quot;;IF([.AS67]=&quot;-&quot;;&quot;-&quot;;&quot;&quot;))">
            <text:p/>
          </table:table-cell>
          <table:table-cell table:formula="of:=IF([.AT67]=&quot;x&quot;;&quot;x&quot;;IF([.AT67]=&quot;-&quot;;&quot;-&quot;;&quot;&quot;))">
            <text:p/>
          </table:table-cell>
          <table:table-cell table:formula="of:=IF([.AU67]=&quot;x&quot;;&quot;x&quot;;IF([.AU67]=&quot;-&quot;;&quot;-&quot;;&quot;&quot;))">
            <text:p/>
          </table:table-cell>
          <table:table-cell table:formula="of:=IF([.AV67]=&quot;x&quot;;&quot;x&quot;;IF([.AV67]=&quot;-&quot;;&quot;-&quot;;&quot;&quot;))">
            <text:p/>
          </table:table-cell>
          <table:table-cell table:formula="of:=IF([.AW67]=&quot;x&quot;;&quot;x&quot;;IF([.AW67]=&quot;-&quot;;&quot;-&quot;;&quot;&quot;))">
            <text:p/>
          </table:table-cell>
          <table:table-cell table:formula="of:=IF([.AX67]=&quot;x&quot;;&quot;x&quot;;IF([.AX67]=&quot;-&quot;;&quot;-&quot;;&quot;&quot;))" office:value-type="string" office:string-value="x" calcext:value-type="string">
            <text:p>x</text:p>
          </table:table-cell>
          <table:table-cell table:formula="of:=IF([.AY67]=&quot;x&quot;;&quot;x&quot;;IF([.AY67]=&quot;-&quot;;&quot;-&quot;;&quot;&quot;))">
            <text:p/>
          </table:table-cell>
          <table:table-cell table:formula="of:=IF([.AZ67]=&quot;x&quot;;&quot;x&quot;;IF([.AZ67]=&quot;-&quot;;&quot;-&quot;;&quot;&quot;))">
            <text:p/>
          </table:table-cell>
          <table:table-cell table:formula="of:=IF([.BA67]=&quot;x&quot;;&quot;x&quot;;IF([.BA67]=&quot;-&quot;;&quot;-&quot;;&quot;&quot;))">
            <text:p/>
          </table:table-cell>
          <table:table-cell table:formula="of:=IF([.BB67]=&quot;x&quot;;&quot;x&quot;;IF([.BB67]=&quot;-&quot;;&quot;-&quot;;&quot;&quot;))">
            <text:p/>
          </table:table-cell>
          <table:table-cell table:formula="of:=IF([.BC67]=&quot;x&quot;;&quot;x&quot;;IF([.BC67]=&quot;-&quot;;&quot;-&quot;;&quot;&quot;))">
            <text:p/>
          </table:table-cell>
          <table:table-cell table:formula="of:=IF([.BD67]=&quot;x&quot;;&quot;x&quot;;IF([.BD67]=&quot;-&quot;;&quot;-&quot;;&quot;&quot;))">
            <text:p/>
          </table:table-cell>
          <table:table-cell table:formula="of:=IF([.BE67]=&quot;x&quot;;&quot;x&quot;;IF([.BE67]=&quot;-&quot;;&quot;-&quot;;&quot;&quot;))">
            <text:p/>
          </table:table-cell>
          <table:table-cell table:formula="of:=IF([.BF67]=&quot;x&quot;;&quot;x&quot;;IF([.BF67]=&quot;-&quot;;&quot;-&quot;;&quot;&quot;))">
            <text:p/>
          </table:table-cell>
          <table:table-cell table:formula="of:=IF([.BG67]=&quot;x&quot;;&quot;x&quot;;IF([.BG67]=&quot;-&quot;;&quot;-&quot;;&quot;&quot;))">
            <text:p/>
          </table:table-cell>
          <table:table-cell table:formula="of:=IF([.BH67]=&quot;x&quot;;&quot;x&quot;;IF([.BH67]=&quot;-&quot;;&quot;-&quot;;&quot;&quot;))">
            <text:p/>
          </table:table-cell>
          <table:table-cell table:formula="of:=IF([.BI67]=&quot;x&quot;;&quot;x&quot;;IF([.BI67]=&quot;-&quot;;&quot;-&quot;;&quot;&quot;))">
            <text:p/>
          </table:table-cell>
          <table:table-cell table:formula="of:=IF([.BJ67]=&quot;x&quot;;&quot;x&quot;;IF([.BJ67]=&quot;-&quot;;&quot;-&quot;;&quot;&quot;))">
            <text:p/>
          </table:table-cell>
          <table:table-cell table:formula="of:=IF([.BK67]=&quot;x&quot;;&quot;x&quot;;IF([.BK67]=&quot;-&quot;;&quot;-&quot;;&quot;&quot;))">
            <text:p/>
          </table:table-cell>
          <table:table-cell table:formula="of:=IF([.BL67]=&quot;x&quot;;&quot;x&quot;;IF([.BL67]=&quot;-&quot;;&quot;-&quot;;&quot;&quot;))">
            <text:p/>
          </table:table-cell>
          <table:table-cell table:formula="of:=IF([.BM67]=&quot;x&quot;;&quot;x&quot;;IF([.BM67]=&quot;-&quot;;&quot;-&quot;;&quot;&quot;))">
            <text:p/>
          </table:table-cell>
          <table:table-cell table:formula="of:=IF([.BN67]=&quot;x&quot;;&quot;x&quot;;IF([.BN67]=&quot;-&quot;;&quot;-&quot;;&quot;&quot;))">
            <text:p/>
          </table:table-cell>
          <table:table-cell table:formula="of:=IF([.BO67]=&quot;x&quot;;&quot;x&quot;;IF([.BO67]=&quot;-&quot;;&quot;-&quot;;&quot;&quot;))">
            <text:p/>
          </table:table-cell>
          <table:table-cell table:formula="of:=IF([.BP67]=&quot;x&quot;;&quot;x&quot;;IF([.BP67]=&quot;-&quot;;&quot;-&quot;;&quot;&quot;))">
            <text:p/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7" calcext:value-type="float">
            <text:p>67</text:p>
          </table:table-cell>
          <table:table-cell table:style-name="ce7" office:value-type="string" calcext:value-type="string">
            <text:p>TST067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40" calcext:value-type="float">
            <text:p>13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8]=&quot;x&quot;;&quot;x&quot;;IF([.AS68]=&quot;-&quot;;&quot;-&quot;;&quot;&quot;))">
            <text:p/>
          </table:table-cell>
          <table:table-cell table:formula="of:=IF([.AT68]=&quot;x&quot;;&quot;x&quot;;IF([.AT68]=&quot;-&quot;;&quot;-&quot;;&quot;&quot;))">
            <text:p/>
          </table:table-cell>
          <table:table-cell table:formula="of:=IF([.AU68]=&quot;x&quot;;&quot;x&quot;;IF([.AU68]=&quot;-&quot;;&quot;-&quot;;&quot;&quot;))">
            <text:p/>
          </table:table-cell>
          <table:table-cell table:formula="of:=IF([.AV68]=&quot;x&quot;;&quot;x&quot;;IF([.AV68]=&quot;-&quot;;&quot;-&quot;;&quot;&quot;))">
            <text:p/>
          </table:table-cell>
          <table:table-cell table:formula="of:=IF([.AW68]=&quot;x&quot;;&quot;x&quot;;IF([.AW68]=&quot;-&quot;;&quot;-&quot;;&quot;&quot;))">
            <text:p/>
          </table:table-cell>
          <table:table-cell table:formula="of:=IF([.AX68]=&quot;x&quot;;&quot;x&quot;;IF([.AX68]=&quot;-&quot;;&quot;-&quot;;&quot;&quot;))" office:value-type="string" office:string-value="x" calcext:value-type="string">
            <text:p>x</text:p>
          </table:table-cell>
          <table:table-cell table:formula="of:=IF([.AY68]=&quot;x&quot;;&quot;x&quot;;IF([.AY68]=&quot;-&quot;;&quot;-&quot;;&quot;&quot;))">
            <text:p/>
          </table:table-cell>
          <table:table-cell table:formula="of:=IF([.AZ68]=&quot;x&quot;;&quot;x&quot;;IF([.AZ68]=&quot;-&quot;;&quot;-&quot;;&quot;&quot;))">
            <text:p/>
          </table:table-cell>
          <table:table-cell table:formula="of:=IF([.BA68]=&quot;x&quot;;&quot;x&quot;;IF([.BA68]=&quot;-&quot;;&quot;-&quot;;&quot;&quot;))">
            <text:p/>
          </table:table-cell>
          <table:table-cell table:formula="of:=IF([.BB68]=&quot;x&quot;;&quot;x&quot;;IF([.BB68]=&quot;-&quot;;&quot;-&quot;;&quot;&quot;))">
            <text:p/>
          </table:table-cell>
          <table:table-cell table:formula="of:=IF([.BC68]=&quot;x&quot;;&quot;x&quot;;IF([.BC68]=&quot;-&quot;;&quot;-&quot;;&quot;&quot;))">
            <text:p/>
          </table:table-cell>
          <table:table-cell table:formula="of:=IF([.BD68]=&quot;x&quot;;&quot;x&quot;;IF([.BD68]=&quot;-&quot;;&quot;-&quot;;&quot;&quot;))">
            <text:p/>
          </table:table-cell>
          <table:table-cell table:formula="of:=IF([.BE68]=&quot;x&quot;;&quot;x&quot;;IF([.BE68]=&quot;-&quot;;&quot;-&quot;;&quot;&quot;))">
            <text:p/>
          </table:table-cell>
          <table:table-cell table:formula="of:=IF([.BF68]=&quot;x&quot;;&quot;x&quot;;IF([.BF68]=&quot;-&quot;;&quot;-&quot;;&quot;&quot;))">
            <text:p/>
          </table:table-cell>
          <table:table-cell table:formula="of:=IF([.BG68]=&quot;x&quot;;&quot;x&quot;;IF([.BG68]=&quot;-&quot;;&quot;-&quot;;&quot;&quot;))">
            <text:p/>
          </table:table-cell>
          <table:table-cell table:formula="of:=IF([.BH68]=&quot;x&quot;;&quot;x&quot;;IF([.BH68]=&quot;-&quot;;&quot;-&quot;;&quot;&quot;))">
            <text:p/>
          </table:table-cell>
          <table:table-cell table:formula="of:=IF([.BI68]=&quot;x&quot;;&quot;x&quot;;IF([.BI68]=&quot;-&quot;;&quot;-&quot;;&quot;&quot;))">
            <text:p/>
          </table:table-cell>
          <table:table-cell table:formula="of:=IF([.BJ68]=&quot;x&quot;;&quot;x&quot;;IF([.BJ68]=&quot;-&quot;;&quot;-&quot;;&quot;&quot;))">
            <text:p/>
          </table:table-cell>
          <table:table-cell table:formula="of:=IF([.BK68]=&quot;x&quot;;&quot;x&quot;;IF([.BK68]=&quot;-&quot;;&quot;-&quot;;&quot;&quot;))">
            <text:p/>
          </table:table-cell>
          <table:table-cell table:formula="of:=IF([.BL68]=&quot;x&quot;;&quot;x&quot;;IF([.BL68]=&quot;-&quot;;&quot;-&quot;;&quot;&quot;))">
            <text:p/>
          </table:table-cell>
          <table:table-cell table:formula="of:=IF([.BM68]=&quot;x&quot;;&quot;x&quot;;IF([.BM68]=&quot;-&quot;;&quot;-&quot;;&quot;&quot;))">
            <text:p/>
          </table:table-cell>
          <table:table-cell table:formula="of:=IF([.BN68]=&quot;x&quot;;&quot;x&quot;;IF([.BN68]=&quot;-&quot;;&quot;-&quot;;&quot;&quot;))">
            <text:p/>
          </table:table-cell>
          <table:table-cell table:formula="of:=IF([.BO68]=&quot;x&quot;;&quot;x&quot;;IF([.BO68]=&quot;-&quot;;&quot;-&quot;;&quot;&quot;))">
            <text:p/>
          </table:table-cell>
          <table:table-cell table:formula="of:=IF([.BP68]=&quot;x&quot;;&quot;x&quot;;IF([.BP68]=&quot;-&quot;;&quot;-&quot;;&quot;&quot;))">
            <text:p/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TST068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360" calcext:value-type="float">
            <text:p>1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9]=&quot;x&quot;;&quot;x&quot;;IF([.AS69]=&quot;-&quot;;&quot;-&quot;;&quot;&quot;))">
            <text:p/>
          </table:table-cell>
          <table:table-cell table:formula="of:=IF([.AT69]=&quot;x&quot;;&quot;x&quot;;IF([.AT69]=&quot;-&quot;;&quot;-&quot;;&quot;&quot;))">
            <text:p/>
          </table:table-cell>
          <table:table-cell table:formula="of:=IF([.AU69]=&quot;x&quot;;&quot;x&quot;;IF([.AU69]=&quot;-&quot;;&quot;-&quot;;&quot;&quot;))">
            <text:p/>
          </table:table-cell>
          <table:table-cell table:formula="of:=IF([.AV69]=&quot;x&quot;;&quot;x&quot;;IF([.AV69]=&quot;-&quot;;&quot;-&quot;;&quot;&quot;))">
            <text:p/>
          </table:table-cell>
          <table:table-cell table:formula="of:=IF([.AW69]=&quot;x&quot;;&quot;x&quot;;IF([.AW69]=&quot;-&quot;;&quot;-&quot;;&quot;&quot;))">
            <text:p/>
          </table:table-cell>
          <table:table-cell table:formula="of:=IF([.AX69]=&quot;x&quot;;&quot;x&quot;;IF([.AX69]=&quot;-&quot;;&quot;-&quot;;&quot;&quot;))" office:value-type="string" office:string-value="x" calcext:value-type="string">
            <text:p>x</text:p>
          </table:table-cell>
          <table:table-cell table:formula="of:=IF([.AY69]=&quot;x&quot;;&quot;x&quot;;IF([.AY69]=&quot;-&quot;;&quot;-&quot;;&quot;&quot;))">
            <text:p/>
          </table:table-cell>
          <table:table-cell table:formula="of:=IF([.AZ69]=&quot;x&quot;;&quot;x&quot;;IF([.AZ69]=&quot;-&quot;;&quot;-&quot;;&quot;&quot;))">
            <text:p/>
          </table:table-cell>
          <table:table-cell table:formula="of:=IF([.BA69]=&quot;x&quot;;&quot;x&quot;;IF([.BA69]=&quot;-&quot;;&quot;-&quot;;&quot;&quot;))">
            <text:p/>
          </table:table-cell>
          <table:table-cell table:formula="of:=IF([.BB69]=&quot;x&quot;;&quot;x&quot;;IF([.BB69]=&quot;-&quot;;&quot;-&quot;;&quot;&quot;))">
            <text:p/>
          </table:table-cell>
          <table:table-cell table:formula="of:=IF([.BC69]=&quot;x&quot;;&quot;x&quot;;IF([.BC69]=&quot;-&quot;;&quot;-&quot;;&quot;&quot;))">
            <text:p/>
          </table:table-cell>
          <table:table-cell table:formula="of:=IF([.BD69]=&quot;x&quot;;&quot;x&quot;;IF([.BD69]=&quot;-&quot;;&quot;-&quot;;&quot;&quot;))">
            <text:p/>
          </table:table-cell>
          <table:table-cell table:formula="of:=IF([.BE69]=&quot;x&quot;;&quot;x&quot;;IF([.BE69]=&quot;-&quot;;&quot;-&quot;;&quot;&quot;))">
            <text:p/>
          </table:table-cell>
          <table:table-cell table:formula="of:=IF([.BF69]=&quot;x&quot;;&quot;x&quot;;IF([.BF69]=&quot;-&quot;;&quot;-&quot;;&quot;&quot;))">
            <text:p/>
          </table:table-cell>
          <table:table-cell table:formula="of:=IF([.BG69]=&quot;x&quot;;&quot;x&quot;;IF([.BG69]=&quot;-&quot;;&quot;-&quot;;&quot;&quot;))">
            <text:p/>
          </table:table-cell>
          <table:table-cell table:formula="of:=IF([.BH69]=&quot;x&quot;;&quot;x&quot;;IF([.BH69]=&quot;-&quot;;&quot;-&quot;;&quot;&quot;))">
            <text:p/>
          </table:table-cell>
          <table:table-cell table:formula="of:=IF([.BI69]=&quot;x&quot;;&quot;x&quot;;IF([.BI69]=&quot;-&quot;;&quot;-&quot;;&quot;&quot;))">
            <text:p/>
          </table:table-cell>
          <table:table-cell table:formula="of:=IF([.BJ69]=&quot;x&quot;;&quot;x&quot;;IF([.BJ69]=&quot;-&quot;;&quot;-&quot;;&quot;&quot;))">
            <text:p/>
          </table:table-cell>
          <table:table-cell table:formula="of:=IF([.BK69]=&quot;x&quot;;&quot;x&quot;;IF([.BK69]=&quot;-&quot;;&quot;-&quot;;&quot;&quot;))">
            <text:p/>
          </table:table-cell>
          <table:table-cell table:formula="of:=IF([.BL69]=&quot;x&quot;;&quot;x&quot;;IF([.BL69]=&quot;-&quot;;&quot;-&quot;;&quot;&quot;))">
            <text:p/>
          </table:table-cell>
          <table:table-cell table:formula="of:=IF([.BM69]=&quot;x&quot;;&quot;x&quot;;IF([.BM69]=&quot;-&quot;;&quot;-&quot;;&quot;&quot;))">
            <text:p/>
          </table:table-cell>
          <table:table-cell table:formula="of:=IF([.BN69]=&quot;x&quot;;&quot;x&quot;;IF([.BN69]=&quot;-&quot;;&quot;-&quot;;&quot;&quot;))">
            <text:p/>
          </table:table-cell>
          <table:table-cell table:formula="of:=IF([.BO69]=&quot;x&quot;;&quot;x&quot;;IF([.BO69]=&quot;-&quot;;&quot;-&quot;;&quot;&quot;))">
            <text:p/>
          </table:table-cell>
          <table:table-cell table:formula="of:=IF([.BP69]=&quot;x&quot;;&quot;x&quot;;IF([.BP69]=&quot;-&quot;;&quot;-&quot;;&quot;&quot;))">
            <text:p/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9" calcext:value-type="float">
            <text:p>69</text:p>
          </table:table-cell>
          <table:table-cell table:style-name="ce7" office:value-type="string" calcext:value-type="string">
            <text:p>TST069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80" calcext:value-type="float">
            <text:p>13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0]=&quot;x&quot;;&quot;x&quot;;IF([.AS70]=&quot;-&quot;;&quot;-&quot;;&quot;&quot;))">
            <text:p/>
          </table:table-cell>
          <table:table-cell table:formula="of:=IF([.AT70]=&quot;x&quot;;&quot;x&quot;;IF([.AT70]=&quot;-&quot;;&quot;-&quot;;&quot;&quot;))">
            <text:p/>
          </table:table-cell>
          <table:table-cell table:formula="of:=IF([.AU70]=&quot;x&quot;;&quot;x&quot;;IF([.AU70]=&quot;-&quot;;&quot;-&quot;;&quot;&quot;))">
            <text:p/>
          </table:table-cell>
          <table:table-cell table:formula="of:=IF([.AV70]=&quot;x&quot;;&quot;x&quot;;IF([.AV70]=&quot;-&quot;;&quot;-&quot;;&quot;&quot;))">
            <text:p/>
          </table:table-cell>
          <table:table-cell table:formula="of:=IF([.AW70]=&quot;x&quot;;&quot;x&quot;;IF([.AW70]=&quot;-&quot;;&quot;-&quot;;&quot;&quot;))">
            <text:p/>
          </table:table-cell>
          <table:table-cell table:formula="of:=IF([.AX70]=&quot;x&quot;;&quot;x&quot;;IF([.AX70]=&quot;-&quot;;&quot;-&quot;;&quot;&quot;))" office:value-type="string" office:string-value="x" calcext:value-type="string">
            <text:p>x</text:p>
          </table:table-cell>
          <table:table-cell table:formula="of:=IF([.AY70]=&quot;x&quot;;&quot;x&quot;;IF([.AY70]=&quot;-&quot;;&quot;-&quot;;&quot;&quot;))">
            <text:p/>
          </table:table-cell>
          <table:table-cell table:formula="of:=IF([.AZ70]=&quot;x&quot;;&quot;x&quot;;IF([.AZ70]=&quot;-&quot;;&quot;-&quot;;&quot;&quot;))">
            <text:p/>
          </table:table-cell>
          <table:table-cell table:formula="of:=IF([.BA70]=&quot;x&quot;;&quot;x&quot;;IF([.BA70]=&quot;-&quot;;&quot;-&quot;;&quot;&quot;))">
            <text:p/>
          </table:table-cell>
          <table:table-cell table:formula="of:=IF([.BB70]=&quot;x&quot;;&quot;x&quot;;IF([.BB70]=&quot;-&quot;;&quot;-&quot;;&quot;&quot;))">
            <text:p/>
          </table:table-cell>
          <table:table-cell table:formula="of:=IF([.BC70]=&quot;x&quot;;&quot;x&quot;;IF([.BC70]=&quot;-&quot;;&quot;-&quot;;&quot;&quot;))">
            <text:p/>
          </table:table-cell>
          <table:table-cell table:formula="of:=IF([.BD70]=&quot;x&quot;;&quot;x&quot;;IF([.BD70]=&quot;-&quot;;&quot;-&quot;;&quot;&quot;))">
            <text:p/>
          </table:table-cell>
          <table:table-cell table:formula="of:=IF([.BE70]=&quot;x&quot;;&quot;x&quot;;IF([.BE70]=&quot;-&quot;;&quot;-&quot;;&quot;&quot;))">
            <text:p/>
          </table:table-cell>
          <table:table-cell table:formula="of:=IF([.BF70]=&quot;x&quot;;&quot;x&quot;;IF([.BF70]=&quot;-&quot;;&quot;-&quot;;&quot;&quot;))">
            <text:p/>
          </table:table-cell>
          <table:table-cell table:formula="of:=IF([.BG70]=&quot;x&quot;;&quot;x&quot;;IF([.BG70]=&quot;-&quot;;&quot;-&quot;;&quot;&quot;))">
            <text:p/>
          </table:table-cell>
          <table:table-cell table:formula="of:=IF([.BH70]=&quot;x&quot;;&quot;x&quot;;IF([.BH70]=&quot;-&quot;;&quot;-&quot;;&quot;&quot;))">
            <text:p/>
          </table:table-cell>
          <table:table-cell table:formula="of:=IF([.BI70]=&quot;x&quot;;&quot;x&quot;;IF([.BI70]=&quot;-&quot;;&quot;-&quot;;&quot;&quot;))">
            <text:p/>
          </table:table-cell>
          <table:table-cell table:formula="of:=IF([.BJ70]=&quot;x&quot;;&quot;x&quot;;IF([.BJ70]=&quot;-&quot;;&quot;-&quot;;&quot;&quot;))">
            <text:p/>
          </table:table-cell>
          <table:table-cell table:formula="of:=IF([.BK70]=&quot;x&quot;;&quot;x&quot;;IF([.BK70]=&quot;-&quot;;&quot;-&quot;;&quot;&quot;))">
            <text:p/>
          </table:table-cell>
          <table:table-cell table:formula="of:=IF([.BL70]=&quot;x&quot;;&quot;x&quot;;IF([.BL70]=&quot;-&quot;;&quot;-&quot;;&quot;&quot;))">
            <text:p/>
          </table:table-cell>
          <table:table-cell table:formula="of:=IF([.BM70]=&quot;x&quot;;&quot;x&quot;;IF([.BM70]=&quot;-&quot;;&quot;-&quot;;&quot;&quot;))">
            <text:p/>
          </table:table-cell>
          <table:table-cell table:formula="of:=IF([.BN70]=&quot;x&quot;;&quot;x&quot;;IF([.BN70]=&quot;-&quot;;&quot;-&quot;;&quot;&quot;))">
            <text:p/>
          </table:table-cell>
          <table:table-cell table:formula="of:=IF([.BO70]=&quot;x&quot;;&quot;x&quot;;IF([.BO70]=&quot;-&quot;;&quot;-&quot;;&quot;&quot;))">
            <text:p/>
          </table:table-cell>
          <table:table-cell table:formula="of:=IF([.BP70]=&quot;x&quot;;&quot;x&quot;;IF([.BP70]=&quot;-&quot;;&quot;-&quot;;&quot;&quot;))">
            <text:p/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0" calcext:value-type="float">
            <text:p>70</text:p>
          </table:table-cell>
          <table:table-cell table:style-name="ce7" office:value-type="string" calcext:value-type="string">
            <text:p>TST070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00" calcext:value-type="float">
            <text:p>1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1]=&quot;x&quot;;&quot;x&quot;;IF([.AS71]=&quot;-&quot;;&quot;-&quot;;&quot;&quot;))">
            <text:p/>
          </table:table-cell>
          <table:table-cell table:formula="of:=IF([.AT71]=&quot;x&quot;;&quot;x&quot;;IF([.AT71]=&quot;-&quot;;&quot;-&quot;;&quot;&quot;))">
            <text:p/>
          </table:table-cell>
          <table:table-cell table:formula="of:=IF([.AU71]=&quot;x&quot;;&quot;x&quot;;IF([.AU71]=&quot;-&quot;;&quot;-&quot;;&quot;&quot;))">
            <text:p/>
          </table:table-cell>
          <table:table-cell table:formula="of:=IF([.AV71]=&quot;x&quot;;&quot;x&quot;;IF([.AV71]=&quot;-&quot;;&quot;-&quot;;&quot;&quot;))">
            <text:p/>
          </table:table-cell>
          <table:table-cell table:formula="of:=IF([.AW71]=&quot;x&quot;;&quot;x&quot;;IF([.AW71]=&quot;-&quot;;&quot;-&quot;;&quot;&quot;))">
            <text:p/>
          </table:table-cell>
          <table:table-cell table:formula="of:=IF([.AX71]=&quot;x&quot;;&quot;x&quot;;IF([.AX71]=&quot;-&quot;;&quot;-&quot;;&quot;&quot;))" office:value-type="string" office:string-value="x" calcext:value-type="string">
            <text:p>x</text:p>
          </table:table-cell>
          <table:table-cell table:formula="of:=IF([.AY71]=&quot;x&quot;;&quot;x&quot;;IF([.AY71]=&quot;-&quot;;&quot;-&quot;;&quot;&quot;))">
            <text:p/>
          </table:table-cell>
          <table:table-cell table:formula="of:=IF([.AZ71]=&quot;x&quot;;&quot;x&quot;;IF([.AZ71]=&quot;-&quot;;&quot;-&quot;;&quot;&quot;))">
            <text:p/>
          </table:table-cell>
          <table:table-cell table:formula="of:=IF([.BA71]=&quot;x&quot;;&quot;x&quot;;IF([.BA71]=&quot;-&quot;;&quot;-&quot;;&quot;&quot;))">
            <text:p/>
          </table:table-cell>
          <table:table-cell table:formula="of:=IF([.BB71]=&quot;x&quot;;&quot;x&quot;;IF([.BB71]=&quot;-&quot;;&quot;-&quot;;&quot;&quot;))">
            <text:p/>
          </table:table-cell>
          <table:table-cell table:formula="of:=IF([.BC71]=&quot;x&quot;;&quot;x&quot;;IF([.BC71]=&quot;-&quot;;&quot;-&quot;;&quot;&quot;))">
            <text:p/>
          </table:table-cell>
          <table:table-cell table:formula="of:=IF([.BD71]=&quot;x&quot;;&quot;x&quot;;IF([.BD71]=&quot;-&quot;;&quot;-&quot;;&quot;&quot;))">
            <text:p/>
          </table:table-cell>
          <table:table-cell table:formula="of:=IF([.BE71]=&quot;x&quot;;&quot;x&quot;;IF([.BE71]=&quot;-&quot;;&quot;-&quot;;&quot;&quot;))">
            <text:p/>
          </table:table-cell>
          <table:table-cell table:formula="of:=IF([.BF71]=&quot;x&quot;;&quot;x&quot;;IF([.BF71]=&quot;-&quot;;&quot;-&quot;;&quot;&quot;))">
            <text:p/>
          </table:table-cell>
          <table:table-cell table:formula="of:=IF([.BG71]=&quot;x&quot;;&quot;x&quot;;IF([.BG71]=&quot;-&quot;;&quot;-&quot;;&quot;&quot;))">
            <text:p/>
          </table:table-cell>
          <table:table-cell table:formula="of:=IF([.BH71]=&quot;x&quot;;&quot;x&quot;;IF([.BH71]=&quot;-&quot;;&quot;-&quot;;&quot;&quot;))">
            <text:p/>
          </table:table-cell>
          <table:table-cell table:formula="of:=IF([.BI71]=&quot;x&quot;;&quot;x&quot;;IF([.BI71]=&quot;-&quot;;&quot;-&quot;;&quot;&quot;))">
            <text:p/>
          </table:table-cell>
          <table:table-cell table:formula="of:=IF([.BJ71]=&quot;x&quot;;&quot;x&quot;;IF([.BJ71]=&quot;-&quot;;&quot;-&quot;;&quot;&quot;))">
            <text:p/>
          </table:table-cell>
          <table:table-cell table:formula="of:=IF([.BK71]=&quot;x&quot;;&quot;x&quot;;IF([.BK71]=&quot;-&quot;;&quot;-&quot;;&quot;&quot;))">
            <text:p/>
          </table:table-cell>
          <table:table-cell table:formula="of:=IF([.BL71]=&quot;x&quot;;&quot;x&quot;;IF([.BL71]=&quot;-&quot;;&quot;-&quot;;&quot;&quot;))">
            <text:p/>
          </table:table-cell>
          <table:table-cell table:formula="of:=IF([.BM71]=&quot;x&quot;;&quot;x&quot;;IF([.BM71]=&quot;-&quot;;&quot;-&quot;;&quot;&quot;))">
            <text:p/>
          </table:table-cell>
          <table:table-cell table:formula="of:=IF([.BN71]=&quot;x&quot;;&quot;x&quot;;IF([.BN71]=&quot;-&quot;;&quot;-&quot;;&quot;&quot;))">
            <text:p/>
          </table:table-cell>
          <table:table-cell table:formula="of:=IF([.BO71]=&quot;x&quot;;&quot;x&quot;;IF([.BO71]=&quot;-&quot;;&quot;-&quot;;&quot;&quot;))">
            <text:p/>
          </table:table-cell>
          <table:table-cell table:formula="of:=IF([.BP71]=&quot;x&quot;;&quot;x&quot;;IF([.BP71]=&quot;-&quot;;&quot;-&quot;;&quot;&quot;))">
            <text:p/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1" calcext:value-type="float">
            <text:p>71</text:p>
          </table:table-cell>
          <table:table-cell table:style-name="ce7" office:value-type="string" calcext:value-type="string">
            <text:p>TST07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20" calcext:value-type="float">
            <text:p>14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2]=&quot;x&quot;;&quot;x&quot;;IF([.AS72]=&quot;-&quot;;&quot;-&quot;;&quot;&quot;))">
            <text:p/>
          </table:table-cell>
          <table:table-cell table:formula="of:=IF([.AT72]=&quot;x&quot;;&quot;x&quot;;IF([.AT72]=&quot;-&quot;;&quot;-&quot;;&quot;&quot;))">
            <text:p/>
          </table:table-cell>
          <table:table-cell table:formula="of:=IF([.AU72]=&quot;x&quot;;&quot;x&quot;;IF([.AU72]=&quot;-&quot;;&quot;-&quot;;&quot;&quot;))">
            <text:p/>
          </table:table-cell>
          <table:table-cell table:formula="of:=IF([.AV72]=&quot;x&quot;;&quot;x&quot;;IF([.AV72]=&quot;-&quot;;&quot;-&quot;;&quot;&quot;))">
            <text:p/>
          </table:table-cell>
          <table:table-cell table:formula="of:=IF([.AW72]=&quot;x&quot;;&quot;x&quot;;IF([.AW72]=&quot;-&quot;;&quot;-&quot;;&quot;&quot;))">
            <text:p/>
          </table:table-cell>
          <table:table-cell table:formula="of:=IF([.AX72]=&quot;x&quot;;&quot;x&quot;;IF([.AX72]=&quot;-&quot;;&quot;-&quot;;&quot;&quot;))" office:value-type="string" office:string-value="x" calcext:value-type="string">
            <text:p>x</text:p>
          </table:table-cell>
          <table:table-cell table:formula="of:=IF([.AY72]=&quot;x&quot;;&quot;x&quot;;IF([.AY72]=&quot;-&quot;;&quot;-&quot;;&quot;&quot;))">
            <text:p/>
          </table:table-cell>
          <table:table-cell table:formula="of:=IF([.AZ72]=&quot;x&quot;;&quot;x&quot;;IF([.AZ72]=&quot;-&quot;;&quot;-&quot;;&quot;&quot;))">
            <text:p/>
          </table:table-cell>
          <table:table-cell table:formula="of:=IF([.BA72]=&quot;x&quot;;&quot;x&quot;;IF([.BA72]=&quot;-&quot;;&quot;-&quot;;&quot;&quot;))">
            <text:p/>
          </table:table-cell>
          <table:table-cell table:formula="of:=IF([.BB72]=&quot;x&quot;;&quot;x&quot;;IF([.BB72]=&quot;-&quot;;&quot;-&quot;;&quot;&quot;))">
            <text:p/>
          </table:table-cell>
          <table:table-cell table:formula="of:=IF([.BC72]=&quot;x&quot;;&quot;x&quot;;IF([.BC72]=&quot;-&quot;;&quot;-&quot;;&quot;&quot;))">
            <text:p/>
          </table:table-cell>
          <table:table-cell table:formula="of:=IF([.BD72]=&quot;x&quot;;&quot;x&quot;;IF([.BD72]=&quot;-&quot;;&quot;-&quot;;&quot;&quot;))">
            <text:p/>
          </table:table-cell>
          <table:table-cell table:formula="of:=IF([.BE72]=&quot;x&quot;;&quot;x&quot;;IF([.BE72]=&quot;-&quot;;&quot;-&quot;;&quot;&quot;))">
            <text:p/>
          </table:table-cell>
          <table:table-cell table:formula="of:=IF([.BF72]=&quot;x&quot;;&quot;x&quot;;IF([.BF72]=&quot;-&quot;;&quot;-&quot;;&quot;&quot;))">
            <text:p/>
          </table:table-cell>
          <table:table-cell table:formula="of:=IF([.BG72]=&quot;x&quot;;&quot;x&quot;;IF([.BG72]=&quot;-&quot;;&quot;-&quot;;&quot;&quot;))">
            <text:p/>
          </table:table-cell>
          <table:table-cell table:formula="of:=IF([.BH72]=&quot;x&quot;;&quot;x&quot;;IF([.BH72]=&quot;-&quot;;&quot;-&quot;;&quot;&quot;))">
            <text:p/>
          </table:table-cell>
          <table:table-cell table:formula="of:=IF([.BI72]=&quot;x&quot;;&quot;x&quot;;IF([.BI72]=&quot;-&quot;;&quot;-&quot;;&quot;&quot;))">
            <text:p/>
          </table:table-cell>
          <table:table-cell table:formula="of:=IF([.BJ72]=&quot;x&quot;;&quot;x&quot;;IF([.BJ72]=&quot;-&quot;;&quot;-&quot;;&quot;&quot;))">
            <text:p/>
          </table:table-cell>
          <table:table-cell table:formula="of:=IF([.BK72]=&quot;x&quot;;&quot;x&quot;;IF([.BK72]=&quot;-&quot;;&quot;-&quot;;&quot;&quot;))">
            <text:p/>
          </table:table-cell>
          <table:table-cell table:formula="of:=IF([.BL72]=&quot;x&quot;;&quot;x&quot;;IF([.BL72]=&quot;-&quot;;&quot;-&quot;;&quot;&quot;))">
            <text:p/>
          </table:table-cell>
          <table:table-cell table:formula="of:=IF([.BM72]=&quot;x&quot;;&quot;x&quot;;IF([.BM72]=&quot;-&quot;;&quot;-&quot;;&quot;&quot;))">
            <text:p/>
          </table:table-cell>
          <table:table-cell table:formula="of:=IF([.BN72]=&quot;x&quot;;&quot;x&quot;;IF([.BN72]=&quot;-&quot;;&quot;-&quot;;&quot;&quot;))">
            <text:p/>
          </table:table-cell>
          <table:table-cell table:formula="of:=IF([.BO72]=&quot;x&quot;;&quot;x&quot;;IF([.BO72]=&quot;-&quot;;&quot;-&quot;;&quot;&quot;))">
            <text:p/>
          </table:table-cell>
          <table:table-cell table:formula="of:=IF([.BP72]=&quot;x&quot;;&quot;x&quot;;IF([.BP72]=&quot;-&quot;;&quot;-&quot;;&quot;&quot;))">
            <text:p/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2" calcext:value-type="float">
            <text:p>72</text:p>
          </table:table-cell>
          <table:table-cell table:style-name="ce7" office:value-type="string" calcext:value-type="string">
            <text:p>TST07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40" calcext:value-type="float">
            <text:p>1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3]=&quot;x&quot;;&quot;x&quot;;IF([.AS73]=&quot;-&quot;;&quot;-&quot;;&quot;&quot;))">
            <text:p/>
          </table:table-cell>
          <table:table-cell table:formula="of:=IF([.AT73]=&quot;x&quot;;&quot;x&quot;;IF([.AT73]=&quot;-&quot;;&quot;-&quot;;&quot;&quot;))">
            <text:p/>
          </table:table-cell>
          <table:table-cell table:formula="of:=IF([.AU73]=&quot;x&quot;;&quot;x&quot;;IF([.AU73]=&quot;-&quot;;&quot;-&quot;;&quot;&quot;))">
            <text:p/>
          </table:table-cell>
          <table:table-cell table:formula="of:=IF([.AV73]=&quot;x&quot;;&quot;x&quot;;IF([.AV73]=&quot;-&quot;;&quot;-&quot;;&quot;&quot;))">
            <text:p/>
          </table:table-cell>
          <table:table-cell table:formula="of:=IF([.AW73]=&quot;x&quot;;&quot;x&quot;;IF([.AW73]=&quot;-&quot;;&quot;-&quot;;&quot;&quot;))">
            <text:p/>
          </table:table-cell>
          <table:table-cell table:formula="of:=IF([.AX73]=&quot;x&quot;;&quot;x&quot;;IF([.AX73]=&quot;-&quot;;&quot;-&quot;;&quot;&quot;))" office:value-type="string" office:string-value="x" calcext:value-type="string">
            <text:p>x</text:p>
          </table:table-cell>
          <table:table-cell table:formula="of:=IF([.AY73]=&quot;x&quot;;&quot;x&quot;;IF([.AY73]=&quot;-&quot;;&quot;-&quot;;&quot;&quot;))">
            <text:p/>
          </table:table-cell>
          <table:table-cell table:formula="of:=IF([.AZ73]=&quot;x&quot;;&quot;x&quot;;IF([.AZ73]=&quot;-&quot;;&quot;-&quot;;&quot;&quot;))">
            <text:p/>
          </table:table-cell>
          <table:table-cell table:formula="of:=IF([.BA73]=&quot;x&quot;;&quot;x&quot;;IF([.BA73]=&quot;-&quot;;&quot;-&quot;;&quot;&quot;))">
            <text:p/>
          </table:table-cell>
          <table:table-cell table:formula="of:=IF([.BB73]=&quot;x&quot;;&quot;x&quot;;IF([.BB73]=&quot;-&quot;;&quot;-&quot;;&quot;&quot;))">
            <text:p/>
          </table:table-cell>
          <table:table-cell table:formula="of:=IF([.BC73]=&quot;x&quot;;&quot;x&quot;;IF([.BC73]=&quot;-&quot;;&quot;-&quot;;&quot;&quot;))">
            <text:p/>
          </table:table-cell>
          <table:table-cell table:formula="of:=IF([.BD73]=&quot;x&quot;;&quot;x&quot;;IF([.BD73]=&quot;-&quot;;&quot;-&quot;;&quot;&quot;))">
            <text:p/>
          </table:table-cell>
          <table:table-cell table:formula="of:=IF([.BE73]=&quot;x&quot;;&quot;x&quot;;IF([.BE73]=&quot;-&quot;;&quot;-&quot;;&quot;&quot;))">
            <text:p/>
          </table:table-cell>
          <table:table-cell table:formula="of:=IF([.BF73]=&quot;x&quot;;&quot;x&quot;;IF([.BF73]=&quot;-&quot;;&quot;-&quot;;&quot;&quot;))">
            <text:p/>
          </table:table-cell>
          <table:table-cell table:formula="of:=IF([.BG73]=&quot;x&quot;;&quot;x&quot;;IF([.BG73]=&quot;-&quot;;&quot;-&quot;;&quot;&quot;))">
            <text:p/>
          </table:table-cell>
          <table:table-cell table:formula="of:=IF([.BH73]=&quot;x&quot;;&quot;x&quot;;IF([.BH73]=&quot;-&quot;;&quot;-&quot;;&quot;&quot;))">
            <text:p/>
          </table:table-cell>
          <table:table-cell table:formula="of:=IF([.BI73]=&quot;x&quot;;&quot;x&quot;;IF([.BI73]=&quot;-&quot;;&quot;-&quot;;&quot;&quot;))">
            <text:p/>
          </table:table-cell>
          <table:table-cell table:formula="of:=IF([.BJ73]=&quot;x&quot;;&quot;x&quot;;IF([.BJ73]=&quot;-&quot;;&quot;-&quot;;&quot;&quot;))">
            <text:p/>
          </table:table-cell>
          <table:table-cell table:formula="of:=IF([.BK73]=&quot;x&quot;;&quot;x&quot;;IF([.BK73]=&quot;-&quot;;&quot;-&quot;;&quot;&quot;))">
            <text:p/>
          </table:table-cell>
          <table:table-cell table:formula="of:=IF([.BL73]=&quot;x&quot;;&quot;x&quot;;IF([.BL73]=&quot;-&quot;;&quot;-&quot;;&quot;&quot;))">
            <text:p/>
          </table:table-cell>
          <table:table-cell table:formula="of:=IF([.BM73]=&quot;x&quot;;&quot;x&quot;;IF([.BM73]=&quot;-&quot;;&quot;-&quot;;&quot;&quot;))">
            <text:p/>
          </table:table-cell>
          <table:table-cell table:formula="of:=IF([.BN73]=&quot;x&quot;;&quot;x&quot;;IF([.BN73]=&quot;-&quot;;&quot;-&quot;;&quot;&quot;))">
            <text:p/>
          </table:table-cell>
          <table:table-cell table:formula="of:=IF([.BO73]=&quot;x&quot;;&quot;x&quot;;IF([.BO73]=&quot;-&quot;;&quot;-&quot;;&quot;&quot;))">
            <text:p/>
          </table:table-cell>
          <table:table-cell table:formula="of:=IF([.BP73]=&quot;x&quot;;&quot;x&quot;;IF([.BP73]=&quot;-&quot;;&quot;-&quot;;&quot;&quot;))">
            <text:p/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string" calcext:value-type="string">
            <text:p>TST073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60" calcext:value-type="float">
            <text:p>14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4]=&quot;x&quot;;&quot;x&quot;;IF([.AS74]=&quot;-&quot;;&quot;-&quot;;&quot;&quot;))">
            <text:p/>
          </table:table-cell>
          <table:table-cell table:formula="of:=IF([.AT74]=&quot;x&quot;;&quot;x&quot;;IF([.AT74]=&quot;-&quot;;&quot;-&quot;;&quot;&quot;))">
            <text:p/>
          </table:table-cell>
          <table:table-cell table:formula="of:=IF([.AU74]=&quot;x&quot;;&quot;x&quot;;IF([.AU74]=&quot;-&quot;;&quot;-&quot;;&quot;&quot;))">
            <text:p/>
          </table:table-cell>
          <table:table-cell table:formula="of:=IF([.AV74]=&quot;x&quot;;&quot;x&quot;;IF([.AV74]=&quot;-&quot;;&quot;-&quot;;&quot;&quot;))">
            <text:p/>
          </table:table-cell>
          <table:table-cell table:formula="of:=IF([.AW74]=&quot;x&quot;;&quot;x&quot;;IF([.AW74]=&quot;-&quot;;&quot;-&quot;;&quot;&quot;))">
            <text:p/>
          </table:table-cell>
          <table:table-cell table:formula="of:=IF([.AX74]=&quot;x&quot;;&quot;x&quot;;IF([.AX74]=&quot;-&quot;;&quot;-&quot;;&quot;&quot;))">
            <text:p/>
          </table:table-cell>
          <table:table-cell table:formula="of:=IF([.AY74]=&quot;x&quot;;&quot;x&quot;;IF([.AY74]=&quot;-&quot;;&quot;-&quot;;&quot;&quot;))" office:value-type="string" office:string-value="x" calcext:value-type="string">
            <text:p>x</text:p>
          </table:table-cell>
          <table:table-cell table:formula="of:=IF([.AZ74]=&quot;x&quot;;&quot;x&quot;;IF([.AZ74]=&quot;-&quot;;&quot;-&quot;;&quot;&quot;))">
            <text:p/>
          </table:table-cell>
          <table:table-cell table:formula="of:=IF([.BA74]=&quot;x&quot;;&quot;x&quot;;IF([.BA74]=&quot;-&quot;;&quot;-&quot;;&quot;&quot;))">
            <text:p/>
          </table:table-cell>
          <table:table-cell table:formula="of:=IF([.BB74]=&quot;x&quot;;&quot;x&quot;;IF([.BB74]=&quot;-&quot;;&quot;-&quot;;&quot;&quot;))">
            <text:p/>
          </table:table-cell>
          <table:table-cell table:formula="of:=IF([.BC74]=&quot;x&quot;;&quot;x&quot;;IF([.BC74]=&quot;-&quot;;&quot;-&quot;;&quot;&quot;))">
            <text:p/>
          </table:table-cell>
          <table:table-cell table:formula="of:=IF([.BD74]=&quot;x&quot;;&quot;x&quot;;IF([.BD74]=&quot;-&quot;;&quot;-&quot;;&quot;&quot;))">
            <text:p/>
          </table:table-cell>
          <table:table-cell table:formula="of:=IF([.BE74]=&quot;x&quot;;&quot;x&quot;;IF([.BE74]=&quot;-&quot;;&quot;-&quot;;&quot;&quot;))">
            <text:p/>
          </table:table-cell>
          <table:table-cell table:formula="of:=IF([.BF74]=&quot;x&quot;;&quot;x&quot;;IF([.BF74]=&quot;-&quot;;&quot;-&quot;;&quot;&quot;))">
            <text:p/>
          </table:table-cell>
          <table:table-cell table:formula="of:=IF([.BG74]=&quot;x&quot;;&quot;x&quot;;IF([.BG74]=&quot;-&quot;;&quot;-&quot;;&quot;&quot;))">
            <text:p/>
          </table:table-cell>
          <table:table-cell table:formula="of:=IF([.BH74]=&quot;x&quot;;&quot;x&quot;;IF([.BH74]=&quot;-&quot;;&quot;-&quot;;&quot;&quot;))">
            <text:p/>
          </table:table-cell>
          <table:table-cell table:formula="of:=IF([.BI74]=&quot;x&quot;;&quot;x&quot;;IF([.BI74]=&quot;-&quot;;&quot;-&quot;;&quot;&quot;))">
            <text:p/>
          </table:table-cell>
          <table:table-cell table:formula="of:=IF([.BJ74]=&quot;x&quot;;&quot;x&quot;;IF([.BJ74]=&quot;-&quot;;&quot;-&quot;;&quot;&quot;))">
            <text:p/>
          </table:table-cell>
          <table:table-cell table:formula="of:=IF([.BK74]=&quot;x&quot;;&quot;x&quot;;IF([.BK74]=&quot;-&quot;;&quot;-&quot;;&quot;&quot;))">
            <text:p/>
          </table:table-cell>
          <table:table-cell table:formula="of:=IF([.BL74]=&quot;x&quot;;&quot;x&quot;;IF([.BL74]=&quot;-&quot;;&quot;-&quot;;&quot;&quot;))">
            <text:p/>
          </table:table-cell>
          <table:table-cell table:formula="of:=IF([.BM74]=&quot;x&quot;;&quot;x&quot;;IF([.BM74]=&quot;-&quot;;&quot;-&quot;;&quot;&quot;))">
            <text:p/>
          </table:table-cell>
          <table:table-cell table:formula="of:=IF([.BN74]=&quot;x&quot;;&quot;x&quot;;IF([.BN74]=&quot;-&quot;;&quot;-&quot;;&quot;&quot;))">
            <text:p/>
          </table:table-cell>
          <table:table-cell table:formula="of:=IF([.BO74]=&quot;x&quot;;&quot;x&quot;;IF([.BO74]=&quot;-&quot;;&quot;-&quot;;&quot;&quot;))">
            <text:p/>
          </table:table-cell>
          <table:table-cell table:formula="of:=IF([.BP74]=&quot;x&quot;;&quot;x&quot;;IF([.BP74]=&quot;-&quot;;&quot;-&quot;;&quot;&quot;))">
            <text:p/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TST074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80" calcext:value-type="float">
            <text:p>1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5]=&quot;x&quot;;&quot;x&quot;;IF([.AS75]=&quot;-&quot;;&quot;-&quot;;&quot;&quot;))">
            <text:p/>
          </table:table-cell>
          <table:table-cell table:formula="of:=IF([.AT75]=&quot;x&quot;;&quot;x&quot;;IF([.AT75]=&quot;-&quot;;&quot;-&quot;;&quot;&quot;))">
            <text:p/>
          </table:table-cell>
          <table:table-cell table:formula="of:=IF([.AU75]=&quot;x&quot;;&quot;x&quot;;IF([.AU75]=&quot;-&quot;;&quot;-&quot;;&quot;&quot;))">
            <text:p/>
          </table:table-cell>
          <table:table-cell table:formula="of:=IF([.AV75]=&quot;x&quot;;&quot;x&quot;;IF([.AV75]=&quot;-&quot;;&quot;-&quot;;&quot;&quot;))">
            <text:p/>
          </table:table-cell>
          <table:table-cell table:formula="of:=IF([.AW75]=&quot;x&quot;;&quot;x&quot;;IF([.AW75]=&quot;-&quot;;&quot;-&quot;;&quot;&quot;))">
            <text:p/>
          </table:table-cell>
          <table:table-cell table:formula="of:=IF([.AX75]=&quot;x&quot;;&quot;x&quot;;IF([.AX75]=&quot;-&quot;;&quot;-&quot;;&quot;&quot;))">
            <text:p/>
          </table:table-cell>
          <table:table-cell table:formula="of:=IF([.AY75]=&quot;x&quot;;&quot;x&quot;;IF([.AY75]=&quot;-&quot;;&quot;-&quot;;&quot;&quot;))" office:value-type="string" office:string-value="x" calcext:value-type="string">
            <text:p>x</text:p>
          </table:table-cell>
          <table:table-cell table:formula="of:=IF([.AZ75]=&quot;x&quot;;&quot;x&quot;;IF([.AZ75]=&quot;-&quot;;&quot;-&quot;;&quot;&quot;))">
            <text:p/>
          </table:table-cell>
          <table:table-cell table:formula="of:=IF([.BA75]=&quot;x&quot;;&quot;x&quot;;IF([.BA75]=&quot;-&quot;;&quot;-&quot;;&quot;&quot;))">
            <text:p/>
          </table:table-cell>
          <table:table-cell table:formula="of:=IF([.BB75]=&quot;x&quot;;&quot;x&quot;;IF([.BB75]=&quot;-&quot;;&quot;-&quot;;&quot;&quot;))">
            <text:p/>
          </table:table-cell>
          <table:table-cell table:formula="of:=IF([.BC75]=&quot;x&quot;;&quot;x&quot;;IF([.BC75]=&quot;-&quot;;&quot;-&quot;;&quot;&quot;))">
            <text:p/>
          </table:table-cell>
          <table:table-cell table:formula="of:=IF([.BD75]=&quot;x&quot;;&quot;x&quot;;IF([.BD75]=&quot;-&quot;;&quot;-&quot;;&quot;&quot;))">
            <text:p/>
          </table:table-cell>
          <table:table-cell table:formula="of:=IF([.BE75]=&quot;x&quot;;&quot;x&quot;;IF([.BE75]=&quot;-&quot;;&quot;-&quot;;&quot;&quot;))">
            <text:p/>
          </table:table-cell>
          <table:table-cell table:formula="of:=IF([.BF75]=&quot;x&quot;;&quot;x&quot;;IF([.BF75]=&quot;-&quot;;&quot;-&quot;;&quot;&quot;))">
            <text:p/>
          </table:table-cell>
          <table:table-cell table:formula="of:=IF([.BG75]=&quot;x&quot;;&quot;x&quot;;IF([.BG75]=&quot;-&quot;;&quot;-&quot;;&quot;&quot;))">
            <text:p/>
          </table:table-cell>
          <table:table-cell table:formula="of:=IF([.BH75]=&quot;x&quot;;&quot;x&quot;;IF([.BH75]=&quot;-&quot;;&quot;-&quot;;&quot;&quot;))">
            <text:p/>
          </table:table-cell>
          <table:table-cell table:formula="of:=IF([.BI75]=&quot;x&quot;;&quot;x&quot;;IF([.BI75]=&quot;-&quot;;&quot;-&quot;;&quot;&quot;))">
            <text:p/>
          </table:table-cell>
          <table:table-cell table:formula="of:=IF([.BJ75]=&quot;x&quot;;&quot;x&quot;;IF([.BJ75]=&quot;-&quot;;&quot;-&quot;;&quot;&quot;))">
            <text:p/>
          </table:table-cell>
          <table:table-cell table:formula="of:=IF([.BK75]=&quot;x&quot;;&quot;x&quot;;IF([.BK75]=&quot;-&quot;;&quot;-&quot;;&quot;&quot;))">
            <text:p/>
          </table:table-cell>
          <table:table-cell table:formula="of:=IF([.BL75]=&quot;x&quot;;&quot;x&quot;;IF([.BL75]=&quot;-&quot;;&quot;-&quot;;&quot;&quot;))">
            <text:p/>
          </table:table-cell>
          <table:table-cell table:formula="of:=IF([.BM75]=&quot;x&quot;;&quot;x&quot;;IF([.BM75]=&quot;-&quot;;&quot;-&quot;;&quot;&quot;))">
            <text:p/>
          </table:table-cell>
          <table:table-cell table:formula="of:=IF([.BN75]=&quot;x&quot;;&quot;x&quot;;IF([.BN75]=&quot;-&quot;;&quot;-&quot;;&quot;&quot;))">
            <text:p/>
          </table:table-cell>
          <table:table-cell table:formula="of:=IF([.BO75]=&quot;x&quot;;&quot;x&quot;;IF([.BO75]=&quot;-&quot;;&quot;-&quot;;&quot;&quot;))">
            <text:p/>
          </table:table-cell>
          <table:table-cell table:formula="of:=IF([.BP75]=&quot;x&quot;;&quot;x&quot;;IF([.BP75]=&quot;-&quot;;&quot;-&quot;;&quot;&quot;))">
            <text:p/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5" calcext:value-type="float">
            <text:p>75</text:p>
          </table:table-cell>
          <table:table-cell table:style-name="ce7" office:value-type="string" calcext:value-type="string">
            <text:p>TST075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00" calcext:value-type="float">
            <text:p>15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6]=&quot;x&quot;;&quot;x&quot;;IF([.AS76]=&quot;-&quot;;&quot;-&quot;;&quot;&quot;))">
            <text:p/>
          </table:table-cell>
          <table:table-cell table:formula="of:=IF([.AT76]=&quot;x&quot;;&quot;x&quot;;IF([.AT76]=&quot;-&quot;;&quot;-&quot;;&quot;&quot;))">
            <text:p/>
          </table:table-cell>
          <table:table-cell table:formula="of:=IF([.AU76]=&quot;x&quot;;&quot;x&quot;;IF([.AU76]=&quot;-&quot;;&quot;-&quot;;&quot;&quot;))">
            <text:p/>
          </table:table-cell>
          <table:table-cell table:formula="of:=IF([.AV76]=&quot;x&quot;;&quot;x&quot;;IF([.AV76]=&quot;-&quot;;&quot;-&quot;;&quot;&quot;))">
            <text:p/>
          </table:table-cell>
          <table:table-cell table:formula="of:=IF([.AW76]=&quot;x&quot;;&quot;x&quot;;IF([.AW76]=&quot;-&quot;;&quot;-&quot;;&quot;&quot;))">
            <text:p/>
          </table:table-cell>
          <table:table-cell table:formula="of:=IF([.AX76]=&quot;x&quot;;&quot;x&quot;;IF([.AX76]=&quot;-&quot;;&quot;-&quot;;&quot;&quot;))">
            <text:p/>
          </table:table-cell>
          <table:table-cell table:formula="of:=IF([.AY76]=&quot;x&quot;;&quot;x&quot;;IF([.AY76]=&quot;-&quot;;&quot;-&quot;;&quot;&quot;))" office:value-type="string" office:string-value="x" calcext:value-type="string">
            <text:p>x</text:p>
          </table:table-cell>
          <table:table-cell table:formula="of:=IF([.AZ76]=&quot;x&quot;;&quot;x&quot;;IF([.AZ76]=&quot;-&quot;;&quot;-&quot;;&quot;&quot;))">
            <text:p/>
          </table:table-cell>
          <table:table-cell table:formula="of:=IF([.BA76]=&quot;x&quot;;&quot;x&quot;;IF([.BA76]=&quot;-&quot;;&quot;-&quot;;&quot;&quot;))">
            <text:p/>
          </table:table-cell>
          <table:table-cell table:formula="of:=IF([.BB76]=&quot;x&quot;;&quot;x&quot;;IF([.BB76]=&quot;-&quot;;&quot;-&quot;;&quot;&quot;))">
            <text:p/>
          </table:table-cell>
          <table:table-cell table:formula="of:=IF([.BC76]=&quot;x&quot;;&quot;x&quot;;IF([.BC76]=&quot;-&quot;;&quot;-&quot;;&quot;&quot;))">
            <text:p/>
          </table:table-cell>
          <table:table-cell table:formula="of:=IF([.BD76]=&quot;x&quot;;&quot;x&quot;;IF([.BD76]=&quot;-&quot;;&quot;-&quot;;&quot;&quot;))">
            <text:p/>
          </table:table-cell>
          <table:table-cell table:formula="of:=IF([.BE76]=&quot;x&quot;;&quot;x&quot;;IF([.BE76]=&quot;-&quot;;&quot;-&quot;;&quot;&quot;))">
            <text:p/>
          </table:table-cell>
          <table:table-cell table:formula="of:=IF([.BF76]=&quot;x&quot;;&quot;x&quot;;IF([.BF76]=&quot;-&quot;;&quot;-&quot;;&quot;&quot;))">
            <text:p/>
          </table:table-cell>
          <table:table-cell table:formula="of:=IF([.BG76]=&quot;x&quot;;&quot;x&quot;;IF([.BG76]=&quot;-&quot;;&quot;-&quot;;&quot;&quot;))">
            <text:p/>
          </table:table-cell>
          <table:table-cell table:formula="of:=IF([.BH76]=&quot;x&quot;;&quot;x&quot;;IF([.BH76]=&quot;-&quot;;&quot;-&quot;;&quot;&quot;))">
            <text:p/>
          </table:table-cell>
          <table:table-cell table:formula="of:=IF([.BI76]=&quot;x&quot;;&quot;x&quot;;IF([.BI76]=&quot;-&quot;;&quot;-&quot;;&quot;&quot;))">
            <text:p/>
          </table:table-cell>
          <table:table-cell table:formula="of:=IF([.BJ76]=&quot;x&quot;;&quot;x&quot;;IF([.BJ76]=&quot;-&quot;;&quot;-&quot;;&quot;&quot;))">
            <text:p/>
          </table:table-cell>
          <table:table-cell table:formula="of:=IF([.BK76]=&quot;x&quot;;&quot;x&quot;;IF([.BK76]=&quot;-&quot;;&quot;-&quot;;&quot;&quot;))">
            <text:p/>
          </table:table-cell>
          <table:table-cell table:formula="of:=IF([.BL76]=&quot;x&quot;;&quot;x&quot;;IF([.BL76]=&quot;-&quot;;&quot;-&quot;;&quot;&quot;))">
            <text:p/>
          </table:table-cell>
          <table:table-cell table:formula="of:=IF([.BM76]=&quot;x&quot;;&quot;x&quot;;IF([.BM76]=&quot;-&quot;;&quot;-&quot;;&quot;&quot;))">
            <text:p/>
          </table:table-cell>
          <table:table-cell table:formula="of:=IF([.BN76]=&quot;x&quot;;&quot;x&quot;;IF([.BN76]=&quot;-&quot;;&quot;-&quot;;&quot;&quot;))">
            <text:p/>
          </table:table-cell>
          <table:table-cell table:formula="of:=IF([.BO76]=&quot;x&quot;;&quot;x&quot;;IF([.BO76]=&quot;-&quot;;&quot;-&quot;;&quot;&quot;))">
            <text:p/>
          </table:table-cell>
          <table:table-cell table:formula="of:=IF([.BP76]=&quot;x&quot;;&quot;x&quot;;IF([.BP76]=&quot;-&quot;;&quot;-&quot;;&quot;&quot;))">
            <text:p/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6" calcext:value-type="float">
            <text:p>76</text:p>
          </table:table-cell>
          <table:table-cell table:style-name="ce7" office:value-type="string" calcext:value-type="string">
            <text:p>TST076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520" calcext:value-type="float">
            <text:p>15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7]=&quot;x&quot;;&quot;x&quot;;IF([.AS77]=&quot;-&quot;;&quot;-&quot;;&quot;&quot;))">
            <text:p/>
          </table:table-cell>
          <table:table-cell table:formula="of:=IF([.AT77]=&quot;x&quot;;&quot;x&quot;;IF([.AT77]=&quot;-&quot;;&quot;-&quot;;&quot;&quot;))">
            <text:p/>
          </table:table-cell>
          <table:table-cell table:formula="of:=IF([.AU77]=&quot;x&quot;;&quot;x&quot;;IF([.AU77]=&quot;-&quot;;&quot;-&quot;;&quot;&quot;))">
            <text:p/>
          </table:table-cell>
          <table:table-cell table:formula="of:=IF([.AV77]=&quot;x&quot;;&quot;x&quot;;IF([.AV77]=&quot;-&quot;;&quot;-&quot;;&quot;&quot;))">
            <text:p/>
          </table:table-cell>
          <table:table-cell table:formula="of:=IF([.AW77]=&quot;x&quot;;&quot;x&quot;;IF([.AW77]=&quot;-&quot;;&quot;-&quot;;&quot;&quot;))">
            <text:p/>
          </table:table-cell>
          <table:table-cell table:formula="of:=IF([.AX77]=&quot;x&quot;;&quot;x&quot;;IF([.AX77]=&quot;-&quot;;&quot;-&quot;;&quot;&quot;))">
            <text:p/>
          </table:table-cell>
          <table:table-cell table:formula="of:=IF([.AY77]=&quot;x&quot;;&quot;x&quot;;IF([.AY77]=&quot;-&quot;;&quot;-&quot;;&quot;&quot;))" office:value-type="string" office:string-value="x" calcext:value-type="string">
            <text:p>x</text:p>
          </table:table-cell>
          <table:table-cell table:formula="of:=IF([.AZ77]=&quot;x&quot;;&quot;x&quot;;IF([.AZ77]=&quot;-&quot;;&quot;-&quot;;&quot;&quot;))">
            <text:p/>
          </table:table-cell>
          <table:table-cell table:formula="of:=IF([.BA77]=&quot;x&quot;;&quot;x&quot;;IF([.BA77]=&quot;-&quot;;&quot;-&quot;;&quot;&quot;))">
            <text:p/>
          </table:table-cell>
          <table:table-cell table:formula="of:=IF([.BB77]=&quot;x&quot;;&quot;x&quot;;IF([.BB77]=&quot;-&quot;;&quot;-&quot;;&quot;&quot;))">
            <text:p/>
          </table:table-cell>
          <table:table-cell table:formula="of:=IF([.BC77]=&quot;x&quot;;&quot;x&quot;;IF([.BC77]=&quot;-&quot;;&quot;-&quot;;&quot;&quot;))">
            <text:p/>
          </table:table-cell>
          <table:table-cell table:formula="of:=IF([.BD77]=&quot;x&quot;;&quot;x&quot;;IF([.BD77]=&quot;-&quot;;&quot;-&quot;;&quot;&quot;))">
            <text:p/>
          </table:table-cell>
          <table:table-cell table:formula="of:=IF([.BE77]=&quot;x&quot;;&quot;x&quot;;IF([.BE77]=&quot;-&quot;;&quot;-&quot;;&quot;&quot;))">
            <text:p/>
          </table:table-cell>
          <table:table-cell table:formula="of:=IF([.BF77]=&quot;x&quot;;&quot;x&quot;;IF([.BF77]=&quot;-&quot;;&quot;-&quot;;&quot;&quot;))">
            <text:p/>
          </table:table-cell>
          <table:table-cell table:formula="of:=IF([.BG77]=&quot;x&quot;;&quot;x&quot;;IF([.BG77]=&quot;-&quot;;&quot;-&quot;;&quot;&quot;))">
            <text:p/>
          </table:table-cell>
          <table:table-cell table:formula="of:=IF([.BH77]=&quot;x&quot;;&quot;x&quot;;IF([.BH77]=&quot;-&quot;;&quot;-&quot;;&quot;&quot;))">
            <text:p/>
          </table:table-cell>
          <table:table-cell table:formula="of:=IF([.BI77]=&quot;x&quot;;&quot;x&quot;;IF([.BI77]=&quot;-&quot;;&quot;-&quot;;&quot;&quot;))">
            <text:p/>
          </table:table-cell>
          <table:table-cell table:formula="of:=IF([.BJ77]=&quot;x&quot;;&quot;x&quot;;IF([.BJ77]=&quot;-&quot;;&quot;-&quot;;&quot;&quot;))">
            <text:p/>
          </table:table-cell>
          <table:table-cell table:formula="of:=IF([.BK77]=&quot;x&quot;;&quot;x&quot;;IF([.BK77]=&quot;-&quot;;&quot;-&quot;;&quot;&quot;))">
            <text:p/>
          </table:table-cell>
          <table:table-cell table:formula="of:=IF([.BL77]=&quot;x&quot;;&quot;x&quot;;IF([.BL77]=&quot;-&quot;;&quot;-&quot;;&quot;&quot;))">
            <text:p/>
          </table:table-cell>
          <table:table-cell table:formula="of:=IF([.BM77]=&quot;x&quot;;&quot;x&quot;;IF([.BM77]=&quot;-&quot;;&quot;-&quot;;&quot;&quot;))">
            <text:p/>
          </table:table-cell>
          <table:table-cell table:formula="of:=IF([.BN77]=&quot;x&quot;;&quot;x&quot;;IF([.BN77]=&quot;-&quot;;&quot;-&quot;;&quot;&quot;))">
            <text:p/>
          </table:table-cell>
          <table:table-cell table:formula="of:=IF([.BO77]=&quot;x&quot;;&quot;x&quot;;IF([.BO77]=&quot;-&quot;;&quot;-&quot;;&quot;&quot;))">
            <text:p/>
          </table:table-cell>
          <table:table-cell table:formula="of:=IF([.BP77]=&quot;x&quot;;&quot;x&quot;;IF([.BP77]=&quot;-&quot;;&quot;-&quot;;&quot;&quot;))">
            <text:p/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7" calcext:value-type="float">
            <text:p>77</text:p>
          </table:table-cell>
          <table:table-cell table:style-name="ce7" office:value-type="string" calcext:value-type="string">
            <text:p>TST077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40" calcext:value-type="float">
            <text:p>15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8]=&quot;x&quot;;&quot;x&quot;;IF([.AS78]=&quot;-&quot;;&quot;-&quot;;&quot;&quot;))">
            <text:p/>
          </table:table-cell>
          <table:table-cell table:formula="of:=IF([.AT78]=&quot;x&quot;;&quot;x&quot;;IF([.AT78]=&quot;-&quot;;&quot;-&quot;;&quot;&quot;))">
            <text:p/>
          </table:table-cell>
          <table:table-cell table:formula="of:=IF([.AU78]=&quot;x&quot;;&quot;x&quot;;IF([.AU78]=&quot;-&quot;;&quot;-&quot;;&quot;&quot;))">
            <text:p/>
          </table:table-cell>
          <table:table-cell table:formula="of:=IF([.AV78]=&quot;x&quot;;&quot;x&quot;;IF([.AV78]=&quot;-&quot;;&quot;-&quot;;&quot;&quot;))">
            <text:p/>
          </table:table-cell>
          <table:table-cell table:formula="of:=IF([.AW78]=&quot;x&quot;;&quot;x&quot;;IF([.AW78]=&quot;-&quot;;&quot;-&quot;;&quot;&quot;))">
            <text:p/>
          </table:table-cell>
          <table:table-cell table:formula="of:=IF([.AX78]=&quot;x&quot;;&quot;x&quot;;IF([.AX78]=&quot;-&quot;;&quot;-&quot;;&quot;&quot;))">
            <text:p/>
          </table:table-cell>
          <table:table-cell table:formula="of:=IF([.AY78]=&quot;x&quot;;&quot;x&quot;;IF([.AY78]=&quot;-&quot;;&quot;-&quot;;&quot;&quot;))" office:value-type="string" office:string-value="x" calcext:value-type="string">
            <text:p>x</text:p>
          </table:table-cell>
          <table:table-cell table:formula="of:=IF([.AZ78]=&quot;x&quot;;&quot;x&quot;;IF([.AZ78]=&quot;-&quot;;&quot;-&quot;;&quot;&quot;))">
            <text:p/>
          </table:table-cell>
          <table:table-cell table:formula="of:=IF([.BA78]=&quot;x&quot;;&quot;x&quot;;IF([.BA78]=&quot;-&quot;;&quot;-&quot;;&quot;&quot;))">
            <text:p/>
          </table:table-cell>
          <table:table-cell table:formula="of:=IF([.BB78]=&quot;x&quot;;&quot;x&quot;;IF([.BB78]=&quot;-&quot;;&quot;-&quot;;&quot;&quot;))">
            <text:p/>
          </table:table-cell>
          <table:table-cell table:formula="of:=IF([.BC78]=&quot;x&quot;;&quot;x&quot;;IF([.BC78]=&quot;-&quot;;&quot;-&quot;;&quot;&quot;))">
            <text:p/>
          </table:table-cell>
          <table:table-cell table:formula="of:=IF([.BD78]=&quot;x&quot;;&quot;x&quot;;IF([.BD78]=&quot;-&quot;;&quot;-&quot;;&quot;&quot;))">
            <text:p/>
          </table:table-cell>
          <table:table-cell table:formula="of:=IF([.BE78]=&quot;x&quot;;&quot;x&quot;;IF([.BE78]=&quot;-&quot;;&quot;-&quot;;&quot;&quot;))">
            <text:p/>
          </table:table-cell>
          <table:table-cell table:formula="of:=IF([.BF78]=&quot;x&quot;;&quot;x&quot;;IF([.BF78]=&quot;-&quot;;&quot;-&quot;;&quot;&quot;))">
            <text:p/>
          </table:table-cell>
          <table:table-cell table:formula="of:=IF([.BG78]=&quot;x&quot;;&quot;x&quot;;IF([.BG78]=&quot;-&quot;;&quot;-&quot;;&quot;&quot;))">
            <text:p/>
          </table:table-cell>
          <table:table-cell table:formula="of:=IF([.BH78]=&quot;x&quot;;&quot;x&quot;;IF([.BH78]=&quot;-&quot;;&quot;-&quot;;&quot;&quot;))">
            <text:p/>
          </table:table-cell>
          <table:table-cell table:formula="of:=IF([.BI78]=&quot;x&quot;;&quot;x&quot;;IF([.BI78]=&quot;-&quot;;&quot;-&quot;;&quot;&quot;))">
            <text:p/>
          </table:table-cell>
          <table:table-cell table:formula="of:=IF([.BJ78]=&quot;x&quot;;&quot;x&quot;;IF([.BJ78]=&quot;-&quot;;&quot;-&quot;;&quot;&quot;))">
            <text:p/>
          </table:table-cell>
          <table:table-cell table:formula="of:=IF([.BK78]=&quot;x&quot;;&quot;x&quot;;IF([.BK78]=&quot;-&quot;;&quot;-&quot;;&quot;&quot;))">
            <text:p/>
          </table:table-cell>
          <table:table-cell table:formula="of:=IF([.BL78]=&quot;x&quot;;&quot;x&quot;;IF([.BL78]=&quot;-&quot;;&quot;-&quot;;&quot;&quot;))">
            <text:p/>
          </table:table-cell>
          <table:table-cell table:formula="of:=IF([.BM78]=&quot;x&quot;;&quot;x&quot;;IF([.BM78]=&quot;-&quot;;&quot;-&quot;;&quot;&quot;))">
            <text:p/>
          </table:table-cell>
          <table:table-cell table:formula="of:=IF([.BN78]=&quot;x&quot;;&quot;x&quot;;IF([.BN78]=&quot;-&quot;;&quot;-&quot;;&quot;&quot;))">
            <text:p/>
          </table:table-cell>
          <table:table-cell table:formula="of:=IF([.BO78]=&quot;x&quot;;&quot;x&quot;;IF([.BO78]=&quot;-&quot;;&quot;-&quot;;&quot;&quot;))">
            <text:p/>
          </table:table-cell>
          <table:table-cell table:formula="of:=IF([.BP78]=&quot;x&quot;;&quot;x&quot;;IF([.BP78]=&quot;-&quot;;&quot;-&quot;;&quot;&quot;))">
            <text:p/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TST078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560" calcext:value-type="float">
            <text:p>15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9]=&quot;x&quot;;&quot;x&quot;;IF([.AS79]=&quot;-&quot;;&quot;-&quot;;&quot;&quot;))">
            <text:p/>
          </table:table-cell>
          <table:table-cell table:formula="of:=IF([.AT79]=&quot;x&quot;;&quot;x&quot;;IF([.AT79]=&quot;-&quot;;&quot;-&quot;;&quot;&quot;))">
            <text:p/>
          </table:table-cell>
          <table:table-cell table:formula="of:=IF([.AU79]=&quot;x&quot;;&quot;x&quot;;IF([.AU79]=&quot;-&quot;;&quot;-&quot;;&quot;&quot;))">
            <text:p/>
          </table:table-cell>
          <table:table-cell table:formula="of:=IF([.AV79]=&quot;x&quot;;&quot;x&quot;;IF([.AV79]=&quot;-&quot;;&quot;-&quot;;&quot;&quot;))">
            <text:p/>
          </table:table-cell>
          <table:table-cell table:formula="of:=IF([.AW79]=&quot;x&quot;;&quot;x&quot;;IF([.AW79]=&quot;-&quot;;&quot;-&quot;;&quot;&quot;))">
            <text:p/>
          </table:table-cell>
          <table:table-cell table:formula="of:=IF([.AX79]=&quot;x&quot;;&quot;x&quot;;IF([.AX79]=&quot;-&quot;;&quot;-&quot;;&quot;&quot;))">
            <text:p/>
          </table:table-cell>
          <table:table-cell table:formula="of:=IF([.AY79]=&quot;x&quot;;&quot;x&quot;;IF([.AY79]=&quot;-&quot;;&quot;-&quot;;&quot;&quot;))" office:value-type="string" office:string-value="x" calcext:value-type="string">
            <text:p>x</text:p>
          </table:table-cell>
          <table:table-cell table:formula="of:=IF([.AZ79]=&quot;x&quot;;&quot;x&quot;;IF([.AZ79]=&quot;-&quot;;&quot;-&quot;;&quot;&quot;))">
            <text:p/>
          </table:table-cell>
          <table:table-cell table:formula="of:=IF([.BA79]=&quot;x&quot;;&quot;x&quot;;IF([.BA79]=&quot;-&quot;;&quot;-&quot;;&quot;&quot;))">
            <text:p/>
          </table:table-cell>
          <table:table-cell table:formula="of:=IF([.BB79]=&quot;x&quot;;&quot;x&quot;;IF([.BB79]=&quot;-&quot;;&quot;-&quot;;&quot;&quot;))">
            <text:p/>
          </table:table-cell>
          <table:table-cell table:formula="of:=IF([.BC79]=&quot;x&quot;;&quot;x&quot;;IF([.BC79]=&quot;-&quot;;&quot;-&quot;;&quot;&quot;))">
            <text:p/>
          </table:table-cell>
          <table:table-cell table:formula="of:=IF([.BD79]=&quot;x&quot;;&quot;x&quot;;IF([.BD79]=&quot;-&quot;;&quot;-&quot;;&quot;&quot;))">
            <text:p/>
          </table:table-cell>
          <table:table-cell table:formula="of:=IF([.BE79]=&quot;x&quot;;&quot;x&quot;;IF([.BE79]=&quot;-&quot;;&quot;-&quot;;&quot;&quot;))">
            <text:p/>
          </table:table-cell>
          <table:table-cell table:formula="of:=IF([.BF79]=&quot;x&quot;;&quot;x&quot;;IF([.BF79]=&quot;-&quot;;&quot;-&quot;;&quot;&quot;))">
            <text:p/>
          </table:table-cell>
          <table:table-cell table:formula="of:=IF([.BG79]=&quot;x&quot;;&quot;x&quot;;IF([.BG79]=&quot;-&quot;;&quot;-&quot;;&quot;&quot;))">
            <text:p/>
          </table:table-cell>
          <table:table-cell table:formula="of:=IF([.BH79]=&quot;x&quot;;&quot;x&quot;;IF([.BH79]=&quot;-&quot;;&quot;-&quot;;&quot;&quot;))">
            <text:p/>
          </table:table-cell>
          <table:table-cell table:formula="of:=IF([.BI79]=&quot;x&quot;;&quot;x&quot;;IF([.BI79]=&quot;-&quot;;&quot;-&quot;;&quot;&quot;))">
            <text:p/>
          </table:table-cell>
          <table:table-cell table:formula="of:=IF([.BJ79]=&quot;x&quot;;&quot;x&quot;;IF([.BJ79]=&quot;-&quot;;&quot;-&quot;;&quot;&quot;))">
            <text:p/>
          </table:table-cell>
          <table:table-cell table:formula="of:=IF([.BK79]=&quot;x&quot;;&quot;x&quot;;IF([.BK79]=&quot;-&quot;;&quot;-&quot;;&quot;&quot;))">
            <text:p/>
          </table:table-cell>
          <table:table-cell table:formula="of:=IF([.BL79]=&quot;x&quot;;&quot;x&quot;;IF([.BL79]=&quot;-&quot;;&quot;-&quot;;&quot;&quot;))">
            <text:p/>
          </table:table-cell>
          <table:table-cell table:formula="of:=IF([.BM79]=&quot;x&quot;;&quot;x&quot;;IF([.BM79]=&quot;-&quot;;&quot;-&quot;;&quot;&quot;))">
            <text:p/>
          </table:table-cell>
          <table:table-cell table:formula="of:=IF([.BN79]=&quot;x&quot;;&quot;x&quot;;IF([.BN79]=&quot;-&quot;;&quot;-&quot;;&quot;&quot;))">
            <text:p/>
          </table:table-cell>
          <table:table-cell table:formula="of:=IF([.BO79]=&quot;x&quot;;&quot;x&quot;;IF([.BO79]=&quot;-&quot;;&quot;-&quot;;&quot;&quot;))">
            <text:p/>
          </table:table-cell>
          <table:table-cell table:formula="of:=IF([.BP79]=&quot;x&quot;;&quot;x&quot;;IF([.BP79]=&quot;-&quot;;&quot;-&quot;;&quot;&quot;))">
            <text:p/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9" calcext:value-type="float">
            <text:p>79</text:p>
          </table:table-cell>
          <table:table-cell table:style-name="ce7" office:value-type="string" calcext:value-type="string">
            <text:p>TST079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80" calcext:value-type="float">
            <text:p>15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0]=&quot;x&quot;;&quot;x&quot;;IF([.AS80]=&quot;-&quot;;&quot;-&quot;;&quot;&quot;))">
            <text:p/>
          </table:table-cell>
          <table:table-cell table:formula="of:=IF([.AT80]=&quot;x&quot;;&quot;x&quot;;IF([.AT80]=&quot;-&quot;;&quot;-&quot;;&quot;&quot;))">
            <text:p/>
          </table:table-cell>
          <table:table-cell table:formula="of:=IF([.AU80]=&quot;x&quot;;&quot;x&quot;;IF([.AU80]=&quot;-&quot;;&quot;-&quot;;&quot;&quot;))">
            <text:p/>
          </table:table-cell>
          <table:table-cell table:formula="of:=IF([.AV80]=&quot;x&quot;;&quot;x&quot;;IF([.AV80]=&quot;-&quot;;&quot;-&quot;;&quot;&quot;))">
            <text:p/>
          </table:table-cell>
          <table:table-cell table:formula="of:=IF([.AW80]=&quot;x&quot;;&quot;x&quot;;IF([.AW80]=&quot;-&quot;;&quot;-&quot;;&quot;&quot;))">
            <text:p/>
          </table:table-cell>
          <table:table-cell table:formula="of:=IF([.AX80]=&quot;x&quot;;&quot;x&quot;;IF([.AX80]=&quot;-&quot;;&quot;-&quot;;&quot;&quot;))">
            <text:p/>
          </table:table-cell>
          <table:table-cell table:formula="of:=IF([.AY80]=&quot;x&quot;;&quot;x&quot;;IF([.AY80]=&quot;-&quot;;&quot;-&quot;;&quot;&quot;))" office:value-type="string" office:string-value="x" calcext:value-type="string">
            <text:p>x</text:p>
          </table:table-cell>
          <table:table-cell table:formula="of:=IF([.AZ80]=&quot;x&quot;;&quot;x&quot;;IF([.AZ80]=&quot;-&quot;;&quot;-&quot;;&quot;&quot;))">
            <text:p/>
          </table:table-cell>
          <table:table-cell table:formula="of:=IF([.BA80]=&quot;x&quot;;&quot;x&quot;;IF([.BA80]=&quot;-&quot;;&quot;-&quot;;&quot;&quot;))">
            <text:p/>
          </table:table-cell>
          <table:table-cell table:formula="of:=IF([.BB80]=&quot;x&quot;;&quot;x&quot;;IF([.BB80]=&quot;-&quot;;&quot;-&quot;;&quot;&quot;))">
            <text:p/>
          </table:table-cell>
          <table:table-cell table:formula="of:=IF([.BC80]=&quot;x&quot;;&quot;x&quot;;IF([.BC80]=&quot;-&quot;;&quot;-&quot;;&quot;&quot;))">
            <text:p/>
          </table:table-cell>
          <table:table-cell table:formula="of:=IF([.BD80]=&quot;x&quot;;&quot;x&quot;;IF([.BD80]=&quot;-&quot;;&quot;-&quot;;&quot;&quot;))">
            <text:p/>
          </table:table-cell>
          <table:table-cell table:formula="of:=IF([.BE80]=&quot;x&quot;;&quot;x&quot;;IF([.BE80]=&quot;-&quot;;&quot;-&quot;;&quot;&quot;))">
            <text:p/>
          </table:table-cell>
          <table:table-cell table:formula="of:=IF([.BF80]=&quot;x&quot;;&quot;x&quot;;IF([.BF80]=&quot;-&quot;;&quot;-&quot;;&quot;&quot;))">
            <text:p/>
          </table:table-cell>
          <table:table-cell table:formula="of:=IF([.BG80]=&quot;x&quot;;&quot;x&quot;;IF([.BG80]=&quot;-&quot;;&quot;-&quot;;&quot;&quot;))">
            <text:p/>
          </table:table-cell>
          <table:table-cell table:formula="of:=IF([.BH80]=&quot;x&quot;;&quot;x&quot;;IF([.BH80]=&quot;-&quot;;&quot;-&quot;;&quot;&quot;))">
            <text:p/>
          </table:table-cell>
          <table:table-cell table:formula="of:=IF([.BI80]=&quot;x&quot;;&quot;x&quot;;IF([.BI80]=&quot;-&quot;;&quot;-&quot;;&quot;&quot;))">
            <text:p/>
          </table:table-cell>
          <table:table-cell table:formula="of:=IF([.BJ80]=&quot;x&quot;;&quot;x&quot;;IF([.BJ80]=&quot;-&quot;;&quot;-&quot;;&quot;&quot;))">
            <text:p/>
          </table:table-cell>
          <table:table-cell table:formula="of:=IF([.BK80]=&quot;x&quot;;&quot;x&quot;;IF([.BK80]=&quot;-&quot;;&quot;-&quot;;&quot;&quot;))">
            <text:p/>
          </table:table-cell>
          <table:table-cell table:formula="of:=IF([.BL80]=&quot;x&quot;;&quot;x&quot;;IF([.BL80]=&quot;-&quot;;&quot;-&quot;;&quot;&quot;))">
            <text:p/>
          </table:table-cell>
          <table:table-cell table:formula="of:=IF([.BM80]=&quot;x&quot;;&quot;x&quot;;IF([.BM80]=&quot;-&quot;;&quot;-&quot;;&quot;&quot;))">
            <text:p/>
          </table:table-cell>
          <table:table-cell table:formula="of:=IF([.BN80]=&quot;x&quot;;&quot;x&quot;;IF([.BN80]=&quot;-&quot;;&quot;-&quot;;&quot;&quot;))">
            <text:p/>
          </table:table-cell>
          <table:table-cell table:formula="of:=IF([.BO80]=&quot;x&quot;;&quot;x&quot;;IF([.BO80]=&quot;-&quot;;&quot;-&quot;;&quot;&quot;))">
            <text:p/>
          </table:table-cell>
          <table:table-cell table:formula="of:=IF([.BP80]=&quot;x&quot;;&quot;x&quot;;IF([.BP80]=&quot;-&quot;;&quot;-&quot;;&quot;&quot;))">
            <text:p/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string" calcext:value-type="string">
            <text:p>TST080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0" calcext:value-type="float">
            <text:p>16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1]=&quot;x&quot;;&quot;x&quot;;IF([.AS81]=&quot;-&quot;;&quot;-&quot;;&quot;&quot;))">
            <text:p/>
          </table:table-cell>
          <table:table-cell table:formula="of:=IF([.AT81]=&quot;x&quot;;&quot;x&quot;;IF([.AT81]=&quot;-&quot;;&quot;-&quot;;&quot;&quot;))">
            <text:p/>
          </table:table-cell>
          <table:table-cell table:formula="of:=IF([.AU81]=&quot;x&quot;;&quot;x&quot;;IF([.AU81]=&quot;-&quot;;&quot;-&quot;;&quot;&quot;))">
            <text:p/>
          </table:table-cell>
          <table:table-cell table:formula="of:=IF([.AV81]=&quot;x&quot;;&quot;x&quot;;IF([.AV81]=&quot;-&quot;;&quot;-&quot;;&quot;&quot;))">
            <text:p/>
          </table:table-cell>
          <table:table-cell table:formula="of:=IF([.AW81]=&quot;x&quot;;&quot;x&quot;;IF([.AW81]=&quot;-&quot;;&quot;-&quot;;&quot;&quot;))">
            <text:p/>
          </table:table-cell>
          <table:table-cell table:formula="of:=IF([.AX81]=&quot;x&quot;;&quot;x&quot;;IF([.AX81]=&quot;-&quot;;&quot;-&quot;;&quot;&quot;))">
            <text:p/>
          </table:table-cell>
          <table:table-cell table:formula="of:=IF([.AY81]=&quot;x&quot;;&quot;x&quot;;IF([.AY81]=&quot;-&quot;;&quot;-&quot;;&quot;&quot;))" office:value-type="string" office:string-value="x" calcext:value-type="string">
            <text:p>x</text:p>
          </table:table-cell>
          <table:table-cell table:formula="of:=IF([.AZ81]=&quot;x&quot;;&quot;x&quot;;IF([.AZ81]=&quot;-&quot;;&quot;-&quot;;&quot;&quot;))">
            <text:p/>
          </table:table-cell>
          <table:table-cell table:formula="of:=IF([.BA81]=&quot;x&quot;;&quot;x&quot;;IF([.BA81]=&quot;-&quot;;&quot;-&quot;;&quot;&quot;))">
            <text:p/>
          </table:table-cell>
          <table:table-cell table:formula="of:=IF([.BB81]=&quot;x&quot;;&quot;x&quot;;IF([.BB81]=&quot;-&quot;;&quot;-&quot;;&quot;&quot;))">
            <text:p/>
          </table:table-cell>
          <table:table-cell table:formula="of:=IF([.BC81]=&quot;x&quot;;&quot;x&quot;;IF([.BC81]=&quot;-&quot;;&quot;-&quot;;&quot;&quot;))">
            <text:p/>
          </table:table-cell>
          <table:table-cell table:formula="of:=IF([.BD81]=&quot;x&quot;;&quot;x&quot;;IF([.BD81]=&quot;-&quot;;&quot;-&quot;;&quot;&quot;))">
            <text:p/>
          </table:table-cell>
          <table:table-cell table:formula="of:=IF([.BE81]=&quot;x&quot;;&quot;x&quot;;IF([.BE81]=&quot;-&quot;;&quot;-&quot;;&quot;&quot;))">
            <text:p/>
          </table:table-cell>
          <table:table-cell table:formula="of:=IF([.BF81]=&quot;x&quot;;&quot;x&quot;;IF([.BF81]=&quot;-&quot;;&quot;-&quot;;&quot;&quot;))">
            <text:p/>
          </table:table-cell>
          <table:table-cell table:formula="of:=IF([.BG81]=&quot;x&quot;;&quot;x&quot;;IF([.BG81]=&quot;-&quot;;&quot;-&quot;;&quot;&quot;))">
            <text:p/>
          </table:table-cell>
          <table:table-cell table:formula="of:=IF([.BH81]=&quot;x&quot;;&quot;x&quot;;IF([.BH81]=&quot;-&quot;;&quot;-&quot;;&quot;&quot;))">
            <text:p/>
          </table:table-cell>
          <table:table-cell table:formula="of:=IF([.BI81]=&quot;x&quot;;&quot;x&quot;;IF([.BI81]=&quot;-&quot;;&quot;-&quot;;&quot;&quot;))">
            <text:p/>
          </table:table-cell>
          <table:table-cell table:formula="of:=IF([.BJ81]=&quot;x&quot;;&quot;x&quot;;IF([.BJ81]=&quot;-&quot;;&quot;-&quot;;&quot;&quot;))">
            <text:p/>
          </table:table-cell>
          <table:table-cell table:formula="of:=IF([.BK81]=&quot;x&quot;;&quot;x&quot;;IF([.BK81]=&quot;-&quot;;&quot;-&quot;;&quot;&quot;))">
            <text:p/>
          </table:table-cell>
          <table:table-cell table:formula="of:=IF([.BL81]=&quot;x&quot;;&quot;x&quot;;IF([.BL81]=&quot;-&quot;;&quot;-&quot;;&quot;&quot;))">
            <text:p/>
          </table:table-cell>
          <table:table-cell table:formula="of:=IF([.BM81]=&quot;x&quot;;&quot;x&quot;;IF([.BM81]=&quot;-&quot;;&quot;-&quot;;&quot;&quot;))">
            <text:p/>
          </table:table-cell>
          <table:table-cell table:formula="of:=IF([.BN81]=&quot;x&quot;;&quot;x&quot;;IF([.BN81]=&quot;-&quot;;&quot;-&quot;;&quot;&quot;))">
            <text:p/>
          </table:table-cell>
          <table:table-cell table:formula="of:=IF([.BO81]=&quot;x&quot;;&quot;x&quot;;IF([.BO81]=&quot;-&quot;;&quot;-&quot;;&quot;&quot;))">
            <text:p/>
          </table:table-cell>
          <table:table-cell table:formula="of:=IF([.BP81]=&quot;x&quot;;&quot;x&quot;;IF([.BP81]=&quot;-&quot;;&quot;-&quot;;&quot;&quot;))">
            <text:p/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1" calcext:value-type="float">
            <text:p>81</text:p>
          </table:table-cell>
          <table:table-cell table:style-name="ce7" office:value-type="string" calcext:value-type="string">
            <text:p>TST081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620" calcext:value-type="float">
            <text:p>16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2]=&quot;x&quot;;&quot;x&quot;;IF([.AS82]=&quot;-&quot;;&quot;-&quot;;&quot;&quot;))">
            <text:p/>
          </table:table-cell>
          <table:table-cell table:formula="of:=IF([.AT82]=&quot;x&quot;;&quot;x&quot;;IF([.AT82]=&quot;-&quot;;&quot;-&quot;;&quot;&quot;))">
            <text:p/>
          </table:table-cell>
          <table:table-cell table:formula="of:=IF([.AU82]=&quot;x&quot;;&quot;x&quot;;IF([.AU82]=&quot;-&quot;;&quot;-&quot;;&quot;&quot;))">
            <text:p/>
          </table:table-cell>
          <table:table-cell table:formula="of:=IF([.AV82]=&quot;x&quot;;&quot;x&quot;;IF([.AV82]=&quot;-&quot;;&quot;-&quot;;&quot;&quot;))">
            <text:p/>
          </table:table-cell>
          <table:table-cell table:formula="of:=IF([.AW82]=&quot;x&quot;;&quot;x&quot;;IF([.AW82]=&quot;-&quot;;&quot;-&quot;;&quot;&quot;))">
            <text:p/>
          </table:table-cell>
          <table:table-cell table:formula="of:=IF([.AX82]=&quot;x&quot;;&quot;x&quot;;IF([.AX82]=&quot;-&quot;;&quot;-&quot;;&quot;&quot;))">
            <text:p/>
          </table:table-cell>
          <table:table-cell table:formula="of:=IF([.AY82]=&quot;x&quot;;&quot;x&quot;;IF([.AY82]=&quot;-&quot;;&quot;-&quot;;&quot;&quot;))" office:value-type="string" office:string-value="x" calcext:value-type="string">
            <text:p>x</text:p>
          </table:table-cell>
          <table:table-cell table:formula="of:=IF([.AZ82]=&quot;x&quot;;&quot;x&quot;;IF([.AZ82]=&quot;-&quot;;&quot;-&quot;;&quot;&quot;))">
            <text:p/>
          </table:table-cell>
          <table:table-cell table:formula="of:=IF([.BA82]=&quot;x&quot;;&quot;x&quot;;IF([.BA82]=&quot;-&quot;;&quot;-&quot;;&quot;&quot;))">
            <text:p/>
          </table:table-cell>
          <table:table-cell table:formula="of:=IF([.BB82]=&quot;x&quot;;&quot;x&quot;;IF([.BB82]=&quot;-&quot;;&quot;-&quot;;&quot;&quot;))">
            <text:p/>
          </table:table-cell>
          <table:table-cell table:formula="of:=IF([.BC82]=&quot;x&quot;;&quot;x&quot;;IF([.BC82]=&quot;-&quot;;&quot;-&quot;;&quot;&quot;))">
            <text:p/>
          </table:table-cell>
          <table:table-cell table:formula="of:=IF([.BD82]=&quot;x&quot;;&quot;x&quot;;IF([.BD82]=&quot;-&quot;;&quot;-&quot;;&quot;&quot;))">
            <text:p/>
          </table:table-cell>
          <table:table-cell table:formula="of:=IF([.BE82]=&quot;x&quot;;&quot;x&quot;;IF([.BE82]=&quot;-&quot;;&quot;-&quot;;&quot;&quot;))">
            <text:p/>
          </table:table-cell>
          <table:table-cell table:formula="of:=IF([.BF82]=&quot;x&quot;;&quot;x&quot;;IF([.BF82]=&quot;-&quot;;&quot;-&quot;;&quot;&quot;))">
            <text:p/>
          </table:table-cell>
          <table:table-cell table:formula="of:=IF([.BG82]=&quot;x&quot;;&quot;x&quot;;IF([.BG82]=&quot;-&quot;;&quot;-&quot;;&quot;&quot;))">
            <text:p/>
          </table:table-cell>
          <table:table-cell table:formula="of:=IF([.BH82]=&quot;x&quot;;&quot;x&quot;;IF([.BH82]=&quot;-&quot;;&quot;-&quot;;&quot;&quot;))">
            <text:p/>
          </table:table-cell>
          <table:table-cell table:formula="of:=IF([.BI82]=&quot;x&quot;;&quot;x&quot;;IF([.BI82]=&quot;-&quot;;&quot;-&quot;;&quot;&quot;))">
            <text:p/>
          </table:table-cell>
          <table:table-cell table:formula="of:=IF([.BJ82]=&quot;x&quot;;&quot;x&quot;;IF([.BJ82]=&quot;-&quot;;&quot;-&quot;;&quot;&quot;))">
            <text:p/>
          </table:table-cell>
          <table:table-cell table:formula="of:=IF([.BK82]=&quot;x&quot;;&quot;x&quot;;IF([.BK82]=&quot;-&quot;;&quot;-&quot;;&quot;&quot;))">
            <text:p/>
          </table:table-cell>
          <table:table-cell table:formula="of:=IF([.BL82]=&quot;x&quot;;&quot;x&quot;;IF([.BL82]=&quot;-&quot;;&quot;-&quot;;&quot;&quot;))">
            <text:p/>
          </table:table-cell>
          <table:table-cell table:formula="of:=IF([.BM82]=&quot;x&quot;;&quot;x&quot;;IF([.BM82]=&quot;-&quot;;&quot;-&quot;;&quot;&quot;))">
            <text:p/>
          </table:table-cell>
          <table:table-cell table:formula="of:=IF([.BN82]=&quot;x&quot;;&quot;x&quot;;IF([.BN82]=&quot;-&quot;;&quot;-&quot;;&quot;&quot;))">
            <text:p/>
          </table:table-cell>
          <table:table-cell table:formula="of:=IF([.BO82]=&quot;x&quot;;&quot;x&quot;;IF([.BO82]=&quot;-&quot;;&quot;-&quot;;&quot;&quot;))">
            <text:p/>
          </table:table-cell>
          <table:table-cell table:formula="of:=IF([.BP82]=&quot;x&quot;;&quot;x&quot;;IF([.BP82]=&quot;-&quot;;&quot;-&quot;;&quot;&quot;))">
            <text:p/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2" calcext:value-type="float">
            <text:p>82</text:p>
          </table:table-cell>
          <table:table-cell table:style-name="ce7" office:value-type="string" calcext:value-type="string">
            <text:p>TST082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40" calcext:value-type="float">
            <text:p>16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3]=&quot;x&quot;;&quot;x&quot;;IF([.AS83]=&quot;-&quot;;&quot;-&quot;;&quot;&quot;))">
            <text:p/>
          </table:table-cell>
          <table:table-cell table:formula="of:=IF([.AT83]=&quot;x&quot;;&quot;x&quot;;IF([.AT83]=&quot;-&quot;;&quot;-&quot;;&quot;&quot;))">
            <text:p/>
          </table:table-cell>
          <table:table-cell table:formula="of:=IF([.AU83]=&quot;x&quot;;&quot;x&quot;;IF([.AU83]=&quot;-&quot;;&quot;-&quot;;&quot;&quot;))">
            <text:p/>
          </table:table-cell>
          <table:table-cell table:formula="of:=IF([.AV83]=&quot;x&quot;;&quot;x&quot;;IF([.AV83]=&quot;-&quot;;&quot;-&quot;;&quot;&quot;))">
            <text:p/>
          </table:table-cell>
          <table:table-cell table:formula="of:=IF([.AW83]=&quot;x&quot;;&quot;x&quot;;IF([.AW83]=&quot;-&quot;;&quot;-&quot;;&quot;&quot;))">
            <text:p/>
          </table:table-cell>
          <table:table-cell table:formula="of:=IF([.AX83]=&quot;x&quot;;&quot;x&quot;;IF([.AX83]=&quot;-&quot;;&quot;-&quot;;&quot;&quot;))">
            <text:p/>
          </table:table-cell>
          <table:table-cell table:formula="of:=IF([.AY83]=&quot;x&quot;;&quot;x&quot;;IF([.AY83]=&quot;-&quot;;&quot;-&quot;;&quot;&quot;))" office:value-type="string" office:string-value="x" calcext:value-type="string">
            <text:p>x</text:p>
          </table:table-cell>
          <table:table-cell table:formula="of:=IF([.AZ83]=&quot;x&quot;;&quot;x&quot;;IF([.AZ83]=&quot;-&quot;;&quot;-&quot;;&quot;&quot;))">
            <text:p/>
          </table:table-cell>
          <table:table-cell table:formula="of:=IF([.BA83]=&quot;x&quot;;&quot;x&quot;;IF([.BA83]=&quot;-&quot;;&quot;-&quot;;&quot;&quot;))">
            <text:p/>
          </table:table-cell>
          <table:table-cell table:formula="of:=IF([.BB83]=&quot;x&quot;;&quot;x&quot;;IF([.BB83]=&quot;-&quot;;&quot;-&quot;;&quot;&quot;))">
            <text:p/>
          </table:table-cell>
          <table:table-cell table:formula="of:=IF([.BC83]=&quot;x&quot;;&quot;x&quot;;IF([.BC83]=&quot;-&quot;;&quot;-&quot;;&quot;&quot;))">
            <text:p/>
          </table:table-cell>
          <table:table-cell table:formula="of:=IF([.BD83]=&quot;x&quot;;&quot;x&quot;;IF([.BD83]=&quot;-&quot;;&quot;-&quot;;&quot;&quot;))">
            <text:p/>
          </table:table-cell>
          <table:table-cell table:formula="of:=IF([.BE83]=&quot;x&quot;;&quot;x&quot;;IF([.BE83]=&quot;-&quot;;&quot;-&quot;;&quot;&quot;))">
            <text:p/>
          </table:table-cell>
          <table:table-cell table:formula="of:=IF([.BF83]=&quot;x&quot;;&quot;x&quot;;IF([.BF83]=&quot;-&quot;;&quot;-&quot;;&quot;&quot;))">
            <text:p/>
          </table:table-cell>
          <table:table-cell table:formula="of:=IF([.BG83]=&quot;x&quot;;&quot;x&quot;;IF([.BG83]=&quot;-&quot;;&quot;-&quot;;&quot;&quot;))">
            <text:p/>
          </table:table-cell>
          <table:table-cell table:formula="of:=IF([.BH83]=&quot;x&quot;;&quot;x&quot;;IF([.BH83]=&quot;-&quot;;&quot;-&quot;;&quot;&quot;))">
            <text:p/>
          </table:table-cell>
          <table:table-cell table:formula="of:=IF([.BI83]=&quot;x&quot;;&quot;x&quot;;IF([.BI83]=&quot;-&quot;;&quot;-&quot;;&quot;&quot;))">
            <text:p/>
          </table:table-cell>
          <table:table-cell table:formula="of:=IF([.BJ83]=&quot;x&quot;;&quot;x&quot;;IF([.BJ83]=&quot;-&quot;;&quot;-&quot;;&quot;&quot;))">
            <text:p/>
          </table:table-cell>
          <table:table-cell table:formula="of:=IF([.BK83]=&quot;x&quot;;&quot;x&quot;;IF([.BK83]=&quot;-&quot;;&quot;-&quot;;&quot;&quot;))">
            <text:p/>
          </table:table-cell>
          <table:table-cell table:formula="of:=IF([.BL83]=&quot;x&quot;;&quot;x&quot;;IF([.BL83]=&quot;-&quot;;&quot;-&quot;;&quot;&quot;))">
            <text:p/>
          </table:table-cell>
          <table:table-cell table:formula="of:=IF([.BM83]=&quot;x&quot;;&quot;x&quot;;IF([.BM83]=&quot;-&quot;;&quot;-&quot;;&quot;&quot;))">
            <text:p/>
          </table:table-cell>
          <table:table-cell table:formula="of:=IF([.BN83]=&quot;x&quot;;&quot;x&quot;;IF([.BN83]=&quot;-&quot;;&quot;-&quot;;&quot;&quot;))">
            <text:p/>
          </table:table-cell>
          <table:table-cell table:formula="of:=IF([.BO83]=&quot;x&quot;;&quot;x&quot;;IF([.BO83]=&quot;-&quot;;&quot;-&quot;;&quot;&quot;))">
            <text:p/>
          </table:table-cell>
          <table:table-cell table:formula="of:=IF([.BP83]=&quot;x&quot;;&quot;x&quot;;IF([.BP83]=&quot;-&quot;;&quot;-&quot;;&quot;&quot;))">
            <text:p/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string" calcext:value-type="string">
            <text:p>TST083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660" calcext:value-type="float">
            <text:p>16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4]=&quot;x&quot;;&quot;x&quot;;IF([.AS84]=&quot;-&quot;;&quot;-&quot;;&quot;&quot;))">
            <text:p/>
          </table:table-cell>
          <table:table-cell table:formula="of:=IF([.AT84]=&quot;x&quot;;&quot;x&quot;;IF([.AT84]=&quot;-&quot;;&quot;-&quot;;&quot;&quot;))">
            <text:p/>
          </table:table-cell>
          <table:table-cell table:formula="of:=IF([.AU84]=&quot;x&quot;;&quot;x&quot;;IF([.AU84]=&quot;-&quot;;&quot;-&quot;;&quot;&quot;))">
            <text:p/>
          </table:table-cell>
          <table:table-cell table:formula="of:=IF([.AV84]=&quot;x&quot;;&quot;x&quot;;IF([.AV84]=&quot;-&quot;;&quot;-&quot;;&quot;&quot;))">
            <text:p/>
          </table:table-cell>
          <table:table-cell table:formula="of:=IF([.AW84]=&quot;x&quot;;&quot;x&quot;;IF([.AW84]=&quot;-&quot;;&quot;-&quot;;&quot;&quot;))">
            <text:p/>
          </table:table-cell>
          <table:table-cell table:formula="of:=IF([.AX84]=&quot;x&quot;;&quot;x&quot;;IF([.AX84]=&quot;-&quot;;&quot;-&quot;;&quot;&quot;))">
            <text:p/>
          </table:table-cell>
          <table:table-cell table:formula="of:=IF([.AY84]=&quot;x&quot;;&quot;x&quot;;IF([.AY84]=&quot;-&quot;;&quot;-&quot;;&quot;&quot;))" office:value-type="string" office:string-value="x" calcext:value-type="string">
            <text:p>x</text:p>
          </table:table-cell>
          <table:table-cell table:formula="of:=IF([.AZ84]=&quot;x&quot;;&quot;x&quot;;IF([.AZ84]=&quot;-&quot;;&quot;-&quot;;&quot;&quot;))">
            <text:p/>
          </table:table-cell>
          <table:table-cell table:formula="of:=IF([.BA84]=&quot;x&quot;;&quot;x&quot;;IF([.BA84]=&quot;-&quot;;&quot;-&quot;;&quot;&quot;))">
            <text:p/>
          </table:table-cell>
          <table:table-cell table:formula="of:=IF([.BB84]=&quot;x&quot;;&quot;x&quot;;IF([.BB84]=&quot;-&quot;;&quot;-&quot;;&quot;&quot;))">
            <text:p/>
          </table:table-cell>
          <table:table-cell table:formula="of:=IF([.BC84]=&quot;x&quot;;&quot;x&quot;;IF([.BC84]=&quot;-&quot;;&quot;-&quot;;&quot;&quot;))">
            <text:p/>
          </table:table-cell>
          <table:table-cell table:formula="of:=IF([.BD84]=&quot;x&quot;;&quot;x&quot;;IF([.BD84]=&quot;-&quot;;&quot;-&quot;;&quot;&quot;))">
            <text:p/>
          </table:table-cell>
          <table:table-cell table:formula="of:=IF([.BE84]=&quot;x&quot;;&quot;x&quot;;IF([.BE84]=&quot;-&quot;;&quot;-&quot;;&quot;&quot;))">
            <text:p/>
          </table:table-cell>
          <table:table-cell table:formula="of:=IF([.BF84]=&quot;x&quot;;&quot;x&quot;;IF([.BF84]=&quot;-&quot;;&quot;-&quot;;&quot;&quot;))">
            <text:p/>
          </table:table-cell>
          <table:table-cell table:formula="of:=IF([.BG84]=&quot;x&quot;;&quot;x&quot;;IF([.BG84]=&quot;-&quot;;&quot;-&quot;;&quot;&quot;))">
            <text:p/>
          </table:table-cell>
          <table:table-cell table:formula="of:=IF([.BH84]=&quot;x&quot;;&quot;x&quot;;IF([.BH84]=&quot;-&quot;;&quot;-&quot;;&quot;&quot;))">
            <text:p/>
          </table:table-cell>
          <table:table-cell table:formula="of:=IF([.BI84]=&quot;x&quot;;&quot;x&quot;;IF([.BI84]=&quot;-&quot;;&quot;-&quot;;&quot;&quot;))">
            <text:p/>
          </table:table-cell>
          <table:table-cell table:formula="of:=IF([.BJ84]=&quot;x&quot;;&quot;x&quot;;IF([.BJ84]=&quot;-&quot;;&quot;-&quot;;&quot;&quot;))">
            <text:p/>
          </table:table-cell>
          <table:table-cell table:formula="of:=IF([.BK84]=&quot;x&quot;;&quot;x&quot;;IF([.BK84]=&quot;-&quot;;&quot;-&quot;;&quot;&quot;))">
            <text:p/>
          </table:table-cell>
          <table:table-cell table:formula="of:=IF([.BL84]=&quot;x&quot;;&quot;x&quot;;IF([.BL84]=&quot;-&quot;;&quot;-&quot;;&quot;&quot;))">
            <text:p/>
          </table:table-cell>
          <table:table-cell table:formula="of:=IF([.BM84]=&quot;x&quot;;&quot;x&quot;;IF([.BM84]=&quot;-&quot;;&quot;-&quot;;&quot;&quot;))">
            <text:p/>
          </table:table-cell>
          <table:table-cell table:formula="of:=IF([.BN84]=&quot;x&quot;;&quot;x&quot;;IF([.BN84]=&quot;-&quot;;&quot;-&quot;;&quot;&quot;))">
            <text:p/>
          </table:table-cell>
          <table:table-cell table:formula="of:=IF([.BO84]=&quot;x&quot;;&quot;x&quot;;IF([.BO84]=&quot;-&quot;;&quot;-&quot;;&quot;&quot;))">
            <text:p/>
          </table:table-cell>
          <table:table-cell table:formula="of:=IF([.BP84]=&quot;x&quot;;&quot;x&quot;;IF([.BP84]=&quot;-&quot;;&quot;-&quot;;&quot;&quot;))">
            <text:p/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4" calcext:value-type="float">
            <text:p>84</text:p>
          </table:table-cell>
          <table:table-cell table:style-name="ce7" office:value-type="string" calcext:value-type="string">
            <text:p>TST084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80" calcext:value-type="float">
            <text:p>16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5]=&quot;x&quot;;&quot;x&quot;;IF([.AS85]=&quot;-&quot;;&quot;-&quot;;&quot;&quot;))">
            <text:p/>
          </table:table-cell>
          <table:table-cell table:formula="of:=IF([.AT85]=&quot;x&quot;;&quot;x&quot;;IF([.AT85]=&quot;-&quot;;&quot;-&quot;;&quot;&quot;))">
            <text:p/>
          </table:table-cell>
          <table:table-cell table:formula="of:=IF([.AU85]=&quot;x&quot;;&quot;x&quot;;IF([.AU85]=&quot;-&quot;;&quot;-&quot;;&quot;&quot;))">
            <text:p/>
          </table:table-cell>
          <table:table-cell table:formula="of:=IF([.AV85]=&quot;x&quot;;&quot;x&quot;;IF([.AV85]=&quot;-&quot;;&quot;-&quot;;&quot;&quot;))">
            <text:p/>
          </table:table-cell>
          <table:table-cell table:formula="of:=IF([.AW85]=&quot;x&quot;;&quot;x&quot;;IF([.AW85]=&quot;-&quot;;&quot;-&quot;;&quot;&quot;))">
            <text:p/>
          </table:table-cell>
          <table:table-cell table:formula="of:=IF([.AX85]=&quot;x&quot;;&quot;x&quot;;IF([.AX85]=&quot;-&quot;;&quot;-&quot;;&quot;&quot;))">
            <text:p/>
          </table:table-cell>
          <table:table-cell table:formula="of:=IF([.AY85]=&quot;x&quot;;&quot;x&quot;;IF([.AY85]=&quot;-&quot;;&quot;-&quot;;&quot;&quot;))" office:value-type="string" office:string-value="x" calcext:value-type="string">
            <text:p>x</text:p>
          </table:table-cell>
          <table:table-cell table:formula="of:=IF([.AZ85]=&quot;x&quot;;&quot;x&quot;;IF([.AZ85]=&quot;-&quot;;&quot;-&quot;;&quot;&quot;))">
            <text:p/>
          </table:table-cell>
          <table:table-cell table:formula="of:=IF([.BA85]=&quot;x&quot;;&quot;x&quot;;IF([.BA85]=&quot;-&quot;;&quot;-&quot;;&quot;&quot;))">
            <text:p/>
          </table:table-cell>
          <table:table-cell table:formula="of:=IF([.BB85]=&quot;x&quot;;&quot;x&quot;;IF([.BB85]=&quot;-&quot;;&quot;-&quot;;&quot;&quot;))">
            <text:p/>
          </table:table-cell>
          <table:table-cell table:formula="of:=IF([.BC85]=&quot;x&quot;;&quot;x&quot;;IF([.BC85]=&quot;-&quot;;&quot;-&quot;;&quot;&quot;))">
            <text:p/>
          </table:table-cell>
          <table:table-cell table:formula="of:=IF([.BD85]=&quot;x&quot;;&quot;x&quot;;IF([.BD85]=&quot;-&quot;;&quot;-&quot;;&quot;&quot;))">
            <text:p/>
          </table:table-cell>
          <table:table-cell table:formula="of:=IF([.BE85]=&quot;x&quot;;&quot;x&quot;;IF([.BE85]=&quot;-&quot;;&quot;-&quot;;&quot;&quot;))">
            <text:p/>
          </table:table-cell>
          <table:table-cell table:formula="of:=IF([.BF85]=&quot;x&quot;;&quot;x&quot;;IF([.BF85]=&quot;-&quot;;&quot;-&quot;;&quot;&quot;))">
            <text:p/>
          </table:table-cell>
          <table:table-cell table:formula="of:=IF([.BG85]=&quot;x&quot;;&quot;x&quot;;IF([.BG85]=&quot;-&quot;;&quot;-&quot;;&quot;&quot;))">
            <text:p/>
          </table:table-cell>
          <table:table-cell table:formula="of:=IF([.BH85]=&quot;x&quot;;&quot;x&quot;;IF([.BH85]=&quot;-&quot;;&quot;-&quot;;&quot;&quot;))">
            <text:p/>
          </table:table-cell>
          <table:table-cell table:formula="of:=IF([.BI85]=&quot;x&quot;;&quot;x&quot;;IF([.BI85]=&quot;-&quot;;&quot;-&quot;;&quot;&quot;))">
            <text:p/>
          </table:table-cell>
          <table:table-cell table:formula="of:=IF([.BJ85]=&quot;x&quot;;&quot;x&quot;;IF([.BJ85]=&quot;-&quot;;&quot;-&quot;;&quot;&quot;))">
            <text:p/>
          </table:table-cell>
          <table:table-cell table:formula="of:=IF([.BK85]=&quot;x&quot;;&quot;x&quot;;IF([.BK85]=&quot;-&quot;;&quot;-&quot;;&quot;&quot;))">
            <text:p/>
          </table:table-cell>
          <table:table-cell table:formula="of:=IF([.BL85]=&quot;x&quot;;&quot;x&quot;;IF([.BL85]=&quot;-&quot;;&quot;-&quot;;&quot;&quot;))">
            <text:p/>
          </table:table-cell>
          <table:table-cell table:formula="of:=IF([.BM85]=&quot;x&quot;;&quot;x&quot;;IF([.BM85]=&quot;-&quot;;&quot;-&quot;;&quot;&quot;))">
            <text:p/>
          </table:table-cell>
          <table:table-cell table:formula="of:=IF([.BN85]=&quot;x&quot;;&quot;x&quot;;IF([.BN85]=&quot;-&quot;;&quot;-&quot;;&quot;&quot;))">
            <text:p/>
          </table:table-cell>
          <table:table-cell table:formula="of:=IF([.BO85]=&quot;x&quot;;&quot;x&quot;;IF([.BO85]=&quot;-&quot;;&quot;-&quot;;&quot;&quot;))">
            <text:p/>
          </table:table-cell>
          <table:table-cell table:formula="of:=IF([.BP85]=&quot;x&quot;;&quot;x&quot;;IF([.BP85]=&quot;-&quot;;&quot;-&quot;;&quot;&quot;))">
            <text:p/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5" calcext:value-type="float">
            <text:p>85</text:p>
          </table:table-cell>
          <table:table-cell table:style-name="ce7" office:value-type="string" calcext:value-type="string">
            <text:p>TST085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00" calcext:value-type="float">
            <text:p>17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6]=&quot;x&quot;;&quot;x&quot;;IF([.AS86]=&quot;-&quot;;&quot;-&quot;;&quot;&quot;))">
            <text:p/>
          </table:table-cell>
          <table:table-cell table:formula="of:=IF([.AT86]=&quot;x&quot;;&quot;x&quot;;IF([.AT86]=&quot;-&quot;;&quot;-&quot;;&quot;&quot;))">
            <text:p/>
          </table:table-cell>
          <table:table-cell table:formula="of:=IF([.AU86]=&quot;x&quot;;&quot;x&quot;;IF([.AU86]=&quot;-&quot;;&quot;-&quot;;&quot;&quot;))">
            <text:p/>
          </table:table-cell>
          <table:table-cell table:formula="of:=IF([.AV86]=&quot;x&quot;;&quot;x&quot;;IF([.AV86]=&quot;-&quot;;&quot;-&quot;;&quot;&quot;))">
            <text:p/>
          </table:table-cell>
          <table:table-cell table:formula="of:=IF([.AW86]=&quot;x&quot;;&quot;x&quot;;IF([.AW86]=&quot;-&quot;;&quot;-&quot;;&quot;&quot;))">
            <text:p/>
          </table:table-cell>
          <table:table-cell table:formula="of:=IF([.AX86]=&quot;x&quot;;&quot;x&quot;;IF([.AX86]=&quot;-&quot;;&quot;-&quot;;&quot;&quot;))">
            <text:p/>
          </table:table-cell>
          <table:table-cell table:formula="of:=IF([.AY86]=&quot;x&quot;;&quot;x&quot;;IF([.AY86]=&quot;-&quot;;&quot;-&quot;;&quot;&quot;))">
            <text:p/>
          </table:table-cell>
          <table:table-cell table:formula="of:=IF([.AZ86]=&quot;x&quot;;&quot;x&quot;;IF([.AZ86]=&quot;-&quot;;&quot;-&quot;;&quot;&quot;))" office:value-type="string" office:string-value="x" calcext:value-type="string">
            <text:p>x</text:p>
          </table:table-cell>
          <table:table-cell table:formula="of:=IF([.BA86]=&quot;x&quot;;&quot;x&quot;;IF([.BA86]=&quot;-&quot;;&quot;-&quot;;&quot;&quot;))">
            <text:p/>
          </table:table-cell>
          <table:table-cell table:formula="of:=IF([.BB86]=&quot;x&quot;;&quot;x&quot;;IF([.BB86]=&quot;-&quot;;&quot;-&quot;;&quot;&quot;))">
            <text:p/>
          </table:table-cell>
          <table:table-cell table:formula="of:=IF([.BC86]=&quot;x&quot;;&quot;x&quot;;IF([.BC86]=&quot;-&quot;;&quot;-&quot;;&quot;&quot;))">
            <text:p/>
          </table:table-cell>
          <table:table-cell table:formula="of:=IF([.BD86]=&quot;x&quot;;&quot;x&quot;;IF([.BD86]=&quot;-&quot;;&quot;-&quot;;&quot;&quot;))">
            <text:p/>
          </table:table-cell>
          <table:table-cell table:formula="of:=IF([.BE86]=&quot;x&quot;;&quot;x&quot;;IF([.BE86]=&quot;-&quot;;&quot;-&quot;;&quot;&quot;))">
            <text:p/>
          </table:table-cell>
          <table:table-cell table:formula="of:=IF([.BF86]=&quot;x&quot;;&quot;x&quot;;IF([.BF86]=&quot;-&quot;;&quot;-&quot;;&quot;&quot;))">
            <text:p/>
          </table:table-cell>
          <table:table-cell table:formula="of:=IF([.BG86]=&quot;x&quot;;&quot;x&quot;;IF([.BG86]=&quot;-&quot;;&quot;-&quot;;&quot;&quot;))">
            <text:p/>
          </table:table-cell>
          <table:table-cell table:formula="of:=IF([.BH86]=&quot;x&quot;;&quot;x&quot;;IF([.BH86]=&quot;-&quot;;&quot;-&quot;;&quot;&quot;))">
            <text:p/>
          </table:table-cell>
          <table:table-cell table:formula="of:=IF([.BI86]=&quot;x&quot;;&quot;x&quot;;IF([.BI86]=&quot;-&quot;;&quot;-&quot;;&quot;&quot;))">
            <text:p/>
          </table:table-cell>
          <table:table-cell table:formula="of:=IF([.BJ86]=&quot;x&quot;;&quot;x&quot;;IF([.BJ86]=&quot;-&quot;;&quot;-&quot;;&quot;&quot;))">
            <text:p/>
          </table:table-cell>
          <table:table-cell table:formula="of:=IF([.BK86]=&quot;x&quot;;&quot;x&quot;;IF([.BK86]=&quot;-&quot;;&quot;-&quot;;&quot;&quot;))">
            <text:p/>
          </table:table-cell>
          <table:table-cell table:formula="of:=IF([.BL86]=&quot;x&quot;;&quot;x&quot;;IF([.BL86]=&quot;-&quot;;&quot;-&quot;;&quot;&quot;))">
            <text:p/>
          </table:table-cell>
          <table:table-cell table:formula="of:=IF([.BM86]=&quot;x&quot;;&quot;x&quot;;IF([.BM86]=&quot;-&quot;;&quot;-&quot;;&quot;&quot;))">
            <text:p/>
          </table:table-cell>
          <table:table-cell table:formula="of:=IF([.BN86]=&quot;x&quot;;&quot;x&quot;;IF([.BN86]=&quot;-&quot;;&quot;-&quot;;&quot;&quot;))">
            <text:p/>
          </table:table-cell>
          <table:table-cell table:formula="of:=IF([.BO86]=&quot;x&quot;;&quot;x&quot;;IF([.BO86]=&quot;-&quot;;&quot;-&quot;;&quot;&quot;))">
            <text:p/>
          </table:table-cell>
          <table:table-cell table:formula="of:=IF([.BP86]=&quot;x&quot;;&quot;x&quot;;IF([.BP86]=&quot;-&quot;;&quot;-&quot;;&quot;&quot;))">
            <text:p/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string" calcext:value-type="string">
            <text:p>TST086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720" calcext:value-type="float">
            <text:p>17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7]=&quot;x&quot;;&quot;x&quot;;IF([.AS87]=&quot;-&quot;;&quot;-&quot;;&quot;&quot;))">
            <text:p/>
          </table:table-cell>
          <table:table-cell table:formula="of:=IF([.AT87]=&quot;x&quot;;&quot;x&quot;;IF([.AT87]=&quot;-&quot;;&quot;-&quot;;&quot;&quot;))">
            <text:p/>
          </table:table-cell>
          <table:table-cell table:formula="of:=IF([.AU87]=&quot;x&quot;;&quot;x&quot;;IF([.AU87]=&quot;-&quot;;&quot;-&quot;;&quot;&quot;))">
            <text:p/>
          </table:table-cell>
          <table:table-cell table:formula="of:=IF([.AV87]=&quot;x&quot;;&quot;x&quot;;IF([.AV87]=&quot;-&quot;;&quot;-&quot;;&quot;&quot;))">
            <text:p/>
          </table:table-cell>
          <table:table-cell table:formula="of:=IF([.AW87]=&quot;x&quot;;&quot;x&quot;;IF([.AW87]=&quot;-&quot;;&quot;-&quot;;&quot;&quot;))">
            <text:p/>
          </table:table-cell>
          <table:table-cell table:formula="of:=IF([.AX87]=&quot;x&quot;;&quot;x&quot;;IF([.AX87]=&quot;-&quot;;&quot;-&quot;;&quot;&quot;))">
            <text:p/>
          </table:table-cell>
          <table:table-cell table:formula="of:=IF([.AY87]=&quot;x&quot;;&quot;x&quot;;IF([.AY87]=&quot;-&quot;;&quot;-&quot;;&quot;&quot;))">
            <text:p/>
          </table:table-cell>
          <table:table-cell table:formula="of:=IF([.AZ87]=&quot;x&quot;;&quot;x&quot;;IF([.AZ87]=&quot;-&quot;;&quot;-&quot;;&quot;&quot;))" office:value-type="string" office:string-value="x" calcext:value-type="string">
            <text:p>x</text:p>
          </table:table-cell>
          <table:table-cell table:formula="of:=IF([.BA87]=&quot;x&quot;;&quot;x&quot;;IF([.BA87]=&quot;-&quot;;&quot;-&quot;;&quot;&quot;))">
            <text:p/>
          </table:table-cell>
          <table:table-cell table:formula="of:=IF([.BB87]=&quot;x&quot;;&quot;x&quot;;IF([.BB87]=&quot;-&quot;;&quot;-&quot;;&quot;&quot;))">
            <text:p/>
          </table:table-cell>
          <table:table-cell table:formula="of:=IF([.BC87]=&quot;x&quot;;&quot;x&quot;;IF([.BC87]=&quot;-&quot;;&quot;-&quot;;&quot;&quot;))">
            <text:p/>
          </table:table-cell>
          <table:table-cell table:formula="of:=IF([.BD87]=&quot;x&quot;;&quot;x&quot;;IF([.BD87]=&quot;-&quot;;&quot;-&quot;;&quot;&quot;))">
            <text:p/>
          </table:table-cell>
          <table:table-cell table:formula="of:=IF([.BE87]=&quot;x&quot;;&quot;x&quot;;IF([.BE87]=&quot;-&quot;;&quot;-&quot;;&quot;&quot;))">
            <text:p/>
          </table:table-cell>
          <table:table-cell table:formula="of:=IF([.BF87]=&quot;x&quot;;&quot;x&quot;;IF([.BF87]=&quot;-&quot;;&quot;-&quot;;&quot;&quot;))">
            <text:p/>
          </table:table-cell>
          <table:table-cell table:formula="of:=IF([.BG87]=&quot;x&quot;;&quot;x&quot;;IF([.BG87]=&quot;-&quot;;&quot;-&quot;;&quot;&quot;))">
            <text:p/>
          </table:table-cell>
          <table:table-cell table:formula="of:=IF([.BH87]=&quot;x&quot;;&quot;x&quot;;IF([.BH87]=&quot;-&quot;;&quot;-&quot;;&quot;&quot;))">
            <text:p/>
          </table:table-cell>
          <table:table-cell table:formula="of:=IF([.BI87]=&quot;x&quot;;&quot;x&quot;;IF([.BI87]=&quot;-&quot;;&quot;-&quot;;&quot;&quot;))">
            <text:p/>
          </table:table-cell>
          <table:table-cell table:formula="of:=IF([.BJ87]=&quot;x&quot;;&quot;x&quot;;IF([.BJ87]=&quot;-&quot;;&quot;-&quot;;&quot;&quot;))">
            <text:p/>
          </table:table-cell>
          <table:table-cell table:formula="of:=IF([.BK87]=&quot;x&quot;;&quot;x&quot;;IF([.BK87]=&quot;-&quot;;&quot;-&quot;;&quot;&quot;))">
            <text:p/>
          </table:table-cell>
          <table:table-cell table:formula="of:=IF([.BL87]=&quot;x&quot;;&quot;x&quot;;IF([.BL87]=&quot;-&quot;;&quot;-&quot;;&quot;&quot;))">
            <text:p/>
          </table:table-cell>
          <table:table-cell table:formula="of:=IF([.BM87]=&quot;x&quot;;&quot;x&quot;;IF([.BM87]=&quot;-&quot;;&quot;-&quot;;&quot;&quot;))">
            <text:p/>
          </table:table-cell>
          <table:table-cell table:formula="of:=IF([.BN87]=&quot;x&quot;;&quot;x&quot;;IF([.BN87]=&quot;-&quot;;&quot;-&quot;;&quot;&quot;))">
            <text:p/>
          </table:table-cell>
          <table:table-cell table:formula="of:=IF([.BO87]=&quot;x&quot;;&quot;x&quot;;IF([.BO87]=&quot;-&quot;;&quot;-&quot;;&quot;&quot;))">
            <text:p/>
          </table:table-cell>
          <table:table-cell table:formula="of:=IF([.BP87]=&quot;x&quot;;&quot;x&quot;;IF([.BP87]=&quot;-&quot;;&quot;-&quot;;&quot;&quot;))">
            <text:p/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7" calcext:value-type="float">
            <text:p>87</text:p>
          </table:table-cell>
          <table:table-cell table:style-name="ce7" office:value-type="string" calcext:value-type="string">
            <text:p>TST087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40" calcext:value-type="float">
            <text:p>17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8]=&quot;x&quot;;&quot;x&quot;;IF([.AS88]=&quot;-&quot;;&quot;-&quot;;&quot;&quot;))">
            <text:p/>
          </table:table-cell>
          <table:table-cell table:formula="of:=IF([.AT88]=&quot;x&quot;;&quot;x&quot;;IF([.AT88]=&quot;-&quot;;&quot;-&quot;;&quot;&quot;))">
            <text:p/>
          </table:table-cell>
          <table:table-cell table:formula="of:=IF([.AU88]=&quot;x&quot;;&quot;x&quot;;IF([.AU88]=&quot;-&quot;;&quot;-&quot;;&quot;&quot;))">
            <text:p/>
          </table:table-cell>
          <table:table-cell table:formula="of:=IF([.AV88]=&quot;x&quot;;&quot;x&quot;;IF([.AV88]=&quot;-&quot;;&quot;-&quot;;&quot;&quot;))">
            <text:p/>
          </table:table-cell>
          <table:table-cell table:formula="of:=IF([.AW88]=&quot;x&quot;;&quot;x&quot;;IF([.AW88]=&quot;-&quot;;&quot;-&quot;;&quot;&quot;))">
            <text:p/>
          </table:table-cell>
          <table:table-cell table:formula="of:=IF([.AX88]=&quot;x&quot;;&quot;x&quot;;IF([.AX88]=&quot;-&quot;;&quot;-&quot;;&quot;&quot;))">
            <text:p/>
          </table:table-cell>
          <table:table-cell table:formula="of:=IF([.AY88]=&quot;x&quot;;&quot;x&quot;;IF([.AY88]=&quot;-&quot;;&quot;-&quot;;&quot;&quot;))">
            <text:p/>
          </table:table-cell>
          <table:table-cell table:formula="of:=IF([.AZ88]=&quot;x&quot;;&quot;x&quot;;IF([.AZ88]=&quot;-&quot;;&quot;-&quot;;&quot;&quot;))" office:value-type="string" office:string-value="x" calcext:value-type="string">
            <text:p>x</text:p>
          </table:table-cell>
          <table:table-cell table:formula="of:=IF([.BA88]=&quot;x&quot;;&quot;x&quot;;IF([.BA88]=&quot;-&quot;;&quot;-&quot;;&quot;&quot;))">
            <text:p/>
          </table:table-cell>
          <table:table-cell table:formula="of:=IF([.BB88]=&quot;x&quot;;&quot;x&quot;;IF([.BB88]=&quot;-&quot;;&quot;-&quot;;&quot;&quot;))">
            <text:p/>
          </table:table-cell>
          <table:table-cell table:formula="of:=IF([.BC88]=&quot;x&quot;;&quot;x&quot;;IF([.BC88]=&quot;-&quot;;&quot;-&quot;;&quot;&quot;))">
            <text:p/>
          </table:table-cell>
          <table:table-cell table:formula="of:=IF([.BD88]=&quot;x&quot;;&quot;x&quot;;IF([.BD88]=&quot;-&quot;;&quot;-&quot;;&quot;&quot;))">
            <text:p/>
          </table:table-cell>
          <table:table-cell table:formula="of:=IF([.BE88]=&quot;x&quot;;&quot;x&quot;;IF([.BE88]=&quot;-&quot;;&quot;-&quot;;&quot;&quot;))">
            <text:p/>
          </table:table-cell>
          <table:table-cell table:formula="of:=IF([.BF88]=&quot;x&quot;;&quot;x&quot;;IF([.BF88]=&quot;-&quot;;&quot;-&quot;;&quot;&quot;))">
            <text:p/>
          </table:table-cell>
          <table:table-cell table:formula="of:=IF([.BG88]=&quot;x&quot;;&quot;x&quot;;IF([.BG88]=&quot;-&quot;;&quot;-&quot;;&quot;&quot;))">
            <text:p/>
          </table:table-cell>
          <table:table-cell table:formula="of:=IF([.BH88]=&quot;x&quot;;&quot;x&quot;;IF([.BH88]=&quot;-&quot;;&quot;-&quot;;&quot;&quot;))">
            <text:p/>
          </table:table-cell>
          <table:table-cell table:formula="of:=IF([.BI88]=&quot;x&quot;;&quot;x&quot;;IF([.BI88]=&quot;-&quot;;&quot;-&quot;;&quot;&quot;))">
            <text:p/>
          </table:table-cell>
          <table:table-cell table:formula="of:=IF([.BJ88]=&quot;x&quot;;&quot;x&quot;;IF([.BJ88]=&quot;-&quot;;&quot;-&quot;;&quot;&quot;))">
            <text:p/>
          </table:table-cell>
          <table:table-cell table:formula="of:=IF([.BK88]=&quot;x&quot;;&quot;x&quot;;IF([.BK88]=&quot;-&quot;;&quot;-&quot;;&quot;&quot;))">
            <text:p/>
          </table:table-cell>
          <table:table-cell table:formula="of:=IF([.BL88]=&quot;x&quot;;&quot;x&quot;;IF([.BL88]=&quot;-&quot;;&quot;-&quot;;&quot;&quot;))">
            <text:p/>
          </table:table-cell>
          <table:table-cell table:formula="of:=IF([.BM88]=&quot;x&quot;;&quot;x&quot;;IF([.BM88]=&quot;-&quot;;&quot;-&quot;;&quot;&quot;))">
            <text:p/>
          </table:table-cell>
          <table:table-cell table:formula="of:=IF([.BN88]=&quot;x&quot;;&quot;x&quot;;IF([.BN88]=&quot;-&quot;;&quot;-&quot;;&quot;&quot;))">
            <text:p/>
          </table:table-cell>
          <table:table-cell table:formula="of:=IF([.BO88]=&quot;x&quot;;&quot;x&quot;;IF([.BO88]=&quot;-&quot;;&quot;-&quot;;&quot;&quot;))">
            <text:p/>
          </table:table-cell>
          <table:table-cell table:formula="of:=IF([.BP88]=&quot;x&quot;;&quot;x&quot;;IF([.BP88]=&quot;-&quot;;&quot;-&quot;;&quot;&quot;))">
            <text:p/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8" calcext:value-type="float">
            <text:p>88</text:p>
          </table:table-cell>
          <table:table-cell table:style-name="ce7" office:value-type="string" calcext:value-type="string">
            <text:p>TST088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760" calcext:value-type="float">
            <text:p>17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9]=&quot;x&quot;;&quot;x&quot;;IF([.AS89]=&quot;-&quot;;&quot;-&quot;;&quot;&quot;))">
            <text:p/>
          </table:table-cell>
          <table:table-cell table:formula="of:=IF([.AT89]=&quot;x&quot;;&quot;x&quot;;IF([.AT89]=&quot;-&quot;;&quot;-&quot;;&quot;&quot;))">
            <text:p/>
          </table:table-cell>
          <table:table-cell table:formula="of:=IF([.AU89]=&quot;x&quot;;&quot;x&quot;;IF([.AU89]=&quot;-&quot;;&quot;-&quot;;&quot;&quot;))">
            <text:p/>
          </table:table-cell>
          <table:table-cell table:formula="of:=IF([.AV89]=&quot;x&quot;;&quot;x&quot;;IF([.AV89]=&quot;-&quot;;&quot;-&quot;;&quot;&quot;))">
            <text:p/>
          </table:table-cell>
          <table:table-cell table:formula="of:=IF([.AW89]=&quot;x&quot;;&quot;x&quot;;IF([.AW89]=&quot;-&quot;;&quot;-&quot;;&quot;&quot;))">
            <text:p/>
          </table:table-cell>
          <table:table-cell table:formula="of:=IF([.AX89]=&quot;x&quot;;&quot;x&quot;;IF([.AX89]=&quot;-&quot;;&quot;-&quot;;&quot;&quot;))">
            <text:p/>
          </table:table-cell>
          <table:table-cell table:formula="of:=IF([.AY89]=&quot;x&quot;;&quot;x&quot;;IF([.AY89]=&quot;-&quot;;&quot;-&quot;;&quot;&quot;))">
            <text:p/>
          </table:table-cell>
          <table:table-cell table:formula="of:=IF([.AZ89]=&quot;x&quot;;&quot;x&quot;;IF([.AZ89]=&quot;-&quot;;&quot;-&quot;;&quot;&quot;))" office:value-type="string" office:string-value="x" calcext:value-type="string">
            <text:p>x</text:p>
          </table:table-cell>
          <table:table-cell table:formula="of:=IF([.BA89]=&quot;x&quot;;&quot;x&quot;;IF([.BA89]=&quot;-&quot;;&quot;-&quot;;&quot;&quot;))">
            <text:p/>
          </table:table-cell>
          <table:table-cell table:formula="of:=IF([.BB89]=&quot;x&quot;;&quot;x&quot;;IF([.BB89]=&quot;-&quot;;&quot;-&quot;;&quot;&quot;))">
            <text:p/>
          </table:table-cell>
          <table:table-cell table:formula="of:=IF([.BC89]=&quot;x&quot;;&quot;x&quot;;IF([.BC89]=&quot;-&quot;;&quot;-&quot;;&quot;&quot;))">
            <text:p/>
          </table:table-cell>
          <table:table-cell table:formula="of:=IF([.BD89]=&quot;x&quot;;&quot;x&quot;;IF([.BD89]=&quot;-&quot;;&quot;-&quot;;&quot;&quot;))">
            <text:p/>
          </table:table-cell>
          <table:table-cell table:formula="of:=IF([.BE89]=&quot;x&quot;;&quot;x&quot;;IF([.BE89]=&quot;-&quot;;&quot;-&quot;;&quot;&quot;))">
            <text:p/>
          </table:table-cell>
          <table:table-cell table:formula="of:=IF([.BF89]=&quot;x&quot;;&quot;x&quot;;IF([.BF89]=&quot;-&quot;;&quot;-&quot;;&quot;&quot;))">
            <text:p/>
          </table:table-cell>
          <table:table-cell table:formula="of:=IF([.BG89]=&quot;x&quot;;&quot;x&quot;;IF([.BG89]=&quot;-&quot;;&quot;-&quot;;&quot;&quot;))">
            <text:p/>
          </table:table-cell>
          <table:table-cell table:formula="of:=IF([.BH89]=&quot;x&quot;;&quot;x&quot;;IF([.BH89]=&quot;-&quot;;&quot;-&quot;;&quot;&quot;))">
            <text:p/>
          </table:table-cell>
          <table:table-cell table:formula="of:=IF([.BI89]=&quot;x&quot;;&quot;x&quot;;IF([.BI89]=&quot;-&quot;;&quot;-&quot;;&quot;&quot;))">
            <text:p/>
          </table:table-cell>
          <table:table-cell table:formula="of:=IF([.BJ89]=&quot;x&quot;;&quot;x&quot;;IF([.BJ89]=&quot;-&quot;;&quot;-&quot;;&quot;&quot;))">
            <text:p/>
          </table:table-cell>
          <table:table-cell table:formula="of:=IF([.BK89]=&quot;x&quot;;&quot;x&quot;;IF([.BK89]=&quot;-&quot;;&quot;-&quot;;&quot;&quot;))">
            <text:p/>
          </table:table-cell>
          <table:table-cell table:formula="of:=IF([.BL89]=&quot;x&quot;;&quot;x&quot;;IF([.BL89]=&quot;-&quot;;&quot;-&quot;;&quot;&quot;))">
            <text:p/>
          </table:table-cell>
          <table:table-cell table:formula="of:=IF([.BM89]=&quot;x&quot;;&quot;x&quot;;IF([.BM89]=&quot;-&quot;;&quot;-&quot;;&quot;&quot;))">
            <text:p/>
          </table:table-cell>
          <table:table-cell table:formula="of:=IF([.BN89]=&quot;x&quot;;&quot;x&quot;;IF([.BN89]=&quot;-&quot;;&quot;-&quot;;&quot;&quot;))">
            <text:p/>
          </table:table-cell>
          <table:table-cell table:formula="of:=IF([.BO89]=&quot;x&quot;;&quot;x&quot;;IF([.BO89]=&quot;-&quot;;&quot;-&quot;;&quot;&quot;))">
            <text:p/>
          </table:table-cell>
          <table:table-cell table:formula="of:=IF([.BP89]=&quot;x&quot;;&quot;x&quot;;IF([.BP89]=&quot;-&quot;;&quot;-&quot;;&quot;&quot;))">
            <text:p/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9" calcext:value-type="float">
            <text:p>89</text:p>
          </table:table-cell>
          <table:table-cell table:style-name="ce7" office:value-type="string" calcext:value-type="string">
            <text:p>TST089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80" calcext:value-type="float">
            <text:p>17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0]=&quot;x&quot;;&quot;x&quot;;IF([.AS90]=&quot;-&quot;;&quot;-&quot;;&quot;&quot;))">
            <text:p/>
          </table:table-cell>
          <table:table-cell table:formula="of:=IF([.AT90]=&quot;x&quot;;&quot;x&quot;;IF([.AT90]=&quot;-&quot;;&quot;-&quot;;&quot;&quot;))">
            <text:p/>
          </table:table-cell>
          <table:table-cell table:formula="of:=IF([.AU90]=&quot;x&quot;;&quot;x&quot;;IF([.AU90]=&quot;-&quot;;&quot;-&quot;;&quot;&quot;))">
            <text:p/>
          </table:table-cell>
          <table:table-cell table:formula="of:=IF([.AV90]=&quot;x&quot;;&quot;x&quot;;IF([.AV90]=&quot;-&quot;;&quot;-&quot;;&quot;&quot;))">
            <text:p/>
          </table:table-cell>
          <table:table-cell table:formula="of:=IF([.AW90]=&quot;x&quot;;&quot;x&quot;;IF([.AW90]=&quot;-&quot;;&quot;-&quot;;&quot;&quot;))">
            <text:p/>
          </table:table-cell>
          <table:table-cell table:formula="of:=IF([.AX90]=&quot;x&quot;;&quot;x&quot;;IF([.AX90]=&quot;-&quot;;&quot;-&quot;;&quot;&quot;))">
            <text:p/>
          </table:table-cell>
          <table:table-cell table:formula="of:=IF([.AY90]=&quot;x&quot;;&quot;x&quot;;IF([.AY90]=&quot;-&quot;;&quot;-&quot;;&quot;&quot;))">
            <text:p/>
          </table:table-cell>
          <table:table-cell table:formula="of:=IF([.AZ90]=&quot;x&quot;;&quot;x&quot;;IF([.AZ90]=&quot;-&quot;;&quot;-&quot;;&quot;&quot;))" office:value-type="string" office:string-value="x" calcext:value-type="string">
            <text:p>x</text:p>
          </table:table-cell>
          <table:table-cell table:formula="of:=IF([.BA90]=&quot;x&quot;;&quot;x&quot;;IF([.BA90]=&quot;-&quot;;&quot;-&quot;;&quot;&quot;))">
            <text:p/>
          </table:table-cell>
          <table:table-cell table:formula="of:=IF([.BB90]=&quot;x&quot;;&quot;x&quot;;IF([.BB90]=&quot;-&quot;;&quot;-&quot;;&quot;&quot;))">
            <text:p/>
          </table:table-cell>
          <table:table-cell table:formula="of:=IF([.BC90]=&quot;x&quot;;&quot;x&quot;;IF([.BC90]=&quot;-&quot;;&quot;-&quot;;&quot;&quot;))">
            <text:p/>
          </table:table-cell>
          <table:table-cell table:formula="of:=IF([.BD90]=&quot;x&quot;;&quot;x&quot;;IF([.BD90]=&quot;-&quot;;&quot;-&quot;;&quot;&quot;))">
            <text:p/>
          </table:table-cell>
          <table:table-cell table:formula="of:=IF([.BE90]=&quot;x&quot;;&quot;x&quot;;IF([.BE90]=&quot;-&quot;;&quot;-&quot;;&quot;&quot;))">
            <text:p/>
          </table:table-cell>
          <table:table-cell table:formula="of:=IF([.BF90]=&quot;x&quot;;&quot;x&quot;;IF([.BF90]=&quot;-&quot;;&quot;-&quot;;&quot;&quot;))">
            <text:p/>
          </table:table-cell>
          <table:table-cell table:formula="of:=IF([.BG90]=&quot;x&quot;;&quot;x&quot;;IF([.BG90]=&quot;-&quot;;&quot;-&quot;;&quot;&quot;))">
            <text:p/>
          </table:table-cell>
          <table:table-cell table:formula="of:=IF([.BH90]=&quot;x&quot;;&quot;x&quot;;IF([.BH90]=&quot;-&quot;;&quot;-&quot;;&quot;&quot;))">
            <text:p/>
          </table:table-cell>
          <table:table-cell table:formula="of:=IF([.BI90]=&quot;x&quot;;&quot;x&quot;;IF([.BI90]=&quot;-&quot;;&quot;-&quot;;&quot;&quot;))">
            <text:p/>
          </table:table-cell>
          <table:table-cell table:formula="of:=IF([.BJ90]=&quot;x&quot;;&quot;x&quot;;IF([.BJ90]=&quot;-&quot;;&quot;-&quot;;&quot;&quot;))">
            <text:p/>
          </table:table-cell>
          <table:table-cell table:formula="of:=IF([.BK90]=&quot;x&quot;;&quot;x&quot;;IF([.BK90]=&quot;-&quot;;&quot;-&quot;;&quot;&quot;))">
            <text:p/>
          </table:table-cell>
          <table:table-cell table:formula="of:=IF([.BL90]=&quot;x&quot;;&quot;x&quot;;IF([.BL90]=&quot;-&quot;;&quot;-&quot;;&quot;&quot;))">
            <text:p/>
          </table:table-cell>
          <table:table-cell table:formula="of:=IF([.BM90]=&quot;x&quot;;&quot;x&quot;;IF([.BM90]=&quot;-&quot;;&quot;-&quot;;&quot;&quot;))">
            <text:p/>
          </table:table-cell>
          <table:table-cell table:formula="of:=IF([.BN90]=&quot;x&quot;;&quot;x&quot;;IF([.BN90]=&quot;-&quot;;&quot;-&quot;;&quot;&quot;))">
            <text:p/>
          </table:table-cell>
          <table:table-cell table:formula="of:=IF([.BO90]=&quot;x&quot;;&quot;x&quot;;IF([.BO90]=&quot;-&quot;;&quot;-&quot;;&quot;&quot;))">
            <text:p/>
          </table:table-cell>
          <table:table-cell table:formula="of:=IF([.BP90]=&quot;x&quot;;&quot;x&quot;;IF([.BP90]=&quot;-&quot;;&quot;-&quot;;&quot;&quot;))">
            <text:p/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TST090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00" calcext:value-type="float">
            <text:p>18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1]=&quot;x&quot;;&quot;x&quot;;IF([.AS91]=&quot;-&quot;;&quot;-&quot;;&quot;&quot;))">
            <text:p/>
          </table:table-cell>
          <table:table-cell table:formula="of:=IF([.AT91]=&quot;x&quot;;&quot;x&quot;;IF([.AT91]=&quot;-&quot;;&quot;-&quot;;&quot;&quot;))">
            <text:p/>
          </table:table-cell>
          <table:table-cell table:formula="of:=IF([.AU91]=&quot;x&quot;;&quot;x&quot;;IF([.AU91]=&quot;-&quot;;&quot;-&quot;;&quot;&quot;))">
            <text:p/>
          </table:table-cell>
          <table:table-cell table:formula="of:=IF([.AV91]=&quot;x&quot;;&quot;x&quot;;IF([.AV91]=&quot;-&quot;;&quot;-&quot;;&quot;&quot;))">
            <text:p/>
          </table:table-cell>
          <table:table-cell table:formula="of:=IF([.AW91]=&quot;x&quot;;&quot;x&quot;;IF([.AW91]=&quot;-&quot;;&quot;-&quot;;&quot;&quot;))">
            <text:p/>
          </table:table-cell>
          <table:table-cell table:formula="of:=IF([.AX91]=&quot;x&quot;;&quot;x&quot;;IF([.AX91]=&quot;-&quot;;&quot;-&quot;;&quot;&quot;))">
            <text:p/>
          </table:table-cell>
          <table:table-cell table:formula="of:=IF([.AY91]=&quot;x&quot;;&quot;x&quot;;IF([.AY91]=&quot;-&quot;;&quot;-&quot;;&quot;&quot;))">
            <text:p/>
          </table:table-cell>
          <table:table-cell table:formula="of:=IF([.AZ91]=&quot;x&quot;;&quot;x&quot;;IF([.AZ91]=&quot;-&quot;;&quot;-&quot;;&quot;&quot;))" office:value-type="string" office:string-value="x" calcext:value-type="string">
            <text:p>x</text:p>
          </table:table-cell>
          <table:table-cell table:formula="of:=IF([.BA91]=&quot;x&quot;;&quot;x&quot;;IF([.BA91]=&quot;-&quot;;&quot;-&quot;;&quot;&quot;))">
            <text:p/>
          </table:table-cell>
          <table:table-cell table:formula="of:=IF([.BB91]=&quot;x&quot;;&quot;x&quot;;IF([.BB91]=&quot;-&quot;;&quot;-&quot;;&quot;&quot;))">
            <text:p/>
          </table:table-cell>
          <table:table-cell table:formula="of:=IF([.BC91]=&quot;x&quot;;&quot;x&quot;;IF([.BC91]=&quot;-&quot;;&quot;-&quot;;&quot;&quot;))">
            <text:p/>
          </table:table-cell>
          <table:table-cell table:formula="of:=IF([.BD91]=&quot;x&quot;;&quot;x&quot;;IF([.BD91]=&quot;-&quot;;&quot;-&quot;;&quot;&quot;))">
            <text:p/>
          </table:table-cell>
          <table:table-cell table:formula="of:=IF([.BE91]=&quot;x&quot;;&quot;x&quot;;IF([.BE91]=&quot;-&quot;;&quot;-&quot;;&quot;&quot;))">
            <text:p/>
          </table:table-cell>
          <table:table-cell table:formula="of:=IF([.BF91]=&quot;x&quot;;&quot;x&quot;;IF([.BF91]=&quot;-&quot;;&quot;-&quot;;&quot;&quot;))">
            <text:p/>
          </table:table-cell>
          <table:table-cell table:formula="of:=IF([.BG91]=&quot;x&quot;;&quot;x&quot;;IF([.BG91]=&quot;-&quot;;&quot;-&quot;;&quot;&quot;))">
            <text:p/>
          </table:table-cell>
          <table:table-cell table:formula="of:=IF([.BH91]=&quot;x&quot;;&quot;x&quot;;IF([.BH91]=&quot;-&quot;;&quot;-&quot;;&quot;&quot;))">
            <text:p/>
          </table:table-cell>
          <table:table-cell table:formula="of:=IF([.BI91]=&quot;x&quot;;&quot;x&quot;;IF([.BI91]=&quot;-&quot;;&quot;-&quot;;&quot;&quot;))">
            <text:p/>
          </table:table-cell>
          <table:table-cell table:formula="of:=IF([.BJ91]=&quot;x&quot;;&quot;x&quot;;IF([.BJ91]=&quot;-&quot;;&quot;-&quot;;&quot;&quot;))">
            <text:p/>
          </table:table-cell>
          <table:table-cell table:formula="of:=IF([.BK91]=&quot;x&quot;;&quot;x&quot;;IF([.BK91]=&quot;-&quot;;&quot;-&quot;;&quot;&quot;))">
            <text:p/>
          </table:table-cell>
          <table:table-cell table:formula="of:=IF([.BL91]=&quot;x&quot;;&quot;x&quot;;IF([.BL91]=&quot;-&quot;;&quot;-&quot;;&quot;&quot;))">
            <text:p/>
          </table:table-cell>
          <table:table-cell table:formula="of:=IF([.BM91]=&quot;x&quot;;&quot;x&quot;;IF([.BM91]=&quot;-&quot;;&quot;-&quot;;&quot;&quot;))">
            <text:p/>
          </table:table-cell>
          <table:table-cell table:formula="of:=IF([.BN91]=&quot;x&quot;;&quot;x&quot;;IF([.BN91]=&quot;-&quot;;&quot;-&quot;;&quot;&quot;))">
            <text:p/>
          </table:table-cell>
          <table:table-cell table:formula="of:=IF([.BO91]=&quot;x&quot;;&quot;x&quot;;IF([.BO91]=&quot;-&quot;;&quot;-&quot;;&quot;&quot;))">
            <text:p/>
          </table:table-cell>
          <table:table-cell table:formula="of:=IF([.BP91]=&quot;x&quot;;&quot;x&quot;;IF([.BP91]=&quot;-&quot;;&quot;-&quot;;&quot;&quot;))">
            <text:p/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string" calcext:value-type="string">
            <text:p>TST091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20" calcext:value-type="float">
            <text:p>18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2]=&quot;x&quot;;&quot;x&quot;;IF([.AS92]=&quot;-&quot;;&quot;-&quot;;&quot;&quot;))">
            <text:p/>
          </table:table-cell>
          <table:table-cell table:formula="of:=IF([.AT92]=&quot;x&quot;;&quot;x&quot;;IF([.AT92]=&quot;-&quot;;&quot;-&quot;;&quot;&quot;))">
            <text:p/>
          </table:table-cell>
          <table:table-cell table:formula="of:=IF([.AU92]=&quot;x&quot;;&quot;x&quot;;IF([.AU92]=&quot;-&quot;;&quot;-&quot;;&quot;&quot;))">
            <text:p/>
          </table:table-cell>
          <table:table-cell table:formula="of:=IF([.AV92]=&quot;x&quot;;&quot;x&quot;;IF([.AV92]=&quot;-&quot;;&quot;-&quot;;&quot;&quot;))">
            <text:p/>
          </table:table-cell>
          <table:table-cell table:formula="of:=IF([.AW92]=&quot;x&quot;;&quot;x&quot;;IF([.AW92]=&quot;-&quot;;&quot;-&quot;;&quot;&quot;))">
            <text:p/>
          </table:table-cell>
          <table:table-cell table:formula="of:=IF([.AX92]=&quot;x&quot;;&quot;x&quot;;IF([.AX92]=&quot;-&quot;;&quot;-&quot;;&quot;&quot;))">
            <text:p/>
          </table:table-cell>
          <table:table-cell table:formula="of:=IF([.AY92]=&quot;x&quot;;&quot;x&quot;;IF([.AY92]=&quot;-&quot;;&quot;-&quot;;&quot;&quot;))">
            <text:p/>
          </table:table-cell>
          <table:table-cell table:formula="of:=IF([.AZ92]=&quot;x&quot;;&quot;x&quot;;IF([.AZ92]=&quot;-&quot;;&quot;-&quot;;&quot;&quot;))" office:value-type="string" office:string-value="x" calcext:value-type="string">
            <text:p>x</text:p>
          </table:table-cell>
          <table:table-cell table:formula="of:=IF([.BA92]=&quot;x&quot;;&quot;x&quot;;IF([.BA92]=&quot;-&quot;;&quot;-&quot;;&quot;&quot;))">
            <text:p/>
          </table:table-cell>
          <table:table-cell table:formula="of:=IF([.BB92]=&quot;x&quot;;&quot;x&quot;;IF([.BB92]=&quot;-&quot;;&quot;-&quot;;&quot;&quot;))">
            <text:p/>
          </table:table-cell>
          <table:table-cell table:formula="of:=IF([.BC92]=&quot;x&quot;;&quot;x&quot;;IF([.BC92]=&quot;-&quot;;&quot;-&quot;;&quot;&quot;))">
            <text:p/>
          </table:table-cell>
          <table:table-cell table:formula="of:=IF([.BD92]=&quot;x&quot;;&quot;x&quot;;IF([.BD92]=&quot;-&quot;;&quot;-&quot;;&quot;&quot;))">
            <text:p/>
          </table:table-cell>
          <table:table-cell table:formula="of:=IF([.BE92]=&quot;x&quot;;&quot;x&quot;;IF([.BE92]=&quot;-&quot;;&quot;-&quot;;&quot;&quot;))">
            <text:p/>
          </table:table-cell>
          <table:table-cell table:formula="of:=IF([.BF92]=&quot;x&quot;;&quot;x&quot;;IF([.BF92]=&quot;-&quot;;&quot;-&quot;;&quot;&quot;))">
            <text:p/>
          </table:table-cell>
          <table:table-cell table:formula="of:=IF([.BG92]=&quot;x&quot;;&quot;x&quot;;IF([.BG92]=&quot;-&quot;;&quot;-&quot;;&quot;&quot;))">
            <text:p/>
          </table:table-cell>
          <table:table-cell table:formula="of:=IF([.BH92]=&quot;x&quot;;&quot;x&quot;;IF([.BH92]=&quot;-&quot;;&quot;-&quot;;&quot;&quot;))">
            <text:p/>
          </table:table-cell>
          <table:table-cell table:formula="of:=IF([.BI92]=&quot;x&quot;;&quot;x&quot;;IF([.BI92]=&quot;-&quot;;&quot;-&quot;;&quot;&quot;))">
            <text:p/>
          </table:table-cell>
          <table:table-cell table:formula="of:=IF([.BJ92]=&quot;x&quot;;&quot;x&quot;;IF([.BJ92]=&quot;-&quot;;&quot;-&quot;;&quot;&quot;))">
            <text:p/>
          </table:table-cell>
          <table:table-cell table:formula="of:=IF([.BK92]=&quot;x&quot;;&quot;x&quot;;IF([.BK92]=&quot;-&quot;;&quot;-&quot;;&quot;&quot;))">
            <text:p/>
          </table:table-cell>
          <table:table-cell table:formula="of:=IF([.BL92]=&quot;x&quot;;&quot;x&quot;;IF([.BL92]=&quot;-&quot;;&quot;-&quot;;&quot;&quot;))">
            <text:p/>
          </table:table-cell>
          <table:table-cell table:formula="of:=IF([.BM92]=&quot;x&quot;;&quot;x&quot;;IF([.BM92]=&quot;-&quot;;&quot;-&quot;;&quot;&quot;))">
            <text:p/>
          </table:table-cell>
          <table:table-cell table:formula="of:=IF([.BN92]=&quot;x&quot;;&quot;x&quot;;IF([.BN92]=&quot;-&quot;;&quot;-&quot;;&quot;&quot;))">
            <text:p/>
          </table:table-cell>
          <table:table-cell table:formula="of:=IF([.BO92]=&quot;x&quot;;&quot;x&quot;;IF([.BO92]=&quot;-&quot;;&quot;-&quot;;&quot;&quot;))">
            <text:p/>
          </table:table-cell>
          <table:table-cell table:formula="of:=IF([.BP92]=&quot;x&quot;;&quot;x&quot;;IF([.BP92]=&quot;-&quot;;&quot;-&quot;;&quot;&quot;))">
            <text:p/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TST092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40" calcext:value-type="float">
            <text:p>18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3]=&quot;x&quot;;&quot;x&quot;;IF([.AS93]=&quot;-&quot;;&quot;-&quot;;&quot;&quot;))">
            <text:p/>
          </table:table-cell>
          <table:table-cell table:formula="of:=IF([.AT93]=&quot;x&quot;;&quot;x&quot;;IF([.AT93]=&quot;-&quot;;&quot;-&quot;;&quot;&quot;))">
            <text:p/>
          </table:table-cell>
          <table:table-cell table:formula="of:=IF([.AU93]=&quot;x&quot;;&quot;x&quot;;IF([.AU93]=&quot;-&quot;;&quot;-&quot;;&quot;&quot;))">
            <text:p/>
          </table:table-cell>
          <table:table-cell table:formula="of:=IF([.AV93]=&quot;x&quot;;&quot;x&quot;;IF([.AV93]=&quot;-&quot;;&quot;-&quot;;&quot;&quot;))">
            <text:p/>
          </table:table-cell>
          <table:table-cell table:formula="of:=IF([.AW93]=&quot;x&quot;;&quot;x&quot;;IF([.AW93]=&quot;-&quot;;&quot;-&quot;;&quot;&quot;))">
            <text:p/>
          </table:table-cell>
          <table:table-cell table:formula="of:=IF([.AX93]=&quot;x&quot;;&quot;x&quot;;IF([.AX93]=&quot;-&quot;;&quot;-&quot;;&quot;&quot;))">
            <text:p/>
          </table:table-cell>
          <table:table-cell table:formula="of:=IF([.AY93]=&quot;x&quot;;&quot;x&quot;;IF([.AY93]=&quot;-&quot;;&quot;-&quot;;&quot;&quot;))">
            <text:p/>
          </table:table-cell>
          <table:table-cell table:formula="of:=IF([.AZ93]=&quot;x&quot;;&quot;x&quot;;IF([.AZ93]=&quot;-&quot;;&quot;-&quot;;&quot;&quot;))" office:value-type="string" office:string-value="x" calcext:value-type="string">
            <text:p>x</text:p>
          </table:table-cell>
          <table:table-cell table:formula="of:=IF([.BA93]=&quot;x&quot;;&quot;x&quot;;IF([.BA93]=&quot;-&quot;;&quot;-&quot;;&quot;&quot;))">
            <text:p/>
          </table:table-cell>
          <table:table-cell table:formula="of:=IF([.BB93]=&quot;x&quot;;&quot;x&quot;;IF([.BB93]=&quot;-&quot;;&quot;-&quot;;&quot;&quot;))">
            <text:p/>
          </table:table-cell>
          <table:table-cell table:formula="of:=IF([.BC93]=&quot;x&quot;;&quot;x&quot;;IF([.BC93]=&quot;-&quot;;&quot;-&quot;;&quot;&quot;))">
            <text:p/>
          </table:table-cell>
          <table:table-cell table:formula="of:=IF([.BD93]=&quot;x&quot;;&quot;x&quot;;IF([.BD93]=&quot;-&quot;;&quot;-&quot;;&quot;&quot;))">
            <text:p/>
          </table:table-cell>
          <table:table-cell table:formula="of:=IF([.BE93]=&quot;x&quot;;&quot;x&quot;;IF([.BE93]=&quot;-&quot;;&quot;-&quot;;&quot;&quot;))">
            <text:p/>
          </table:table-cell>
          <table:table-cell table:formula="of:=IF([.BF93]=&quot;x&quot;;&quot;x&quot;;IF([.BF93]=&quot;-&quot;;&quot;-&quot;;&quot;&quot;))">
            <text:p/>
          </table:table-cell>
          <table:table-cell table:formula="of:=IF([.BG93]=&quot;x&quot;;&quot;x&quot;;IF([.BG93]=&quot;-&quot;;&quot;-&quot;;&quot;&quot;))">
            <text:p/>
          </table:table-cell>
          <table:table-cell table:formula="of:=IF([.BH93]=&quot;x&quot;;&quot;x&quot;;IF([.BH93]=&quot;-&quot;;&quot;-&quot;;&quot;&quot;))">
            <text:p/>
          </table:table-cell>
          <table:table-cell table:formula="of:=IF([.BI93]=&quot;x&quot;;&quot;x&quot;;IF([.BI93]=&quot;-&quot;;&quot;-&quot;;&quot;&quot;))">
            <text:p/>
          </table:table-cell>
          <table:table-cell table:formula="of:=IF([.BJ93]=&quot;x&quot;;&quot;x&quot;;IF([.BJ93]=&quot;-&quot;;&quot;-&quot;;&quot;&quot;))">
            <text:p/>
          </table:table-cell>
          <table:table-cell table:formula="of:=IF([.BK93]=&quot;x&quot;;&quot;x&quot;;IF([.BK93]=&quot;-&quot;;&quot;-&quot;;&quot;&quot;))">
            <text:p/>
          </table:table-cell>
          <table:table-cell table:formula="of:=IF([.BL93]=&quot;x&quot;;&quot;x&quot;;IF([.BL93]=&quot;-&quot;;&quot;-&quot;;&quot;&quot;))">
            <text:p/>
          </table:table-cell>
          <table:table-cell table:formula="of:=IF([.BM93]=&quot;x&quot;;&quot;x&quot;;IF([.BM93]=&quot;-&quot;;&quot;-&quot;;&quot;&quot;))">
            <text:p/>
          </table:table-cell>
          <table:table-cell table:formula="of:=IF([.BN93]=&quot;x&quot;;&quot;x&quot;;IF([.BN93]=&quot;-&quot;;&quot;-&quot;;&quot;&quot;))">
            <text:p/>
          </table:table-cell>
          <table:table-cell table:formula="of:=IF([.BO93]=&quot;x&quot;;&quot;x&quot;;IF([.BO93]=&quot;-&quot;;&quot;-&quot;;&quot;&quot;))">
            <text:p/>
          </table:table-cell>
          <table:table-cell table:formula="of:=IF([.BP93]=&quot;x&quot;;&quot;x&quot;;IF([.BP93]=&quot;-&quot;;&quot;-&quot;;&quot;&quot;))">
            <text:p/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3" calcext:value-type="float">
            <text:p>93</text:p>
          </table:table-cell>
          <table:table-cell table:style-name="ce7" office:value-type="string" calcext:value-type="string">
            <text:p>TST093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60" calcext:value-type="float">
            <text:p>18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4]=&quot;x&quot;;&quot;x&quot;;IF([.AS94]=&quot;-&quot;;&quot;-&quot;;&quot;&quot;))">
            <text:p/>
          </table:table-cell>
          <table:table-cell table:formula="of:=IF([.AT94]=&quot;x&quot;;&quot;x&quot;;IF([.AT94]=&quot;-&quot;;&quot;-&quot;;&quot;&quot;))">
            <text:p/>
          </table:table-cell>
          <table:table-cell table:formula="of:=IF([.AU94]=&quot;x&quot;;&quot;x&quot;;IF([.AU94]=&quot;-&quot;;&quot;-&quot;;&quot;&quot;))">
            <text:p/>
          </table:table-cell>
          <table:table-cell table:formula="of:=IF([.AV94]=&quot;x&quot;;&quot;x&quot;;IF([.AV94]=&quot;-&quot;;&quot;-&quot;;&quot;&quot;))">
            <text:p/>
          </table:table-cell>
          <table:table-cell table:formula="of:=IF([.AW94]=&quot;x&quot;;&quot;x&quot;;IF([.AW94]=&quot;-&quot;;&quot;-&quot;;&quot;&quot;))">
            <text:p/>
          </table:table-cell>
          <table:table-cell table:formula="of:=IF([.AX94]=&quot;x&quot;;&quot;x&quot;;IF([.AX94]=&quot;-&quot;;&quot;-&quot;;&quot;&quot;))">
            <text:p/>
          </table:table-cell>
          <table:table-cell table:formula="of:=IF([.AY94]=&quot;x&quot;;&quot;x&quot;;IF([.AY94]=&quot;-&quot;;&quot;-&quot;;&quot;&quot;))">
            <text:p/>
          </table:table-cell>
          <table:table-cell table:formula="of:=IF([.AZ94]=&quot;x&quot;;&quot;x&quot;;IF([.AZ94]=&quot;-&quot;;&quot;-&quot;;&quot;&quot;))" office:value-type="string" office:string-value="x" calcext:value-type="string">
            <text:p>x</text:p>
          </table:table-cell>
          <table:table-cell table:formula="of:=IF([.BA94]=&quot;x&quot;;&quot;x&quot;;IF([.BA94]=&quot;-&quot;;&quot;-&quot;;&quot;&quot;))">
            <text:p/>
          </table:table-cell>
          <table:table-cell table:formula="of:=IF([.BB94]=&quot;x&quot;;&quot;x&quot;;IF([.BB94]=&quot;-&quot;;&quot;-&quot;;&quot;&quot;))">
            <text:p/>
          </table:table-cell>
          <table:table-cell table:formula="of:=IF([.BC94]=&quot;x&quot;;&quot;x&quot;;IF([.BC94]=&quot;-&quot;;&quot;-&quot;;&quot;&quot;))">
            <text:p/>
          </table:table-cell>
          <table:table-cell table:formula="of:=IF([.BD94]=&quot;x&quot;;&quot;x&quot;;IF([.BD94]=&quot;-&quot;;&quot;-&quot;;&quot;&quot;))">
            <text:p/>
          </table:table-cell>
          <table:table-cell table:formula="of:=IF([.BE94]=&quot;x&quot;;&quot;x&quot;;IF([.BE94]=&quot;-&quot;;&quot;-&quot;;&quot;&quot;))">
            <text:p/>
          </table:table-cell>
          <table:table-cell table:formula="of:=IF([.BF94]=&quot;x&quot;;&quot;x&quot;;IF([.BF94]=&quot;-&quot;;&quot;-&quot;;&quot;&quot;))">
            <text:p/>
          </table:table-cell>
          <table:table-cell table:formula="of:=IF([.BG94]=&quot;x&quot;;&quot;x&quot;;IF([.BG94]=&quot;-&quot;;&quot;-&quot;;&quot;&quot;))">
            <text:p/>
          </table:table-cell>
          <table:table-cell table:formula="of:=IF([.BH94]=&quot;x&quot;;&quot;x&quot;;IF([.BH94]=&quot;-&quot;;&quot;-&quot;;&quot;&quot;))">
            <text:p/>
          </table:table-cell>
          <table:table-cell table:formula="of:=IF([.BI94]=&quot;x&quot;;&quot;x&quot;;IF([.BI94]=&quot;-&quot;;&quot;-&quot;;&quot;&quot;))">
            <text:p/>
          </table:table-cell>
          <table:table-cell table:formula="of:=IF([.BJ94]=&quot;x&quot;;&quot;x&quot;;IF([.BJ94]=&quot;-&quot;;&quot;-&quot;;&quot;&quot;))">
            <text:p/>
          </table:table-cell>
          <table:table-cell table:formula="of:=IF([.BK94]=&quot;x&quot;;&quot;x&quot;;IF([.BK94]=&quot;-&quot;;&quot;-&quot;;&quot;&quot;))">
            <text:p/>
          </table:table-cell>
          <table:table-cell table:formula="of:=IF([.BL94]=&quot;x&quot;;&quot;x&quot;;IF([.BL94]=&quot;-&quot;;&quot;-&quot;;&quot;&quot;))">
            <text:p/>
          </table:table-cell>
          <table:table-cell table:formula="of:=IF([.BM94]=&quot;x&quot;;&quot;x&quot;;IF([.BM94]=&quot;-&quot;;&quot;-&quot;;&quot;&quot;))">
            <text:p/>
          </table:table-cell>
          <table:table-cell table:formula="of:=IF([.BN94]=&quot;x&quot;;&quot;x&quot;;IF([.BN94]=&quot;-&quot;;&quot;-&quot;;&quot;&quot;))">
            <text:p/>
          </table:table-cell>
          <table:table-cell table:formula="of:=IF([.BO94]=&quot;x&quot;;&quot;x&quot;;IF([.BO94]=&quot;-&quot;;&quot;-&quot;;&quot;&quot;))">
            <text:p/>
          </table:table-cell>
          <table:table-cell table:formula="of:=IF([.BP94]=&quot;x&quot;;&quot;x&quot;;IF([.BP94]=&quot;-&quot;;&quot;-&quot;;&quot;&quot;))">
            <text:p/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TST094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80" calcext:value-type="float">
            <text:p>18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5]=&quot;x&quot;;&quot;x&quot;;IF([.AS95]=&quot;-&quot;;&quot;-&quot;;&quot;&quot;))">
            <text:p/>
          </table:table-cell>
          <table:table-cell table:formula="of:=IF([.AT95]=&quot;x&quot;;&quot;x&quot;;IF([.AT95]=&quot;-&quot;;&quot;-&quot;;&quot;&quot;))">
            <text:p/>
          </table:table-cell>
          <table:table-cell table:formula="of:=IF([.AU95]=&quot;x&quot;;&quot;x&quot;;IF([.AU95]=&quot;-&quot;;&quot;-&quot;;&quot;&quot;))">
            <text:p/>
          </table:table-cell>
          <table:table-cell table:formula="of:=IF([.AV95]=&quot;x&quot;;&quot;x&quot;;IF([.AV95]=&quot;-&quot;;&quot;-&quot;;&quot;&quot;))">
            <text:p/>
          </table:table-cell>
          <table:table-cell table:formula="of:=IF([.AW95]=&quot;x&quot;;&quot;x&quot;;IF([.AW95]=&quot;-&quot;;&quot;-&quot;;&quot;&quot;))">
            <text:p/>
          </table:table-cell>
          <table:table-cell table:formula="of:=IF([.AX95]=&quot;x&quot;;&quot;x&quot;;IF([.AX95]=&quot;-&quot;;&quot;-&quot;;&quot;&quot;))">
            <text:p/>
          </table:table-cell>
          <table:table-cell table:formula="of:=IF([.AY95]=&quot;x&quot;;&quot;x&quot;;IF([.AY95]=&quot;-&quot;;&quot;-&quot;;&quot;&quot;))">
            <text:p/>
          </table:table-cell>
          <table:table-cell table:formula="of:=IF([.AZ95]=&quot;x&quot;;&quot;x&quot;;IF([.AZ95]=&quot;-&quot;;&quot;-&quot;;&quot;&quot;))" office:value-type="string" office:string-value="x" calcext:value-type="string">
            <text:p>x</text:p>
          </table:table-cell>
          <table:table-cell table:formula="of:=IF([.BA95]=&quot;x&quot;;&quot;x&quot;;IF([.BA95]=&quot;-&quot;;&quot;-&quot;;&quot;&quot;))">
            <text:p/>
          </table:table-cell>
          <table:table-cell table:formula="of:=IF([.BB95]=&quot;x&quot;;&quot;x&quot;;IF([.BB95]=&quot;-&quot;;&quot;-&quot;;&quot;&quot;))">
            <text:p/>
          </table:table-cell>
          <table:table-cell table:formula="of:=IF([.BC95]=&quot;x&quot;;&quot;x&quot;;IF([.BC95]=&quot;-&quot;;&quot;-&quot;;&quot;&quot;))">
            <text:p/>
          </table:table-cell>
          <table:table-cell table:formula="of:=IF([.BD95]=&quot;x&quot;;&quot;x&quot;;IF([.BD95]=&quot;-&quot;;&quot;-&quot;;&quot;&quot;))">
            <text:p/>
          </table:table-cell>
          <table:table-cell table:formula="of:=IF([.BE95]=&quot;x&quot;;&quot;x&quot;;IF([.BE95]=&quot;-&quot;;&quot;-&quot;;&quot;&quot;))">
            <text:p/>
          </table:table-cell>
          <table:table-cell table:formula="of:=IF([.BF95]=&quot;x&quot;;&quot;x&quot;;IF([.BF95]=&quot;-&quot;;&quot;-&quot;;&quot;&quot;))">
            <text:p/>
          </table:table-cell>
          <table:table-cell table:formula="of:=IF([.BG95]=&quot;x&quot;;&quot;x&quot;;IF([.BG95]=&quot;-&quot;;&quot;-&quot;;&quot;&quot;))">
            <text:p/>
          </table:table-cell>
          <table:table-cell table:formula="of:=IF([.BH95]=&quot;x&quot;;&quot;x&quot;;IF([.BH95]=&quot;-&quot;;&quot;-&quot;;&quot;&quot;))">
            <text:p/>
          </table:table-cell>
          <table:table-cell table:formula="of:=IF([.BI95]=&quot;x&quot;;&quot;x&quot;;IF([.BI95]=&quot;-&quot;;&quot;-&quot;;&quot;&quot;))">
            <text:p/>
          </table:table-cell>
          <table:table-cell table:formula="of:=IF([.BJ95]=&quot;x&quot;;&quot;x&quot;;IF([.BJ95]=&quot;-&quot;;&quot;-&quot;;&quot;&quot;))">
            <text:p/>
          </table:table-cell>
          <table:table-cell table:formula="of:=IF([.BK95]=&quot;x&quot;;&quot;x&quot;;IF([.BK95]=&quot;-&quot;;&quot;-&quot;;&quot;&quot;))">
            <text:p/>
          </table:table-cell>
          <table:table-cell table:formula="of:=IF([.BL95]=&quot;x&quot;;&quot;x&quot;;IF([.BL95]=&quot;-&quot;;&quot;-&quot;;&quot;&quot;))">
            <text:p/>
          </table:table-cell>
          <table:table-cell table:formula="of:=IF([.BM95]=&quot;x&quot;;&quot;x&quot;;IF([.BM95]=&quot;-&quot;;&quot;-&quot;;&quot;&quot;))">
            <text:p/>
          </table:table-cell>
          <table:table-cell table:formula="of:=IF([.BN95]=&quot;x&quot;;&quot;x&quot;;IF([.BN95]=&quot;-&quot;;&quot;-&quot;;&quot;&quot;))">
            <text:p/>
          </table:table-cell>
          <table:table-cell table:formula="of:=IF([.BO95]=&quot;x&quot;;&quot;x&quot;;IF([.BO95]=&quot;-&quot;;&quot;-&quot;;&quot;&quot;))">
            <text:p/>
          </table:table-cell>
          <table:table-cell table:formula="of:=IF([.BP95]=&quot;x&quot;;&quot;x&quot;;IF([.BP95]=&quot;-&quot;;&quot;-&quot;;&quot;&quot;))">
            <text:p/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string" calcext:value-type="string">
            <text:p>TST095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00" calcext:value-type="float">
            <text:p>19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6]=&quot;x&quot;;&quot;x&quot;;IF([.AS96]=&quot;-&quot;;&quot;-&quot;;&quot;&quot;))">
            <text:p/>
          </table:table-cell>
          <table:table-cell table:formula="of:=IF([.AT96]=&quot;x&quot;;&quot;x&quot;;IF([.AT96]=&quot;-&quot;;&quot;-&quot;;&quot;&quot;))">
            <text:p/>
          </table:table-cell>
          <table:table-cell table:formula="of:=IF([.AU96]=&quot;x&quot;;&quot;x&quot;;IF([.AU96]=&quot;-&quot;;&quot;-&quot;;&quot;&quot;))">
            <text:p/>
          </table:table-cell>
          <table:table-cell table:formula="of:=IF([.AV96]=&quot;x&quot;;&quot;x&quot;;IF([.AV96]=&quot;-&quot;;&quot;-&quot;;&quot;&quot;))">
            <text:p/>
          </table:table-cell>
          <table:table-cell table:formula="of:=IF([.AW96]=&quot;x&quot;;&quot;x&quot;;IF([.AW96]=&quot;-&quot;;&quot;-&quot;;&quot;&quot;))">
            <text:p/>
          </table:table-cell>
          <table:table-cell table:formula="of:=IF([.AX96]=&quot;x&quot;;&quot;x&quot;;IF([.AX96]=&quot;-&quot;;&quot;-&quot;;&quot;&quot;))">
            <text:p/>
          </table:table-cell>
          <table:table-cell table:formula="of:=IF([.AY96]=&quot;x&quot;;&quot;x&quot;;IF([.AY96]=&quot;-&quot;;&quot;-&quot;;&quot;&quot;))">
            <text:p/>
          </table:table-cell>
          <table:table-cell table:formula="of:=IF([.AZ96]=&quot;x&quot;;&quot;x&quot;;IF([.AZ96]=&quot;-&quot;;&quot;-&quot;;&quot;&quot;))" office:value-type="string" office:string-value="x" calcext:value-type="string">
            <text:p>x</text:p>
          </table:table-cell>
          <table:table-cell table:formula="of:=IF([.BA96]=&quot;x&quot;;&quot;x&quot;;IF([.BA96]=&quot;-&quot;;&quot;-&quot;;&quot;&quot;))">
            <text:p/>
          </table:table-cell>
          <table:table-cell table:formula="of:=IF([.BB96]=&quot;x&quot;;&quot;x&quot;;IF([.BB96]=&quot;-&quot;;&quot;-&quot;;&quot;&quot;))">
            <text:p/>
          </table:table-cell>
          <table:table-cell table:formula="of:=IF([.BC96]=&quot;x&quot;;&quot;x&quot;;IF([.BC96]=&quot;-&quot;;&quot;-&quot;;&quot;&quot;))">
            <text:p/>
          </table:table-cell>
          <table:table-cell table:formula="of:=IF([.BD96]=&quot;x&quot;;&quot;x&quot;;IF([.BD96]=&quot;-&quot;;&quot;-&quot;;&quot;&quot;))">
            <text:p/>
          </table:table-cell>
          <table:table-cell table:formula="of:=IF([.BE96]=&quot;x&quot;;&quot;x&quot;;IF([.BE96]=&quot;-&quot;;&quot;-&quot;;&quot;&quot;))">
            <text:p/>
          </table:table-cell>
          <table:table-cell table:formula="of:=IF([.BF96]=&quot;x&quot;;&quot;x&quot;;IF([.BF96]=&quot;-&quot;;&quot;-&quot;;&quot;&quot;))">
            <text:p/>
          </table:table-cell>
          <table:table-cell table:formula="of:=IF([.BG96]=&quot;x&quot;;&quot;x&quot;;IF([.BG96]=&quot;-&quot;;&quot;-&quot;;&quot;&quot;))">
            <text:p/>
          </table:table-cell>
          <table:table-cell table:formula="of:=IF([.BH96]=&quot;x&quot;;&quot;x&quot;;IF([.BH96]=&quot;-&quot;;&quot;-&quot;;&quot;&quot;))">
            <text:p/>
          </table:table-cell>
          <table:table-cell table:formula="of:=IF([.BI96]=&quot;x&quot;;&quot;x&quot;;IF([.BI96]=&quot;-&quot;;&quot;-&quot;;&quot;&quot;))">
            <text:p/>
          </table:table-cell>
          <table:table-cell table:formula="of:=IF([.BJ96]=&quot;x&quot;;&quot;x&quot;;IF([.BJ96]=&quot;-&quot;;&quot;-&quot;;&quot;&quot;))">
            <text:p/>
          </table:table-cell>
          <table:table-cell table:formula="of:=IF([.BK96]=&quot;x&quot;;&quot;x&quot;;IF([.BK96]=&quot;-&quot;;&quot;-&quot;;&quot;&quot;))">
            <text:p/>
          </table:table-cell>
          <table:table-cell table:formula="of:=IF([.BL96]=&quot;x&quot;;&quot;x&quot;;IF([.BL96]=&quot;-&quot;;&quot;-&quot;;&quot;&quot;))">
            <text:p/>
          </table:table-cell>
          <table:table-cell table:formula="of:=IF([.BM96]=&quot;x&quot;;&quot;x&quot;;IF([.BM96]=&quot;-&quot;;&quot;-&quot;;&quot;&quot;))">
            <text:p/>
          </table:table-cell>
          <table:table-cell table:formula="of:=IF([.BN96]=&quot;x&quot;;&quot;x&quot;;IF([.BN96]=&quot;-&quot;;&quot;-&quot;;&quot;&quot;))">
            <text:p/>
          </table:table-cell>
          <table:table-cell table:formula="of:=IF([.BO96]=&quot;x&quot;;&quot;x&quot;;IF([.BO96]=&quot;-&quot;;&quot;-&quot;;&quot;&quot;))">
            <text:p/>
          </table:table-cell>
          <table:table-cell table:formula="of:=IF([.BP96]=&quot;x&quot;;&quot;x&quot;;IF([.BP96]=&quot;-&quot;;&quot;-&quot;;&quot;&quot;))">
            <text:p/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string" calcext:value-type="string">
            <text:p>TST096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920" calcext:value-type="float">
            <text:p>19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7]=&quot;x&quot;;&quot;x&quot;;IF([.AS97]=&quot;-&quot;;&quot;-&quot;;&quot;&quot;))">
            <text:p/>
          </table:table-cell>
          <table:table-cell table:formula="of:=IF([.AT97]=&quot;x&quot;;&quot;x&quot;;IF([.AT97]=&quot;-&quot;;&quot;-&quot;;&quot;&quot;))">
            <text:p/>
          </table:table-cell>
          <table:table-cell table:formula="of:=IF([.AU97]=&quot;x&quot;;&quot;x&quot;;IF([.AU97]=&quot;-&quot;;&quot;-&quot;;&quot;&quot;))">
            <text:p/>
          </table:table-cell>
          <table:table-cell table:formula="of:=IF([.AV97]=&quot;x&quot;;&quot;x&quot;;IF([.AV97]=&quot;-&quot;;&quot;-&quot;;&quot;&quot;))">
            <text:p/>
          </table:table-cell>
          <table:table-cell table:formula="of:=IF([.AW97]=&quot;x&quot;;&quot;x&quot;;IF([.AW97]=&quot;-&quot;;&quot;-&quot;;&quot;&quot;))">
            <text:p/>
          </table:table-cell>
          <table:table-cell table:formula="of:=IF([.AX97]=&quot;x&quot;;&quot;x&quot;;IF([.AX97]=&quot;-&quot;;&quot;-&quot;;&quot;&quot;))">
            <text:p/>
          </table:table-cell>
          <table:table-cell table:formula="of:=IF([.AY97]=&quot;x&quot;;&quot;x&quot;;IF([.AY97]=&quot;-&quot;;&quot;-&quot;;&quot;&quot;))">
            <text:p/>
          </table:table-cell>
          <table:table-cell table:formula="of:=IF([.AZ97]=&quot;x&quot;;&quot;x&quot;;IF([.AZ97]=&quot;-&quot;;&quot;-&quot;;&quot;&quot;))" office:value-type="string" office:string-value="x" calcext:value-type="string">
            <text:p>x</text:p>
          </table:table-cell>
          <table:table-cell table:formula="of:=IF([.BA97]=&quot;x&quot;;&quot;x&quot;;IF([.BA97]=&quot;-&quot;;&quot;-&quot;;&quot;&quot;))">
            <text:p/>
          </table:table-cell>
          <table:table-cell table:formula="of:=IF([.BB97]=&quot;x&quot;;&quot;x&quot;;IF([.BB97]=&quot;-&quot;;&quot;-&quot;;&quot;&quot;))">
            <text:p/>
          </table:table-cell>
          <table:table-cell table:formula="of:=IF([.BC97]=&quot;x&quot;;&quot;x&quot;;IF([.BC97]=&quot;-&quot;;&quot;-&quot;;&quot;&quot;))">
            <text:p/>
          </table:table-cell>
          <table:table-cell table:formula="of:=IF([.BD97]=&quot;x&quot;;&quot;x&quot;;IF([.BD97]=&quot;-&quot;;&quot;-&quot;;&quot;&quot;))">
            <text:p/>
          </table:table-cell>
          <table:table-cell table:formula="of:=IF([.BE97]=&quot;x&quot;;&quot;x&quot;;IF([.BE97]=&quot;-&quot;;&quot;-&quot;;&quot;&quot;))">
            <text:p/>
          </table:table-cell>
          <table:table-cell table:formula="of:=IF([.BF97]=&quot;x&quot;;&quot;x&quot;;IF([.BF97]=&quot;-&quot;;&quot;-&quot;;&quot;&quot;))">
            <text:p/>
          </table:table-cell>
          <table:table-cell table:formula="of:=IF([.BG97]=&quot;x&quot;;&quot;x&quot;;IF([.BG97]=&quot;-&quot;;&quot;-&quot;;&quot;&quot;))">
            <text:p/>
          </table:table-cell>
          <table:table-cell table:formula="of:=IF([.BH97]=&quot;x&quot;;&quot;x&quot;;IF([.BH97]=&quot;-&quot;;&quot;-&quot;;&quot;&quot;))">
            <text:p/>
          </table:table-cell>
          <table:table-cell table:formula="of:=IF([.BI97]=&quot;x&quot;;&quot;x&quot;;IF([.BI97]=&quot;-&quot;;&quot;-&quot;;&quot;&quot;))">
            <text:p/>
          </table:table-cell>
          <table:table-cell table:formula="of:=IF([.BJ97]=&quot;x&quot;;&quot;x&quot;;IF([.BJ97]=&quot;-&quot;;&quot;-&quot;;&quot;&quot;))">
            <text:p/>
          </table:table-cell>
          <table:table-cell table:formula="of:=IF([.BK97]=&quot;x&quot;;&quot;x&quot;;IF([.BK97]=&quot;-&quot;;&quot;-&quot;;&quot;&quot;))">
            <text:p/>
          </table:table-cell>
          <table:table-cell table:formula="of:=IF([.BL97]=&quot;x&quot;;&quot;x&quot;;IF([.BL97]=&quot;-&quot;;&quot;-&quot;;&quot;&quot;))">
            <text:p/>
          </table:table-cell>
          <table:table-cell table:formula="of:=IF([.BM97]=&quot;x&quot;;&quot;x&quot;;IF([.BM97]=&quot;-&quot;;&quot;-&quot;;&quot;&quot;))">
            <text:p/>
          </table:table-cell>
          <table:table-cell table:formula="of:=IF([.BN97]=&quot;x&quot;;&quot;x&quot;;IF([.BN97]=&quot;-&quot;;&quot;-&quot;;&quot;&quot;))">
            <text:p/>
          </table:table-cell>
          <table:table-cell table:formula="of:=IF([.BO97]=&quot;x&quot;;&quot;x&quot;;IF([.BO97]=&quot;-&quot;;&quot;-&quot;;&quot;&quot;))">
            <text:p/>
          </table:table-cell>
          <table:table-cell table:formula="of:=IF([.BP97]=&quot;x&quot;;&quot;x&quot;;IF([.BP97]=&quot;-&quot;;&quot;-&quot;;&quot;&quot;))">
            <text:p/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40" calcext:value-type="float">
            <text:p>19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98]=&quot;x&quot;;&quot;x&quot;;IF([.AS98]=&quot;-&quot;;&quot;-&quot;;&quot;&quot;))">
            <text:p/>
          </table:table-cell>
          <table:table-cell table:formula="of:=IF([.AT98]=&quot;x&quot;;&quot;x&quot;;IF([.AT98]=&quot;-&quot;;&quot;-&quot;;&quot;&quot;))">
            <text:p/>
          </table:table-cell>
          <table:table-cell table:formula="of:=IF([.AU98]=&quot;x&quot;;&quot;x&quot;;IF([.AU98]=&quot;-&quot;;&quot;-&quot;;&quot;&quot;))">
            <text:p/>
          </table:table-cell>
          <table:table-cell table:formula="of:=IF([.AV98]=&quot;x&quot;;&quot;x&quot;;IF([.AV98]=&quot;-&quot;;&quot;-&quot;;&quot;&quot;))">
            <text:p/>
          </table:table-cell>
          <table:table-cell table:formula="of:=IF([.AW98]=&quot;x&quot;;&quot;x&quot;;IF([.AW98]=&quot;-&quot;;&quot;-&quot;;&quot;&quot;))">
            <text:p/>
          </table:table-cell>
          <table:table-cell table:formula="of:=IF([.AX98]=&quot;x&quot;;&quot;x&quot;;IF([.AX98]=&quot;-&quot;;&quot;-&quot;;&quot;&quot;))">
            <text:p/>
          </table:table-cell>
          <table:table-cell table:formula="of:=IF([.AY98]=&quot;x&quot;;&quot;x&quot;;IF([.AY98]=&quot;-&quot;;&quot;-&quot;;&quot;&quot;))">
            <text:p/>
          </table:table-cell>
          <table:table-cell table:formula="of:=IF([.AZ98]=&quot;x&quot;;&quot;x&quot;;IF([.AZ98]=&quot;-&quot;;&quot;-&quot;;&quot;&quot;))">
            <text:p/>
          </table:table-cell>
          <table:table-cell table:formula="of:=IF([.BA98]=&quot;x&quot;;&quot;x&quot;;IF([.BA98]=&quot;-&quot;;&quot;-&quot;;&quot;&quot;))" office:value-type="string" office:string-value="x" calcext:value-type="string">
            <text:p>x</text:p>
          </table:table-cell>
          <table:table-cell table:formula="of:=IF([.BB98]=&quot;x&quot;;&quot;x&quot;;IF([.BB98]=&quot;-&quot;;&quot;-&quot;;&quot;&quot;))">
            <text:p/>
          </table:table-cell>
          <table:table-cell table:formula="of:=IF([.BC98]=&quot;x&quot;;&quot;x&quot;;IF([.BC98]=&quot;-&quot;;&quot;-&quot;;&quot;&quot;))">
            <text:p/>
          </table:table-cell>
          <table:table-cell table:formula="of:=IF([.BD98]=&quot;x&quot;;&quot;x&quot;;IF([.BD98]=&quot;-&quot;;&quot;-&quot;;&quot;&quot;))">
            <text:p/>
          </table:table-cell>
          <table:table-cell table:formula="of:=IF([.BE98]=&quot;x&quot;;&quot;x&quot;;IF([.BE98]=&quot;-&quot;;&quot;-&quot;;&quot;&quot;))">
            <text:p/>
          </table:table-cell>
          <table:table-cell table:formula="of:=IF([.BF98]=&quot;x&quot;;&quot;x&quot;;IF([.BF98]=&quot;-&quot;;&quot;-&quot;;&quot;&quot;))">
            <text:p/>
          </table:table-cell>
          <table:table-cell table:formula="of:=IF([.BG98]=&quot;x&quot;;&quot;x&quot;;IF([.BG98]=&quot;-&quot;;&quot;-&quot;;&quot;&quot;))">
            <text:p/>
          </table:table-cell>
          <table:table-cell table:formula="of:=IF([.BH98]=&quot;x&quot;;&quot;x&quot;;IF([.BH98]=&quot;-&quot;;&quot;-&quot;;&quot;&quot;))">
            <text:p/>
          </table:table-cell>
          <table:table-cell table:formula="of:=IF([.BI98]=&quot;x&quot;;&quot;x&quot;;IF([.BI98]=&quot;-&quot;;&quot;-&quot;;&quot;&quot;))">
            <text:p/>
          </table:table-cell>
          <table:table-cell table:formula="of:=IF([.BJ98]=&quot;x&quot;;&quot;x&quot;;IF([.BJ98]=&quot;-&quot;;&quot;-&quot;;&quot;&quot;))">
            <text:p/>
          </table:table-cell>
          <table:table-cell table:formula="of:=IF([.BK98]=&quot;x&quot;;&quot;x&quot;;IF([.BK98]=&quot;-&quot;;&quot;-&quot;;&quot;&quot;))">
            <text:p/>
          </table:table-cell>
          <table:table-cell table:formula="of:=IF([.BL98]=&quot;x&quot;;&quot;x&quot;;IF([.BL98]=&quot;-&quot;;&quot;-&quot;;&quot;&quot;))">
            <text:p/>
          </table:table-cell>
          <table:table-cell table:formula="of:=IF([.BM98]=&quot;x&quot;;&quot;x&quot;;IF([.BM98]=&quot;-&quot;;&quot;-&quot;;&quot;&quot;))">
            <text:p/>
          </table:table-cell>
          <table:table-cell table:formula="of:=IF([.BN98]=&quot;x&quot;;&quot;x&quot;;IF([.BN98]=&quot;-&quot;;&quot;-&quot;;&quot;&quot;))">
            <text:p/>
          </table:table-cell>
          <table:table-cell table:formula="of:=IF([.BO98]=&quot;x&quot;;&quot;x&quot;;IF([.BO98]=&quot;-&quot;;&quot;-&quot;;&quot;&quot;))">
            <text:p/>
          </table:table-cell>
          <table:table-cell table:formula="of:=IF([.BP98]=&quot;x&quot;;&quot;x&quot;;IF([.BP98]=&quot;-&quot;;&quot;-&quot;;&quot;&quot;))">
            <text:p/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960" calcext:value-type="float">
            <text:p>19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99]=&quot;x&quot;;&quot;x&quot;;IF([.AS99]=&quot;-&quot;;&quot;-&quot;;&quot;&quot;))">
            <text:p/>
          </table:table-cell>
          <table:table-cell table:formula="of:=IF([.AT99]=&quot;x&quot;;&quot;x&quot;;IF([.AT99]=&quot;-&quot;;&quot;-&quot;;&quot;&quot;))">
            <text:p/>
          </table:table-cell>
          <table:table-cell table:formula="of:=IF([.AU99]=&quot;x&quot;;&quot;x&quot;;IF([.AU99]=&quot;-&quot;;&quot;-&quot;;&quot;&quot;))">
            <text:p/>
          </table:table-cell>
          <table:table-cell table:formula="of:=IF([.AV99]=&quot;x&quot;;&quot;x&quot;;IF([.AV99]=&quot;-&quot;;&quot;-&quot;;&quot;&quot;))">
            <text:p/>
          </table:table-cell>
          <table:table-cell table:formula="of:=IF([.AW99]=&quot;x&quot;;&quot;x&quot;;IF([.AW99]=&quot;-&quot;;&quot;-&quot;;&quot;&quot;))">
            <text:p/>
          </table:table-cell>
          <table:table-cell table:formula="of:=IF([.AX99]=&quot;x&quot;;&quot;x&quot;;IF([.AX99]=&quot;-&quot;;&quot;-&quot;;&quot;&quot;))">
            <text:p/>
          </table:table-cell>
          <table:table-cell table:formula="of:=IF([.AY99]=&quot;x&quot;;&quot;x&quot;;IF([.AY99]=&quot;-&quot;;&quot;-&quot;;&quot;&quot;))">
            <text:p/>
          </table:table-cell>
          <table:table-cell table:formula="of:=IF([.AZ99]=&quot;x&quot;;&quot;x&quot;;IF([.AZ99]=&quot;-&quot;;&quot;-&quot;;&quot;&quot;))">
            <text:p/>
          </table:table-cell>
          <table:table-cell table:formula="of:=IF([.BA99]=&quot;x&quot;;&quot;x&quot;;IF([.BA99]=&quot;-&quot;;&quot;-&quot;;&quot;&quot;))" office:value-type="string" office:string-value="x" calcext:value-type="string">
            <text:p>x</text:p>
          </table:table-cell>
          <table:table-cell table:formula="of:=IF([.BB99]=&quot;x&quot;;&quot;x&quot;;IF([.BB99]=&quot;-&quot;;&quot;-&quot;;&quot;&quot;))">
            <text:p/>
          </table:table-cell>
          <table:table-cell table:formula="of:=IF([.BC99]=&quot;x&quot;;&quot;x&quot;;IF([.BC99]=&quot;-&quot;;&quot;-&quot;;&quot;&quot;))">
            <text:p/>
          </table:table-cell>
          <table:table-cell table:formula="of:=IF([.BD99]=&quot;x&quot;;&quot;x&quot;;IF([.BD99]=&quot;-&quot;;&quot;-&quot;;&quot;&quot;))">
            <text:p/>
          </table:table-cell>
          <table:table-cell table:formula="of:=IF([.BE99]=&quot;x&quot;;&quot;x&quot;;IF([.BE99]=&quot;-&quot;;&quot;-&quot;;&quot;&quot;))">
            <text:p/>
          </table:table-cell>
          <table:table-cell table:formula="of:=IF([.BF99]=&quot;x&quot;;&quot;x&quot;;IF([.BF99]=&quot;-&quot;;&quot;-&quot;;&quot;&quot;))">
            <text:p/>
          </table:table-cell>
          <table:table-cell table:formula="of:=IF([.BG99]=&quot;x&quot;;&quot;x&quot;;IF([.BG99]=&quot;-&quot;;&quot;-&quot;;&quot;&quot;))">
            <text:p/>
          </table:table-cell>
          <table:table-cell table:formula="of:=IF([.BH99]=&quot;x&quot;;&quot;x&quot;;IF([.BH99]=&quot;-&quot;;&quot;-&quot;;&quot;&quot;))">
            <text:p/>
          </table:table-cell>
          <table:table-cell table:formula="of:=IF([.BI99]=&quot;x&quot;;&quot;x&quot;;IF([.BI99]=&quot;-&quot;;&quot;-&quot;;&quot;&quot;))">
            <text:p/>
          </table:table-cell>
          <table:table-cell table:formula="of:=IF([.BJ99]=&quot;x&quot;;&quot;x&quot;;IF([.BJ99]=&quot;-&quot;;&quot;-&quot;;&quot;&quot;))">
            <text:p/>
          </table:table-cell>
          <table:table-cell table:formula="of:=IF([.BK99]=&quot;x&quot;;&quot;x&quot;;IF([.BK99]=&quot;-&quot;;&quot;-&quot;;&quot;&quot;))">
            <text:p/>
          </table:table-cell>
          <table:table-cell table:formula="of:=IF([.BL99]=&quot;x&quot;;&quot;x&quot;;IF([.BL99]=&quot;-&quot;;&quot;-&quot;;&quot;&quot;))">
            <text:p/>
          </table:table-cell>
          <table:table-cell table:formula="of:=IF([.BM99]=&quot;x&quot;;&quot;x&quot;;IF([.BM99]=&quot;-&quot;;&quot;-&quot;;&quot;&quot;))">
            <text:p/>
          </table:table-cell>
          <table:table-cell table:formula="of:=IF([.BN99]=&quot;x&quot;;&quot;x&quot;;IF([.BN99]=&quot;-&quot;;&quot;-&quot;;&quot;&quot;))">
            <text:p/>
          </table:table-cell>
          <table:table-cell table:formula="of:=IF([.BO99]=&quot;x&quot;;&quot;x&quot;;IF([.BO99]=&quot;-&quot;;&quot;-&quot;;&quot;&quot;))">
            <text:p/>
          </table:table-cell>
          <table:table-cell table:formula="of:=IF([.BP99]=&quot;x&quot;;&quot;x&quot;;IF([.BP99]=&quot;-&quot;;&quot;-&quot;;&quot;&quot;))">
            <text:p/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80" calcext:value-type="float">
            <text:p>19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0]=&quot;x&quot;;&quot;x&quot;;IF([.AS100]=&quot;-&quot;;&quot;-&quot;;&quot;&quot;))">
            <text:p/>
          </table:table-cell>
          <table:table-cell table:formula="of:=IF([.AT100]=&quot;x&quot;;&quot;x&quot;;IF([.AT100]=&quot;-&quot;;&quot;-&quot;;&quot;&quot;))">
            <text:p/>
          </table:table-cell>
          <table:table-cell table:formula="of:=IF([.AU100]=&quot;x&quot;;&quot;x&quot;;IF([.AU100]=&quot;-&quot;;&quot;-&quot;;&quot;&quot;))">
            <text:p/>
          </table:table-cell>
          <table:table-cell table:formula="of:=IF([.AV100]=&quot;x&quot;;&quot;x&quot;;IF([.AV100]=&quot;-&quot;;&quot;-&quot;;&quot;&quot;))">
            <text:p/>
          </table:table-cell>
          <table:table-cell table:formula="of:=IF([.AW100]=&quot;x&quot;;&quot;x&quot;;IF([.AW100]=&quot;-&quot;;&quot;-&quot;;&quot;&quot;))">
            <text:p/>
          </table:table-cell>
          <table:table-cell table:formula="of:=IF([.AX100]=&quot;x&quot;;&quot;x&quot;;IF([.AX100]=&quot;-&quot;;&quot;-&quot;;&quot;&quot;))">
            <text:p/>
          </table:table-cell>
          <table:table-cell table:formula="of:=IF([.AY100]=&quot;x&quot;;&quot;x&quot;;IF([.AY100]=&quot;-&quot;;&quot;-&quot;;&quot;&quot;))">
            <text:p/>
          </table:table-cell>
          <table:table-cell table:formula="of:=IF([.AZ100]=&quot;x&quot;;&quot;x&quot;;IF([.AZ100]=&quot;-&quot;;&quot;-&quot;;&quot;&quot;))">
            <text:p/>
          </table:table-cell>
          <table:table-cell table:formula="of:=IF([.BA100]=&quot;x&quot;;&quot;x&quot;;IF([.BA100]=&quot;-&quot;;&quot;-&quot;;&quot;&quot;))" office:value-type="string" office:string-value="x" calcext:value-type="string">
            <text:p>x</text:p>
          </table:table-cell>
          <table:table-cell table:formula="of:=IF([.BB100]=&quot;x&quot;;&quot;x&quot;;IF([.BB100]=&quot;-&quot;;&quot;-&quot;;&quot;&quot;))">
            <text:p/>
          </table:table-cell>
          <table:table-cell table:formula="of:=IF([.BC100]=&quot;x&quot;;&quot;x&quot;;IF([.BC100]=&quot;-&quot;;&quot;-&quot;;&quot;&quot;))">
            <text:p/>
          </table:table-cell>
          <table:table-cell table:formula="of:=IF([.BD100]=&quot;x&quot;;&quot;x&quot;;IF([.BD100]=&quot;-&quot;;&quot;-&quot;;&quot;&quot;))">
            <text:p/>
          </table:table-cell>
          <table:table-cell table:formula="of:=IF([.BE100]=&quot;x&quot;;&quot;x&quot;;IF([.BE100]=&quot;-&quot;;&quot;-&quot;;&quot;&quot;))">
            <text:p/>
          </table:table-cell>
          <table:table-cell table:formula="of:=IF([.BF100]=&quot;x&quot;;&quot;x&quot;;IF([.BF100]=&quot;-&quot;;&quot;-&quot;;&quot;&quot;))">
            <text:p/>
          </table:table-cell>
          <table:table-cell table:formula="of:=IF([.BG100]=&quot;x&quot;;&quot;x&quot;;IF([.BG100]=&quot;-&quot;;&quot;-&quot;;&quot;&quot;))">
            <text:p/>
          </table:table-cell>
          <table:table-cell table:formula="of:=IF([.BH100]=&quot;x&quot;;&quot;x&quot;;IF([.BH100]=&quot;-&quot;;&quot;-&quot;;&quot;&quot;))">
            <text:p/>
          </table:table-cell>
          <table:table-cell table:formula="of:=IF([.BI100]=&quot;x&quot;;&quot;x&quot;;IF([.BI100]=&quot;-&quot;;&quot;-&quot;;&quot;&quot;))">
            <text:p/>
          </table:table-cell>
          <table:table-cell table:formula="of:=IF([.BJ100]=&quot;x&quot;;&quot;x&quot;;IF([.BJ100]=&quot;-&quot;;&quot;-&quot;;&quot;&quot;))">
            <text:p/>
          </table:table-cell>
          <table:table-cell table:formula="of:=IF([.BK100]=&quot;x&quot;;&quot;x&quot;;IF([.BK100]=&quot;-&quot;;&quot;-&quot;;&quot;&quot;))">
            <text:p/>
          </table:table-cell>
          <table:table-cell table:formula="of:=IF([.BL100]=&quot;x&quot;;&quot;x&quot;;IF([.BL100]=&quot;-&quot;;&quot;-&quot;;&quot;&quot;))">
            <text:p/>
          </table:table-cell>
          <table:table-cell table:formula="of:=IF([.BM100]=&quot;x&quot;;&quot;x&quot;;IF([.BM100]=&quot;-&quot;;&quot;-&quot;;&quot;&quot;))">
            <text:p/>
          </table:table-cell>
          <table:table-cell table:formula="of:=IF([.BN100]=&quot;x&quot;;&quot;x&quot;;IF([.BN100]=&quot;-&quot;;&quot;-&quot;;&quot;&quot;))">
            <text:p/>
          </table:table-cell>
          <table:table-cell table:formula="of:=IF([.BO100]=&quot;x&quot;;&quot;x&quot;;IF([.BO100]=&quot;-&quot;;&quot;-&quot;;&quot;&quot;))">
            <text:p/>
          </table:table-cell>
          <table:table-cell table:formula="of:=IF([.BP100]=&quot;x&quot;;&quot;x&quot;;IF([.BP100]=&quot;-&quot;;&quot;-&quot;;&quot;&quot;))">
            <text:p/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0" calcext:value-type="float">
            <text:p>20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1]=&quot;x&quot;;&quot;x&quot;;IF([.AS101]=&quot;-&quot;;&quot;-&quot;;&quot;&quot;))">
            <text:p/>
          </table:table-cell>
          <table:table-cell table:formula="of:=IF([.AT101]=&quot;x&quot;;&quot;x&quot;;IF([.AT101]=&quot;-&quot;;&quot;-&quot;;&quot;&quot;))">
            <text:p/>
          </table:table-cell>
          <table:table-cell table:formula="of:=IF([.AU101]=&quot;x&quot;;&quot;x&quot;;IF([.AU101]=&quot;-&quot;;&quot;-&quot;;&quot;&quot;))">
            <text:p/>
          </table:table-cell>
          <table:table-cell table:formula="of:=IF([.AV101]=&quot;x&quot;;&quot;x&quot;;IF([.AV101]=&quot;-&quot;;&quot;-&quot;;&quot;&quot;))">
            <text:p/>
          </table:table-cell>
          <table:table-cell table:formula="of:=IF([.AW101]=&quot;x&quot;;&quot;x&quot;;IF([.AW101]=&quot;-&quot;;&quot;-&quot;;&quot;&quot;))">
            <text:p/>
          </table:table-cell>
          <table:table-cell table:formula="of:=IF([.AX101]=&quot;x&quot;;&quot;x&quot;;IF([.AX101]=&quot;-&quot;;&quot;-&quot;;&quot;&quot;))">
            <text:p/>
          </table:table-cell>
          <table:table-cell table:formula="of:=IF([.AY101]=&quot;x&quot;;&quot;x&quot;;IF([.AY101]=&quot;-&quot;;&quot;-&quot;;&quot;&quot;))">
            <text:p/>
          </table:table-cell>
          <table:table-cell table:formula="of:=IF([.AZ101]=&quot;x&quot;;&quot;x&quot;;IF([.AZ101]=&quot;-&quot;;&quot;-&quot;;&quot;&quot;))">
            <text:p/>
          </table:table-cell>
          <table:table-cell table:formula="of:=IF([.BA101]=&quot;x&quot;;&quot;x&quot;;IF([.BA101]=&quot;-&quot;;&quot;-&quot;;&quot;&quot;))" office:value-type="string" office:string-value="x" calcext:value-type="string">
            <text:p>x</text:p>
          </table:table-cell>
          <table:table-cell table:formula="of:=IF([.BB101]=&quot;x&quot;;&quot;x&quot;;IF([.BB101]=&quot;-&quot;;&quot;-&quot;;&quot;&quot;))">
            <text:p/>
          </table:table-cell>
          <table:table-cell table:formula="of:=IF([.BC101]=&quot;x&quot;;&quot;x&quot;;IF([.BC101]=&quot;-&quot;;&quot;-&quot;;&quot;&quot;))">
            <text:p/>
          </table:table-cell>
          <table:table-cell table:formula="of:=IF([.BD101]=&quot;x&quot;;&quot;x&quot;;IF([.BD101]=&quot;-&quot;;&quot;-&quot;;&quot;&quot;))">
            <text:p/>
          </table:table-cell>
          <table:table-cell table:formula="of:=IF([.BE101]=&quot;x&quot;;&quot;x&quot;;IF([.BE101]=&quot;-&quot;;&quot;-&quot;;&quot;&quot;))">
            <text:p/>
          </table:table-cell>
          <table:table-cell table:formula="of:=IF([.BF101]=&quot;x&quot;;&quot;x&quot;;IF([.BF101]=&quot;-&quot;;&quot;-&quot;;&quot;&quot;))">
            <text:p/>
          </table:table-cell>
          <table:table-cell table:formula="of:=IF([.BG101]=&quot;x&quot;;&quot;x&quot;;IF([.BG101]=&quot;-&quot;;&quot;-&quot;;&quot;&quot;))">
            <text:p/>
          </table:table-cell>
          <table:table-cell table:formula="of:=IF([.BH101]=&quot;x&quot;;&quot;x&quot;;IF([.BH101]=&quot;-&quot;;&quot;-&quot;;&quot;&quot;))">
            <text:p/>
          </table:table-cell>
          <table:table-cell table:formula="of:=IF([.BI101]=&quot;x&quot;;&quot;x&quot;;IF([.BI101]=&quot;-&quot;;&quot;-&quot;;&quot;&quot;))">
            <text:p/>
          </table:table-cell>
          <table:table-cell table:formula="of:=IF([.BJ101]=&quot;x&quot;;&quot;x&quot;;IF([.BJ101]=&quot;-&quot;;&quot;-&quot;;&quot;&quot;))">
            <text:p/>
          </table:table-cell>
          <table:table-cell table:formula="of:=IF([.BK101]=&quot;x&quot;;&quot;x&quot;;IF([.BK101]=&quot;-&quot;;&quot;-&quot;;&quot;&quot;))">
            <text:p/>
          </table:table-cell>
          <table:table-cell table:formula="of:=IF([.BL101]=&quot;x&quot;;&quot;x&quot;;IF([.BL101]=&quot;-&quot;;&quot;-&quot;;&quot;&quot;))">
            <text:p/>
          </table:table-cell>
          <table:table-cell table:formula="of:=IF([.BM101]=&quot;x&quot;;&quot;x&quot;;IF([.BM101]=&quot;-&quot;;&quot;-&quot;;&quot;&quot;))">
            <text:p/>
          </table:table-cell>
          <table:table-cell table:formula="of:=IF([.BN101]=&quot;x&quot;;&quot;x&quot;;IF([.BN101]=&quot;-&quot;;&quot;-&quot;;&quot;&quot;))">
            <text:p/>
          </table:table-cell>
          <table:table-cell table:formula="of:=IF([.BO101]=&quot;x&quot;;&quot;x&quot;;IF([.BO101]=&quot;-&quot;;&quot;-&quot;;&quot;&quot;))">
            <text:p/>
          </table:table-cell>
          <table:table-cell table:formula="of:=IF([.BP101]=&quot;x&quot;;&quot;x&quot;;IF([.BP101]=&quot;-&quot;;&quot;-&quot;;&quot;&quot;))">
            <text:p/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2]=&quot;x&quot;;&quot;x&quot;;IF([.AS102]=&quot;-&quot;;&quot;-&quot;;&quot;&quot;))">
            <text:p/>
          </table:table-cell>
          <table:table-cell table:formula="of:=IF([.AT102]=&quot;x&quot;;&quot;x&quot;;IF([.AT102]=&quot;-&quot;;&quot;-&quot;;&quot;&quot;))">
            <text:p/>
          </table:table-cell>
          <table:table-cell table:formula="of:=IF([.AU102]=&quot;x&quot;;&quot;x&quot;;IF([.AU102]=&quot;-&quot;;&quot;-&quot;;&quot;&quot;))">
            <text:p/>
          </table:table-cell>
          <table:table-cell table:formula="of:=IF([.AV102]=&quot;x&quot;;&quot;x&quot;;IF([.AV102]=&quot;-&quot;;&quot;-&quot;;&quot;&quot;))">
            <text:p/>
          </table:table-cell>
          <table:table-cell table:formula="of:=IF([.AW102]=&quot;x&quot;;&quot;x&quot;;IF([.AW102]=&quot;-&quot;;&quot;-&quot;;&quot;&quot;))">
            <text:p/>
          </table:table-cell>
          <table:table-cell table:formula="of:=IF([.AX102]=&quot;x&quot;;&quot;x&quot;;IF([.AX102]=&quot;-&quot;;&quot;-&quot;;&quot;&quot;))">
            <text:p/>
          </table:table-cell>
          <table:table-cell table:formula="of:=IF([.AY102]=&quot;x&quot;;&quot;x&quot;;IF([.AY102]=&quot;-&quot;;&quot;-&quot;;&quot;&quot;))">
            <text:p/>
          </table:table-cell>
          <table:table-cell table:formula="of:=IF([.AZ102]=&quot;x&quot;;&quot;x&quot;;IF([.AZ102]=&quot;-&quot;;&quot;-&quot;;&quot;&quot;))">
            <text:p/>
          </table:table-cell>
          <table:table-cell table:formula="of:=IF([.BA102]=&quot;x&quot;;&quot;x&quot;;IF([.BA102]=&quot;-&quot;;&quot;-&quot;;&quot;&quot;))" office:value-type="string" office:string-value="x" calcext:value-type="string">
            <text:p>x</text:p>
          </table:table-cell>
          <table:table-cell table:formula="of:=IF([.BB102]=&quot;x&quot;;&quot;x&quot;;IF([.BB102]=&quot;-&quot;;&quot;-&quot;;&quot;&quot;))">
            <text:p/>
          </table:table-cell>
          <table:table-cell table:formula="of:=IF([.BC102]=&quot;x&quot;;&quot;x&quot;;IF([.BC102]=&quot;-&quot;;&quot;-&quot;;&quot;&quot;))">
            <text:p/>
          </table:table-cell>
          <table:table-cell table:formula="of:=IF([.BD102]=&quot;x&quot;;&quot;x&quot;;IF([.BD102]=&quot;-&quot;;&quot;-&quot;;&quot;&quot;))">
            <text:p/>
          </table:table-cell>
          <table:table-cell table:formula="of:=IF([.BE102]=&quot;x&quot;;&quot;x&quot;;IF([.BE102]=&quot;-&quot;;&quot;-&quot;;&quot;&quot;))">
            <text:p/>
          </table:table-cell>
          <table:table-cell table:formula="of:=IF([.BF102]=&quot;x&quot;;&quot;x&quot;;IF([.BF102]=&quot;-&quot;;&quot;-&quot;;&quot;&quot;))">
            <text:p/>
          </table:table-cell>
          <table:table-cell table:formula="of:=IF([.BG102]=&quot;x&quot;;&quot;x&quot;;IF([.BG102]=&quot;-&quot;;&quot;-&quot;;&quot;&quot;))">
            <text:p/>
          </table:table-cell>
          <table:table-cell table:formula="of:=IF([.BH102]=&quot;x&quot;;&quot;x&quot;;IF([.BH102]=&quot;-&quot;;&quot;-&quot;;&quot;&quot;))">
            <text:p/>
          </table:table-cell>
          <table:table-cell table:formula="of:=IF([.BI102]=&quot;x&quot;;&quot;x&quot;;IF([.BI102]=&quot;-&quot;;&quot;-&quot;;&quot;&quot;))">
            <text:p/>
          </table:table-cell>
          <table:table-cell table:formula="of:=IF([.BJ102]=&quot;x&quot;;&quot;x&quot;;IF([.BJ102]=&quot;-&quot;;&quot;-&quot;;&quot;&quot;))">
            <text:p/>
          </table:table-cell>
          <table:table-cell table:formula="of:=IF([.BK102]=&quot;x&quot;;&quot;x&quot;;IF([.BK102]=&quot;-&quot;;&quot;-&quot;;&quot;&quot;))">
            <text:p/>
          </table:table-cell>
          <table:table-cell table:formula="of:=IF([.BL102]=&quot;x&quot;;&quot;x&quot;;IF([.BL102]=&quot;-&quot;;&quot;-&quot;;&quot;&quot;))">
            <text:p/>
          </table:table-cell>
          <table:table-cell table:formula="of:=IF([.BM102]=&quot;x&quot;;&quot;x&quot;;IF([.BM102]=&quot;-&quot;;&quot;-&quot;;&quot;&quot;))">
            <text:p/>
          </table:table-cell>
          <table:table-cell table:formula="of:=IF([.BN102]=&quot;x&quot;;&quot;x&quot;;IF([.BN102]=&quot;-&quot;;&quot;-&quot;;&quot;&quot;))">
            <text:p/>
          </table:table-cell>
          <table:table-cell table:formula="of:=IF([.BO102]=&quot;x&quot;;&quot;x&quot;;IF([.BO102]=&quot;-&quot;;&quot;-&quot;;&quot;&quot;))">
            <text:p/>
          </table:table-cell>
          <table:table-cell table:formula="of:=IF([.BP102]=&quot;x&quot;;&quot;x&quot;;IF([.BP102]=&quot;-&quot;;&quot;-&quot;;&quot;&quot;))">
            <text:p/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3]=&quot;x&quot;;&quot;x&quot;;IF([.AS103]=&quot;-&quot;;&quot;-&quot;;&quot;&quot;))">
            <text:p/>
          </table:table-cell>
          <table:table-cell table:formula="of:=IF([.AT103]=&quot;x&quot;;&quot;x&quot;;IF([.AT103]=&quot;-&quot;;&quot;-&quot;;&quot;&quot;))">
            <text:p/>
          </table:table-cell>
          <table:table-cell table:formula="of:=IF([.AU103]=&quot;x&quot;;&quot;x&quot;;IF([.AU103]=&quot;-&quot;;&quot;-&quot;;&quot;&quot;))">
            <text:p/>
          </table:table-cell>
          <table:table-cell table:formula="of:=IF([.AV103]=&quot;x&quot;;&quot;x&quot;;IF([.AV103]=&quot;-&quot;;&quot;-&quot;;&quot;&quot;))">
            <text:p/>
          </table:table-cell>
          <table:table-cell table:formula="of:=IF([.AW103]=&quot;x&quot;;&quot;x&quot;;IF([.AW103]=&quot;-&quot;;&quot;-&quot;;&quot;&quot;))">
            <text:p/>
          </table:table-cell>
          <table:table-cell table:formula="of:=IF([.AX103]=&quot;x&quot;;&quot;x&quot;;IF([.AX103]=&quot;-&quot;;&quot;-&quot;;&quot;&quot;))">
            <text:p/>
          </table:table-cell>
          <table:table-cell table:formula="of:=IF([.AY103]=&quot;x&quot;;&quot;x&quot;;IF([.AY103]=&quot;-&quot;;&quot;-&quot;;&quot;&quot;))">
            <text:p/>
          </table:table-cell>
          <table:table-cell table:formula="of:=IF([.AZ103]=&quot;x&quot;;&quot;x&quot;;IF([.AZ103]=&quot;-&quot;;&quot;-&quot;;&quot;&quot;))">
            <text:p/>
          </table:table-cell>
          <table:table-cell table:formula="of:=IF([.BA103]=&quot;x&quot;;&quot;x&quot;;IF([.BA103]=&quot;-&quot;;&quot;-&quot;;&quot;&quot;))" office:value-type="string" office:string-value="x" calcext:value-type="string">
            <text:p>x</text:p>
          </table:table-cell>
          <table:table-cell table:formula="of:=IF([.BB103]=&quot;x&quot;;&quot;x&quot;;IF([.BB103]=&quot;-&quot;;&quot;-&quot;;&quot;&quot;))">
            <text:p/>
          </table:table-cell>
          <table:table-cell table:formula="of:=IF([.BC103]=&quot;x&quot;;&quot;x&quot;;IF([.BC103]=&quot;-&quot;;&quot;-&quot;;&quot;&quot;))">
            <text:p/>
          </table:table-cell>
          <table:table-cell table:formula="of:=IF([.BD103]=&quot;x&quot;;&quot;x&quot;;IF([.BD103]=&quot;-&quot;;&quot;-&quot;;&quot;&quot;))">
            <text:p/>
          </table:table-cell>
          <table:table-cell table:formula="of:=IF([.BE103]=&quot;x&quot;;&quot;x&quot;;IF([.BE103]=&quot;-&quot;;&quot;-&quot;;&quot;&quot;))">
            <text:p/>
          </table:table-cell>
          <table:table-cell table:formula="of:=IF([.BF103]=&quot;x&quot;;&quot;x&quot;;IF([.BF103]=&quot;-&quot;;&quot;-&quot;;&quot;&quot;))">
            <text:p/>
          </table:table-cell>
          <table:table-cell table:formula="of:=IF([.BG103]=&quot;x&quot;;&quot;x&quot;;IF([.BG103]=&quot;-&quot;;&quot;-&quot;;&quot;&quot;))">
            <text:p/>
          </table:table-cell>
          <table:table-cell table:formula="of:=IF([.BH103]=&quot;x&quot;;&quot;x&quot;;IF([.BH103]=&quot;-&quot;;&quot;-&quot;;&quot;&quot;))">
            <text:p/>
          </table:table-cell>
          <table:table-cell table:formula="of:=IF([.BI103]=&quot;x&quot;;&quot;x&quot;;IF([.BI103]=&quot;-&quot;;&quot;-&quot;;&quot;&quot;))">
            <text:p/>
          </table:table-cell>
          <table:table-cell table:formula="of:=IF([.BJ103]=&quot;x&quot;;&quot;x&quot;;IF([.BJ103]=&quot;-&quot;;&quot;-&quot;;&quot;&quot;))">
            <text:p/>
          </table:table-cell>
          <table:table-cell table:formula="of:=IF([.BK103]=&quot;x&quot;;&quot;x&quot;;IF([.BK103]=&quot;-&quot;;&quot;-&quot;;&quot;&quot;))">
            <text:p/>
          </table:table-cell>
          <table:table-cell table:formula="of:=IF([.BL103]=&quot;x&quot;;&quot;x&quot;;IF([.BL103]=&quot;-&quot;;&quot;-&quot;;&quot;&quot;))">
            <text:p/>
          </table:table-cell>
          <table:table-cell table:formula="of:=IF([.BM103]=&quot;x&quot;;&quot;x&quot;;IF([.BM103]=&quot;-&quot;;&quot;-&quot;;&quot;&quot;))">
            <text:p/>
          </table:table-cell>
          <table:table-cell table:formula="of:=IF([.BN103]=&quot;x&quot;;&quot;x&quot;;IF([.BN103]=&quot;-&quot;;&quot;-&quot;;&quot;&quot;))">
            <text:p/>
          </table:table-cell>
          <table:table-cell table:formula="of:=IF([.BO103]=&quot;x&quot;;&quot;x&quot;;IF([.BO103]=&quot;-&quot;;&quot;-&quot;;&quot;&quot;))">
            <text:p/>
          </table:table-cell>
          <table:table-cell table:formula="of:=IF([.BP103]=&quot;x&quot;;&quot;x&quot;;IF([.BP103]=&quot;-&quot;;&quot;-&quot;;&quot;&quot;))">
            <text:p/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4]=&quot;x&quot;;&quot;x&quot;;IF([.AS104]=&quot;-&quot;;&quot;-&quot;;&quot;&quot;))">
            <text:p/>
          </table:table-cell>
          <table:table-cell table:formula="of:=IF([.AT104]=&quot;x&quot;;&quot;x&quot;;IF([.AT104]=&quot;-&quot;;&quot;-&quot;;&quot;&quot;))">
            <text:p/>
          </table:table-cell>
          <table:table-cell table:formula="of:=IF([.AU104]=&quot;x&quot;;&quot;x&quot;;IF([.AU104]=&quot;-&quot;;&quot;-&quot;;&quot;&quot;))">
            <text:p/>
          </table:table-cell>
          <table:table-cell table:formula="of:=IF([.AV104]=&quot;x&quot;;&quot;x&quot;;IF([.AV104]=&quot;-&quot;;&quot;-&quot;;&quot;&quot;))">
            <text:p/>
          </table:table-cell>
          <table:table-cell table:formula="of:=IF([.AW104]=&quot;x&quot;;&quot;x&quot;;IF([.AW104]=&quot;-&quot;;&quot;-&quot;;&quot;&quot;))">
            <text:p/>
          </table:table-cell>
          <table:table-cell table:formula="of:=IF([.AX104]=&quot;x&quot;;&quot;x&quot;;IF([.AX104]=&quot;-&quot;;&quot;-&quot;;&quot;&quot;))">
            <text:p/>
          </table:table-cell>
          <table:table-cell table:formula="of:=IF([.AY104]=&quot;x&quot;;&quot;x&quot;;IF([.AY104]=&quot;-&quot;;&quot;-&quot;;&quot;&quot;))">
            <text:p/>
          </table:table-cell>
          <table:table-cell table:formula="of:=IF([.AZ104]=&quot;x&quot;;&quot;x&quot;;IF([.AZ104]=&quot;-&quot;;&quot;-&quot;;&quot;&quot;))">
            <text:p/>
          </table:table-cell>
          <table:table-cell table:formula="of:=IF([.BA104]=&quot;x&quot;;&quot;x&quot;;IF([.BA104]=&quot;-&quot;;&quot;-&quot;;&quot;&quot;))" office:value-type="string" office:string-value="x" calcext:value-type="string">
            <text:p>x</text:p>
          </table:table-cell>
          <table:table-cell table:formula="of:=IF([.BB104]=&quot;x&quot;;&quot;x&quot;;IF([.BB104]=&quot;-&quot;;&quot;-&quot;;&quot;&quot;))">
            <text:p/>
          </table:table-cell>
          <table:table-cell table:formula="of:=IF([.BC104]=&quot;x&quot;;&quot;x&quot;;IF([.BC104]=&quot;-&quot;;&quot;-&quot;;&quot;&quot;))">
            <text:p/>
          </table:table-cell>
          <table:table-cell table:formula="of:=IF([.BD104]=&quot;x&quot;;&quot;x&quot;;IF([.BD104]=&quot;-&quot;;&quot;-&quot;;&quot;&quot;))">
            <text:p/>
          </table:table-cell>
          <table:table-cell table:formula="of:=IF([.BE104]=&quot;x&quot;;&quot;x&quot;;IF([.BE104]=&quot;-&quot;;&quot;-&quot;;&quot;&quot;))">
            <text:p/>
          </table:table-cell>
          <table:table-cell table:formula="of:=IF([.BF104]=&quot;x&quot;;&quot;x&quot;;IF([.BF104]=&quot;-&quot;;&quot;-&quot;;&quot;&quot;))">
            <text:p/>
          </table:table-cell>
          <table:table-cell table:formula="of:=IF([.BG104]=&quot;x&quot;;&quot;x&quot;;IF([.BG104]=&quot;-&quot;;&quot;-&quot;;&quot;&quot;))">
            <text:p/>
          </table:table-cell>
          <table:table-cell table:formula="of:=IF([.BH104]=&quot;x&quot;;&quot;x&quot;;IF([.BH104]=&quot;-&quot;;&quot;-&quot;;&quot;&quot;))">
            <text:p/>
          </table:table-cell>
          <table:table-cell table:formula="of:=IF([.BI104]=&quot;x&quot;;&quot;x&quot;;IF([.BI104]=&quot;-&quot;;&quot;-&quot;;&quot;&quot;))">
            <text:p/>
          </table:table-cell>
          <table:table-cell table:formula="of:=IF([.BJ104]=&quot;x&quot;;&quot;x&quot;;IF([.BJ104]=&quot;-&quot;;&quot;-&quot;;&quot;&quot;))">
            <text:p/>
          </table:table-cell>
          <table:table-cell table:formula="of:=IF([.BK104]=&quot;x&quot;;&quot;x&quot;;IF([.BK104]=&quot;-&quot;;&quot;-&quot;;&quot;&quot;))">
            <text:p/>
          </table:table-cell>
          <table:table-cell table:formula="of:=IF([.BL104]=&quot;x&quot;;&quot;x&quot;;IF([.BL104]=&quot;-&quot;;&quot;-&quot;;&quot;&quot;))">
            <text:p/>
          </table:table-cell>
          <table:table-cell table:formula="of:=IF([.BM104]=&quot;x&quot;;&quot;x&quot;;IF([.BM104]=&quot;-&quot;;&quot;-&quot;;&quot;&quot;))">
            <text:p/>
          </table:table-cell>
          <table:table-cell table:formula="of:=IF([.BN104]=&quot;x&quot;;&quot;x&quot;;IF([.BN104]=&quot;-&quot;;&quot;-&quot;;&quot;&quot;))">
            <text:p/>
          </table:table-cell>
          <table:table-cell table:formula="of:=IF([.BO104]=&quot;x&quot;;&quot;x&quot;;IF([.BO104]=&quot;-&quot;;&quot;-&quot;;&quot;&quot;))">
            <text:p/>
          </table:table-cell>
          <table:table-cell table:formula="of:=IF([.BP104]=&quot;x&quot;;&quot;x&quot;;IF([.BP104]=&quot;-&quot;;&quot;-&quot;;&quot;&quot;))">
            <text:p/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5]=&quot;x&quot;;&quot;x&quot;;IF([.AS105]=&quot;-&quot;;&quot;-&quot;;&quot;&quot;))">
            <text:p/>
          </table:table-cell>
          <table:table-cell table:formula="of:=IF([.AT105]=&quot;x&quot;;&quot;x&quot;;IF([.AT105]=&quot;-&quot;;&quot;-&quot;;&quot;&quot;))">
            <text:p/>
          </table:table-cell>
          <table:table-cell table:formula="of:=IF([.AU105]=&quot;x&quot;;&quot;x&quot;;IF([.AU105]=&quot;-&quot;;&quot;-&quot;;&quot;&quot;))">
            <text:p/>
          </table:table-cell>
          <table:table-cell table:formula="of:=IF([.AV105]=&quot;x&quot;;&quot;x&quot;;IF([.AV105]=&quot;-&quot;;&quot;-&quot;;&quot;&quot;))">
            <text:p/>
          </table:table-cell>
          <table:table-cell table:formula="of:=IF([.AW105]=&quot;x&quot;;&quot;x&quot;;IF([.AW105]=&quot;-&quot;;&quot;-&quot;;&quot;&quot;))">
            <text:p/>
          </table:table-cell>
          <table:table-cell table:formula="of:=IF([.AX105]=&quot;x&quot;;&quot;x&quot;;IF([.AX105]=&quot;-&quot;;&quot;-&quot;;&quot;&quot;))">
            <text:p/>
          </table:table-cell>
          <table:table-cell table:formula="of:=IF([.AY105]=&quot;x&quot;;&quot;x&quot;;IF([.AY105]=&quot;-&quot;;&quot;-&quot;;&quot;&quot;))">
            <text:p/>
          </table:table-cell>
          <table:table-cell table:formula="of:=IF([.AZ105]=&quot;x&quot;;&quot;x&quot;;IF([.AZ105]=&quot;-&quot;;&quot;-&quot;;&quot;&quot;))">
            <text:p/>
          </table:table-cell>
          <table:table-cell table:formula="of:=IF([.BA105]=&quot;x&quot;;&quot;x&quot;;IF([.BA105]=&quot;-&quot;;&quot;-&quot;;&quot;&quot;))" office:value-type="string" office:string-value="x" calcext:value-type="string">
            <text:p>x</text:p>
          </table:table-cell>
          <table:table-cell table:formula="of:=IF([.BB105]=&quot;x&quot;;&quot;x&quot;;IF([.BB105]=&quot;-&quot;;&quot;-&quot;;&quot;&quot;))">
            <text:p/>
          </table:table-cell>
          <table:table-cell table:formula="of:=IF([.BC105]=&quot;x&quot;;&quot;x&quot;;IF([.BC105]=&quot;-&quot;;&quot;-&quot;;&quot;&quot;))">
            <text:p/>
          </table:table-cell>
          <table:table-cell table:formula="of:=IF([.BD105]=&quot;x&quot;;&quot;x&quot;;IF([.BD105]=&quot;-&quot;;&quot;-&quot;;&quot;&quot;))">
            <text:p/>
          </table:table-cell>
          <table:table-cell table:formula="of:=IF([.BE105]=&quot;x&quot;;&quot;x&quot;;IF([.BE105]=&quot;-&quot;;&quot;-&quot;;&quot;&quot;))">
            <text:p/>
          </table:table-cell>
          <table:table-cell table:formula="of:=IF([.BF105]=&quot;x&quot;;&quot;x&quot;;IF([.BF105]=&quot;-&quot;;&quot;-&quot;;&quot;&quot;))">
            <text:p/>
          </table:table-cell>
          <table:table-cell table:formula="of:=IF([.BG105]=&quot;x&quot;;&quot;x&quot;;IF([.BG105]=&quot;-&quot;;&quot;-&quot;;&quot;&quot;))">
            <text:p/>
          </table:table-cell>
          <table:table-cell table:formula="of:=IF([.BH105]=&quot;x&quot;;&quot;x&quot;;IF([.BH105]=&quot;-&quot;;&quot;-&quot;;&quot;&quot;))">
            <text:p/>
          </table:table-cell>
          <table:table-cell table:formula="of:=IF([.BI105]=&quot;x&quot;;&quot;x&quot;;IF([.BI105]=&quot;-&quot;;&quot;-&quot;;&quot;&quot;))">
            <text:p/>
          </table:table-cell>
          <table:table-cell table:formula="of:=IF([.BJ105]=&quot;x&quot;;&quot;x&quot;;IF([.BJ105]=&quot;-&quot;;&quot;-&quot;;&quot;&quot;))">
            <text:p/>
          </table:table-cell>
          <table:table-cell table:formula="of:=IF([.BK105]=&quot;x&quot;;&quot;x&quot;;IF([.BK105]=&quot;-&quot;;&quot;-&quot;;&quot;&quot;))">
            <text:p/>
          </table:table-cell>
          <table:table-cell table:formula="of:=IF([.BL105]=&quot;x&quot;;&quot;x&quot;;IF([.BL105]=&quot;-&quot;;&quot;-&quot;;&quot;&quot;))">
            <text:p/>
          </table:table-cell>
          <table:table-cell table:formula="of:=IF([.BM105]=&quot;x&quot;;&quot;x&quot;;IF([.BM105]=&quot;-&quot;;&quot;-&quot;;&quot;&quot;))">
            <text:p/>
          </table:table-cell>
          <table:table-cell table:formula="of:=IF([.BN105]=&quot;x&quot;;&quot;x&quot;;IF([.BN105]=&quot;-&quot;;&quot;-&quot;;&quot;&quot;))">
            <text:p/>
          </table:table-cell>
          <table:table-cell table:formula="of:=IF([.BO105]=&quot;x&quot;;&quot;x&quot;;IF([.BO105]=&quot;-&quot;;&quot;-&quot;;&quot;&quot;))">
            <text:p/>
          </table:table-cell>
          <table:table-cell table:formula="of:=IF([.BP105]=&quot;x&quot;;&quot;x&quot;;IF([.BP105]=&quot;-&quot;;&quot;-&quot;;&quot;&quot;))">
            <text:p/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5" calcext:value-type="float">
            <text:p>105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6]=&quot;x&quot;;&quot;x&quot;;IF([.AS106]=&quot;-&quot;;&quot;-&quot;;&quot;&quot;))">
            <text:p/>
          </table:table-cell>
          <table:table-cell table:formula="of:=IF([.AT106]=&quot;x&quot;;&quot;x&quot;;IF([.AT106]=&quot;-&quot;;&quot;-&quot;;&quot;&quot;))">
            <text:p/>
          </table:table-cell>
          <table:table-cell table:formula="of:=IF([.AU106]=&quot;x&quot;;&quot;x&quot;;IF([.AU106]=&quot;-&quot;;&quot;-&quot;;&quot;&quot;))">
            <text:p/>
          </table:table-cell>
          <table:table-cell table:formula="of:=IF([.AV106]=&quot;x&quot;;&quot;x&quot;;IF([.AV106]=&quot;-&quot;;&quot;-&quot;;&quot;&quot;))">
            <text:p/>
          </table:table-cell>
          <table:table-cell table:formula="of:=IF([.AW106]=&quot;x&quot;;&quot;x&quot;;IF([.AW106]=&quot;-&quot;;&quot;-&quot;;&quot;&quot;))">
            <text:p/>
          </table:table-cell>
          <table:table-cell table:formula="of:=IF([.AX106]=&quot;x&quot;;&quot;x&quot;;IF([.AX106]=&quot;-&quot;;&quot;-&quot;;&quot;&quot;))">
            <text:p/>
          </table:table-cell>
          <table:table-cell table:formula="of:=IF([.AY106]=&quot;x&quot;;&quot;x&quot;;IF([.AY106]=&quot;-&quot;;&quot;-&quot;;&quot;&quot;))">
            <text:p/>
          </table:table-cell>
          <table:table-cell table:formula="of:=IF([.AZ106]=&quot;x&quot;;&quot;x&quot;;IF([.AZ106]=&quot;-&quot;;&quot;-&quot;;&quot;&quot;))">
            <text:p/>
          </table:table-cell>
          <table:table-cell table:formula="of:=IF([.BA106]=&quot;x&quot;;&quot;x&quot;;IF([.BA106]=&quot;-&quot;;&quot;-&quot;;&quot;&quot;))" office:value-type="string" office:string-value="x" calcext:value-type="string">
            <text:p>x</text:p>
          </table:table-cell>
          <table:table-cell table:formula="of:=IF([.BB106]=&quot;x&quot;;&quot;x&quot;;IF([.BB106]=&quot;-&quot;;&quot;-&quot;;&quot;&quot;))">
            <text:p/>
          </table:table-cell>
          <table:table-cell table:formula="of:=IF([.BC106]=&quot;x&quot;;&quot;x&quot;;IF([.BC106]=&quot;-&quot;;&quot;-&quot;;&quot;&quot;))">
            <text:p/>
          </table:table-cell>
          <table:table-cell table:formula="of:=IF([.BD106]=&quot;x&quot;;&quot;x&quot;;IF([.BD106]=&quot;-&quot;;&quot;-&quot;;&quot;&quot;))">
            <text:p/>
          </table:table-cell>
          <table:table-cell table:formula="of:=IF([.BE106]=&quot;x&quot;;&quot;x&quot;;IF([.BE106]=&quot;-&quot;;&quot;-&quot;;&quot;&quot;))">
            <text:p/>
          </table:table-cell>
          <table:table-cell table:formula="of:=IF([.BF106]=&quot;x&quot;;&quot;x&quot;;IF([.BF106]=&quot;-&quot;;&quot;-&quot;;&quot;&quot;))">
            <text:p/>
          </table:table-cell>
          <table:table-cell table:formula="of:=IF([.BG106]=&quot;x&quot;;&quot;x&quot;;IF([.BG106]=&quot;-&quot;;&quot;-&quot;;&quot;&quot;))">
            <text:p/>
          </table:table-cell>
          <table:table-cell table:formula="of:=IF([.BH106]=&quot;x&quot;;&quot;x&quot;;IF([.BH106]=&quot;-&quot;;&quot;-&quot;;&quot;&quot;))">
            <text:p/>
          </table:table-cell>
          <table:table-cell table:formula="of:=IF([.BI106]=&quot;x&quot;;&quot;x&quot;;IF([.BI106]=&quot;-&quot;;&quot;-&quot;;&quot;&quot;))">
            <text:p/>
          </table:table-cell>
          <table:table-cell table:formula="of:=IF([.BJ106]=&quot;x&quot;;&quot;x&quot;;IF([.BJ106]=&quot;-&quot;;&quot;-&quot;;&quot;&quot;))">
            <text:p/>
          </table:table-cell>
          <table:table-cell table:formula="of:=IF([.BK106]=&quot;x&quot;;&quot;x&quot;;IF([.BK106]=&quot;-&quot;;&quot;-&quot;;&quot;&quot;))">
            <text:p/>
          </table:table-cell>
          <table:table-cell table:formula="of:=IF([.BL106]=&quot;x&quot;;&quot;x&quot;;IF([.BL106]=&quot;-&quot;;&quot;-&quot;;&quot;&quot;))">
            <text:p/>
          </table:table-cell>
          <table:table-cell table:formula="of:=IF([.BM106]=&quot;x&quot;;&quot;x&quot;;IF([.BM106]=&quot;-&quot;;&quot;-&quot;;&quot;&quot;))">
            <text:p/>
          </table:table-cell>
          <table:table-cell table:formula="of:=IF([.BN106]=&quot;x&quot;;&quot;x&quot;;IF([.BN106]=&quot;-&quot;;&quot;-&quot;;&quot;&quot;))">
            <text:p/>
          </table:table-cell>
          <table:table-cell table:formula="of:=IF([.BO106]=&quot;x&quot;;&quot;x&quot;;IF([.BO106]=&quot;-&quot;;&quot;-&quot;;&quot;&quot;))">
            <text:p/>
          </table:table-cell>
          <table:table-cell table:formula="of:=IF([.BP106]=&quot;x&quot;;&quot;x&quot;;IF([.BP106]=&quot;-&quot;;&quot;-&quot;;&quot;&quot;))">
            <text:p/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7]=&quot;x&quot;;&quot;x&quot;;IF([.AS107]=&quot;-&quot;;&quot;-&quot;;&quot;&quot;))">
            <text:p/>
          </table:table-cell>
          <table:table-cell table:formula="of:=IF([.AT107]=&quot;x&quot;;&quot;x&quot;;IF([.AT107]=&quot;-&quot;;&quot;-&quot;;&quot;&quot;))">
            <text:p/>
          </table:table-cell>
          <table:table-cell table:formula="of:=IF([.AU107]=&quot;x&quot;;&quot;x&quot;;IF([.AU107]=&quot;-&quot;;&quot;-&quot;;&quot;&quot;))">
            <text:p/>
          </table:table-cell>
          <table:table-cell table:formula="of:=IF([.AV107]=&quot;x&quot;;&quot;x&quot;;IF([.AV107]=&quot;-&quot;;&quot;-&quot;;&quot;&quot;))">
            <text:p/>
          </table:table-cell>
          <table:table-cell table:formula="of:=IF([.AW107]=&quot;x&quot;;&quot;x&quot;;IF([.AW107]=&quot;-&quot;;&quot;-&quot;;&quot;&quot;))">
            <text:p/>
          </table:table-cell>
          <table:table-cell table:formula="of:=IF([.AX107]=&quot;x&quot;;&quot;x&quot;;IF([.AX107]=&quot;-&quot;;&quot;-&quot;;&quot;&quot;))">
            <text:p/>
          </table:table-cell>
          <table:table-cell table:formula="of:=IF([.AY107]=&quot;x&quot;;&quot;x&quot;;IF([.AY107]=&quot;-&quot;;&quot;-&quot;;&quot;&quot;))">
            <text:p/>
          </table:table-cell>
          <table:table-cell table:formula="of:=IF([.AZ107]=&quot;x&quot;;&quot;x&quot;;IF([.AZ107]=&quot;-&quot;;&quot;-&quot;;&quot;&quot;))">
            <text:p/>
          </table:table-cell>
          <table:table-cell table:formula="of:=IF([.BA107]=&quot;x&quot;;&quot;x&quot;;IF([.BA107]=&quot;-&quot;;&quot;-&quot;;&quot;&quot;))" office:value-type="string" office:string-value="x" calcext:value-type="string">
            <text:p>x</text:p>
          </table:table-cell>
          <table:table-cell table:formula="of:=IF([.BB107]=&quot;x&quot;;&quot;x&quot;;IF([.BB107]=&quot;-&quot;;&quot;-&quot;;&quot;&quot;))">
            <text:p/>
          </table:table-cell>
          <table:table-cell table:formula="of:=IF([.BC107]=&quot;x&quot;;&quot;x&quot;;IF([.BC107]=&quot;-&quot;;&quot;-&quot;;&quot;&quot;))">
            <text:p/>
          </table:table-cell>
          <table:table-cell table:formula="of:=IF([.BD107]=&quot;x&quot;;&quot;x&quot;;IF([.BD107]=&quot;-&quot;;&quot;-&quot;;&quot;&quot;))">
            <text:p/>
          </table:table-cell>
          <table:table-cell table:formula="of:=IF([.BE107]=&quot;x&quot;;&quot;x&quot;;IF([.BE107]=&quot;-&quot;;&quot;-&quot;;&quot;&quot;))">
            <text:p/>
          </table:table-cell>
          <table:table-cell table:formula="of:=IF([.BF107]=&quot;x&quot;;&quot;x&quot;;IF([.BF107]=&quot;-&quot;;&quot;-&quot;;&quot;&quot;))">
            <text:p/>
          </table:table-cell>
          <table:table-cell table:formula="of:=IF([.BG107]=&quot;x&quot;;&quot;x&quot;;IF([.BG107]=&quot;-&quot;;&quot;-&quot;;&quot;&quot;))">
            <text:p/>
          </table:table-cell>
          <table:table-cell table:formula="of:=IF([.BH107]=&quot;x&quot;;&quot;x&quot;;IF([.BH107]=&quot;-&quot;;&quot;-&quot;;&quot;&quot;))">
            <text:p/>
          </table:table-cell>
          <table:table-cell table:formula="of:=IF([.BI107]=&quot;x&quot;;&quot;x&quot;;IF([.BI107]=&quot;-&quot;;&quot;-&quot;;&quot;&quot;))">
            <text:p/>
          </table:table-cell>
          <table:table-cell table:formula="of:=IF([.BJ107]=&quot;x&quot;;&quot;x&quot;;IF([.BJ107]=&quot;-&quot;;&quot;-&quot;;&quot;&quot;))">
            <text:p/>
          </table:table-cell>
          <table:table-cell table:formula="of:=IF([.BK107]=&quot;x&quot;;&quot;x&quot;;IF([.BK107]=&quot;-&quot;;&quot;-&quot;;&quot;&quot;))">
            <text:p/>
          </table:table-cell>
          <table:table-cell table:formula="of:=IF([.BL107]=&quot;x&quot;;&quot;x&quot;;IF([.BL107]=&quot;-&quot;;&quot;-&quot;;&quot;&quot;))">
            <text:p/>
          </table:table-cell>
          <table:table-cell table:formula="of:=IF([.BM107]=&quot;x&quot;;&quot;x&quot;;IF([.BM107]=&quot;-&quot;;&quot;-&quot;;&quot;&quot;))">
            <text:p/>
          </table:table-cell>
          <table:table-cell table:formula="of:=IF([.BN107]=&quot;x&quot;;&quot;x&quot;;IF([.BN107]=&quot;-&quot;;&quot;-&quot;;&quot;&quot;))">
            <text:p/>
          </table:table-cell>
          <table:table-cell table:formula="of:=IF([.BO107]=&quot;x&quot;;&quot;x&quot;;IF([.BO107]=&quot;-&quot;;&quot;-&quot;;&quot;&quot;))">
            <text:p/>
          </table:table-cell>
          <table:table-cell table:formula="of:=IF([.BP107]=&quot;x&quot;;&quot;x&quot;;IF([.BP107]=&quot;-&quot;;&quot;-&quot;;&quot;&quot;))">
            <text:p/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8]=&quot;x&quot;;&quot;x&quot;;IF([.AS108]=&quot;-&quot;;&quot;-&quot;;&quot;&quot;))">
            <text:p/>
          </table:table-cell>
          <table:table-cell table:formula="of:=IF([.AT108]=&quot;x&quot;;&quot;x&quot;;IF([.AT108]=&quot;-&quot;;&quot;-&quot;;&quot;&quot;))">
            <text:p/>
          </table:table-cell>
          <table:table-cell table:formula="of:=IF([.AU108]=&quot;x&quot;;&quot;x&quot;;IF([.AU108]=&quot;-&quot;;&quot;-&quot;;&quot;&quot;))">
            <text:p/>
          </table:table-cell>
          <table:table-cell table:formula="of:=IF([.AV108]=&quot;x&quot;;&quot;x&quot;;IF([.AV108]=&quot;-&quot;;&quot;-&quot;;&quot;&quot;))">
            <text:p/>
          </table:table-cell>
          <table:table-cell table:formula="of:=IF([.AW108]=&quot;x&quot;;&quot;x&quot;;IF([.AW108]=&quot;-&quot;;&quot;-&quot;;&quot;&quot;))">
            <text:p/>
          </table:table-cell>
          <table:table-cell table:formula="of:=IF([.AX108]=&quot;x&quot;;&quot;x&quot;;IF([.AX108]=&quot;-&quot;;&quot;-&quot;;&quot;&quot;))">
            <text:p/>
          </table:table-cell>
          <table:table-cell table:formula="of:=IF([.AY108]=&quot;x&quot;;&quot;x&quot;;IF([.AY108]=&quot;-&quot;;&quot;-&quot;;&quot;&quot;))">
            <text:p/>
          </table:table-cell>
          <table:table-cell table:formula="of:=IF([.AZ108]=&quot;x&quot;;&quot;x&quot;;IF([.AZ108]=&quot;-&quot;;&quot;-&quot;;&quot;&quot;))">
            <text:p/>
          </table:table-cell>
          <table:table-cell table:formula="of:=IF([.BA108]=&quot;x&quot;;&quot;x&quot;;IF([.BA108]=&quot;-&quot;;&quot;-&quot;;&quot;&quot;))" office:value-type="string" office:string-value="x" calcext:value-type="string">
            <text:p>x</text:p>
          </table:table-cell>
          <table:table-cell table:formula="of:=IF([.BB108]=&quot;x&quot;;&quot;x&quot;;IF([.BB108]=&quot;-&quot;;&quot;-&quot;;&quot;&quot;))">
            <text:p/>
          </table:table-cell>
          <table:table-cell table:formula="of:=IF([.BC108]=&quot;x&quot;;&quot;x&quot;;IF([.BC108]=&quot;-&quot;;&quot;-&quot;;&quot;&quot;))">
            <text:p/>
          </table:table-cell>
          <table:table-cell table:formula="of:=IF([.BD108]=&quot;x&quot;;&quot;x&quot;;IF([.BD108]=&quot;-&quot;;&quot;-&quot;;&quot;&quot;))">
            <text:p/>
          </table:table-cell>
          <table:table-cell table:formula="of:=IF([.BE108]=&quot;x&quot;;&quot;x&quot;;IF([.BE108]=&quot;-&quot;;&quot;-&quot;;&quot;&quot;))">
            <text:p/>
          </table:table-cell>
          <table:table-cell table:formula="of:=IF([.BF108]=&quot;x&quot;;&quot;x&quot;;IF([.BF108]=&quot;-&quot;;&quot;-&quot;;&quot;&quot;))">
            <text:p/>
          </table:table-cell>
          <table:table-cell table:formula="of:=IF([.BG108]=&quot;x&quot;;&quot;x&quot;;IF([.BG108]=&quot;-&quot;;&quot;-&quot;;&quot;&quot;))">
            <text:p/>
          </table:table-cell>
          <table:table-cell table:formula="of:=IF([.BH108]=&quot;x&quot;;&quot;x&quot;;IF([.BH108]=&quot;-&quot;;&quot;-&quot;;&quot;&quot;))">
            <text:p/>
          </table:table-cell>
          <table:table-cell table:formula="of:=IF([.BI108]=&quot;x&quot;;&quot;x&quot;;IF([.BI108]=&quot;-&quot;;&quot;-&quot;;&quot;&quot;))">
            <text:p/>
          </table:table-cell>
          <table:table-cell table:formula="of:=IF([.BJ108]=&quot;x&quot;;&quot;x&quot;;IF([.BJ108]=&quot;-&quot;;&quot;-&quot;;&quot;&quot;))">
            <text:p/>
          </table:table-cell>
          <table:table-cell table:formula="of:=IF([.BK108]=&quot;x&quot;;&quot;x&quot;;IF([.BK108]=&quot;-&quot;;&quot;-&quot;;&quot;&quot;))">
            <text:p/>
          </table:table-cell>
          <table:table-cell table:formula="of:=IF([.BL108]=&quot;x&quot;;&quot;x&quot;;IF([.BL108]=&quot;-&quot;;&quot;-&quot;;&quot;&quot;))">
            <text:p/>
          </table:table-cell>
          <table:table-cell table:formula="of:=IF([.BM108]=&quot;x&quot;;&quot;x&quot;;IF([.BM108]=&quot;-&quot;;&quot;-&quot;;&quot;&quot;))">
            <text:p/>
          </table:table-cell>
          <table:table-cell table:formula="of:=IF([.BN108]=&quot;x&quot;;&quot;x&quot;;IF([.BN108]=&quot;-&quot;;&quot;-&quot;;&quot;&quot;))">
            <text:p/>
          </table:table-cell>
          <table:table-cell table:formula="of:=IF([.BO108]=&quot;x&quot;;&quot;x&quot;;IF([.BO108]=&quot;-&quot;;&quot;-&quot;;&quot;&quot;))">
            <text:p/>
          </table:table-cell>
          <table:table-cell table:formula="of:=IF([.BP108]=&quot;x&quot;;&quot;x&quot;;IF([.BP108]=&quot;-&quot;;&quot;-&quot;;&quot;&quot;))">
            <text:p/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9]=&quot;x&quot;;&quot;x&quot;;IF([.AS109]=&quot;-&quot;;&quot;-&quot;;&quot;&quot;))">
            <text:p/>
          </table:table-cell>
          <table:table-cell table:formula="of:=IF([.AT109]=&quot;x&quot;;&quot;x&quot;;IF([.AT109]=&quot;-&quot;;&quot;-&quot;;&quot;&quot;))">
            <text:p/>
          </table:table-cell>
          <table:table-cell table:formula="of:=IF([.AU109]=&quot;x&quot;;&quot;x&quot;;IF([.AU109]=&quot;-&quot;;&quot;-&quot;;&quot;&quot;))">
            <text:p/>
          </table:table-cell>
          <table:table-cell table:formula="of:=IF([.AV109]=&quot;x&quot;;&quot;x&quot;;IF([.AV109]=&quot;-&quot;;&quot;-&quot;;&quot;&quot;))">
            <text:p/>
          </table:table-cell>
          <table:table-cell table:formula="of:=IF([.AW109]=&quot;x&quot;;&quot;x&quot;;IF([.AW109]=&quot;-&quot;;&quot;-&quot;;&quot;&quot;))">
            <text:p/>
          </table:table-cell>
          <table:table-cell table:formula="of:=IF([.AX109]=&quot;x&quot;;&quot;x&quot;;IF([.AX109]=&quot;-&quot;;&quot;-&quot;;&quot;&quot;))">
            <text:p/>
          </table:table-cell>
          <table:table-cell table:formula="of:=IF([.AY109]=&quot;x&quot;;&quot;x&quot;;IF([.AY109]=&quot;-&quot;;&quot;-&quot;;&quot;&quot;))">
            <text:p/>
          </table:table-cell>
          <table:table-cell table:formula="of:=IF([.AZ109]=&quot;x&quot;;&quot;x&quot;;IF([.AZ109]=&quot;-&quot;;&quot;-&quot;;&quot;&quot;))">
            <text:p/>
          </table:table-cell>
          <table:table-cell table:formula="of:=IF([.BA109]=&quot;x&quot;;&quot;x&quot;;IF([.BA109]=&quot;-&quot;;&quot;-&quot;;&quot;&quot;))" office:value-type="string" office:string-value="x" calcext:value-type="string">
            <text:p>x</text:p>
          </table:table-cell>
          <table:table-cell table:formula="of:=IF([.BB109]=&quot;x&quot;;&quot;x&quot;;IF([.BB109]=&quot;-&quot;;&quot;-&quot;;&quot;&quot;))">
            <text:p/>
          </table:table-cell>
          <table:table-cell table:formula="of:=IF([.BC109]=&quot;x&quot;;&quot;x&quot;;IF([.BC109]=&quot;-&quot;;&quot;-&quot;;&quot;&quot;))">
            <text:p/>
          </table:table-cell>
          <table:table-cell table:formula="of:=IF([.BD109]=&quot;x&quot;;&quot;x&quot;;IF([.BD109]=&quot;-&quot;;&quot;-&quot;;&quot;&quot;))">
            <text:p/>
          </table:table-cell>
          <table:table-cell table:formula="of:=IF([.BE109]=&quot;x&quot;;&quot;x&quot;;IF([.BE109]=&quot;-&quot;;&quot;-&quot;;&quot;&quot;))">
            <text:p/>
          </table:table-cell>
          <table:table-cell table:formula="of:=IF([.BF109]=&quot;x&quot;;&quot;x&quot;;IF([.BF109]=&quot;-&quot;;&quot;-&quot;;&quot;&quot;))">
            <text:p/>
          </table:table-cell>
          <table:table-cell table:formula="of:=IF([.BG109]=&quot;x&quot;;&quot;x&quot;;IF([.BG109]=&quot;-&quot;;&quot;-&quot;;&quot;&quot;))">
            <text:p/>
          </table:table-cell>
          <table:table-cell table:formula="of:=IF([.BH109]=&quot;x&quot;;&quot;x&quot;;IF([.BH109]=&quot;-&quot;;&quot;-&quot;;&quot;&quot;))">
            <text:p/>
          </table:table-cell>
          <table:table-cell table:formula="of:=IF([.BI109]=&quot;x&quot;;&quot;x&quot;;IF([.BI109]=&quot;-&quot;;&quot;-&quot;;&quot;&quot;))">
            <text:p/>
          </table:table-cell>
          <table:table-cell table:formula="of:=IF([.BJ109]=&quot;x&quot;;&quot;x&quot;;IF([.BJ109]=&quot;-&quot;;&quot;-&quot;;&quot;&quot;))">
            <text:p/>
          </table:table-cell>
          <table:table-cell table:formula="of:=IF([.BK109]=&quot;x&quot;;&quot;x&quot;;IF([.BK109]=&quot;-&quot;;&quot;-&quot;;&quot;&quot;))">
            <text:p/>
          </table:table-cell>
          <table:table-cell table:formula="of:=IF([.BL109]=&quot;x&quot;;&quot;x&quot;;IF([.BL109]=&quot;-&quot;;&quot;-&quot;;&quot;&quot;))">
            <text:p/>
          </table:table-cell>
          <table:table-cell table:formula="of:=IF([.BM109]=&quot;x&quot;;&quot;x&quot;;IF([.BM109]=&quot;-&quot;;&quot;-&quot;;&quot;&quot;))">
            <text:p/>
          </table:table-cell>
          <table:table-cell table:formula="of:=IF([.BN109]=&quot;x&quot;;&quot;x&quot;;IF([.BN109]=&quot;-&quot;;&quot;-&quot;;&quot;&quot;))">
            <text:p/>
          </table:table-cell>
          <table:table-cell table:formula="of:=IF([.BO109]=&quot;x&quot;;&quot;x&quot;;IF([.BO109]=&quot;-&quot;;&quot;-&quot;;&quot;&quot;))">
            <text:p/>
          </table:table-cell>
          <table:table-cell table:formula="of:=IF([.BP109]=&quot;x&quot;;&quot;x&quot;;IF([.BP109]=&quot;-&quot;;&quot;-&quot;;&quot;&quot;))">
            <text:p/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9" calcext:value-type="float">
            <text:p>109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0]=&quot;x&quot;;&quot;x&quot;;IF([.AS110]=&quot;-&quot;;&quot;-&quot;;&quot;&quot;))">
            <text:p/>
          </table:table-cell>
          <table:table-cell table:formula="of:=IF([.AT110]=&quot;x&quot;;&quot;x&quot;;IF([.AT110]=&quot;-&quot;;&quot;-&quot;;&quot;&quot;))">
            <text:p/>
          </table:table-cell>
          <table:table-cell table:formula="of:=IF([.AU110]=&quot;x&quot;;&quot;x&quot;;IF([.AU110]=&quot;-&quot;;&quot;-&quot;;&quot;&quot;))">
            <text:p/>
          </table:table-cell>
          <table:table-cell table:formula="of:=IF([.AV110]=&quot;x&quot;;&quot;x&quot;;IF([.AV110]=&quot;-&quot;;&quot;-&quot;;&quot;&quot;))">
            <text:p/>
          </table:table-cell>
          <table:table-cell table:formula="of:=IF([.AW110]=&quot;x&quot;;&quot;x&quot;;IF([.AW110]=&quot;-&quot;;&quot;-&quot;;&quot;&quot;))">
            <text:p/>
          </table:table-cell>
          <table:table-cell table:formula="of:=IF([.AX110]=&quot;x&quot;;&quot;x&quot;;IF([.AX110]=&quot;-&quot;;&quot;-&quot;;&quot;&quot;))">
            <text:p/>
          </table:table-cell>
          <table:table-cell table:formula="of:=IF([.AY110]=&quot;x&quot;;&quot;x&quot;;IF([.AY110]=&quot;-&quot;;&quot;-&quot;;&quot;&quot;))">
            <text:p/>
          </table:table-cell>
          <table:table-cell table:formula="of:=IF([.AZ110]=&quot;x&quot;;&quot;x&quot;;IF([.AZ110]=&quot;-&quot;;&quot;-&quot;;&quot;&quot;))">
            <text:p/>
          </table:table-cell>
          <table:table-cell table:formula="of:=IF([.BA110]=&quot;x&quot;;&quot;x&quot;;IF([.BA110]=&quot;-&quot;;&quot;-&quot;;&quot;&quot;))">
            <text:p/>
          </table:table-cell>
          <table:table-cell table:formula="of:=IF([.BB110]=&quot;x&quot;;&quot;x&quot;;IF([.BB110]=&quot;-&quot;;&quot;-&quot;;&quot;&quot;))" office:value-type="string" office:string-value="x" calcext:value-type="string">
            <text:p>x</text:p>
          </table:table-cell>
          <table:table-cell table:formula="of:=IF([.BC110]=&quot;x&quot;;&quot;x&quot;;IF([.BC110]=&quot;-&quot;;&quot;-&quot;;&quot;&quot;))">
            <text:p/>
          </table:table-cell>
          <table:table-cell table:formula="of:=IF([.BD110]=&quot;x&quot;;&quot;x&quot;;IF([.BD110]=&quot;-&quot;;&quot;-&quot;;&quot;&quot;))">
            <text:p/>
          </table:table-cell>
          <table:table-cell table:formula="of:=IF([.BE110]=&quot;x&quot;;&quot;x&quot;;IF([.BE110]=&quot;-&quot;;&quot;-&quot;;&quot;&quot;))">
            <text:p/>
          </table:table-cell>
          <table:table-cell table:formula="of:=IF([.BF110]=&quot;x&quot;;&quot;x&quot;;IF([.BF110]=&quot;-&quot;;&quot;-&quot;;&quot;&quot;))">
            <text:p/>
          </table:table-cell>
          <table:table-cell table:formula="of:=IF([.BG110]=&quot;x&quot;;&quot;x&quot;;IF([.BG110]=&quot;-&quot;;&quot;-&quot;;&quot;&quot;))">
            <text:p/>
          </table:table-cell>
          <table:table-cell table:formula="of:=IF([.BH110]=&quot;x&quot;;&quot;x&quot;;IF([.BH110]=&quot;-&quot;;&quot;-&quot;;&quot;&quot;))">
            <text:p/>
          </table:table-cell>
          <table:table-cell table:formula="of:=IF([.BI110]=&quot;x&quot;;&quot;x&quot;;IF([.BI110]=&quot;-&quot;;&quot;-&quot;;&quot;&quot;))">
            <text:p/>
          </table:table-cell>
          <table:table-cell table:formula="of:=IF([.BJ110]=&quot;x&quot;;&quot;x&quot;;IF([.BJ110]=&quot;-&quot;;&quot;-&quot;;&quot;&quot;))">
            <text:p/>
          </table:table-cell>
          <table:table-cell table:formula="of:=IF([.BK110]=&quot;x&quot;;&quot;x&quot;;IF([.BK110]=&quot;-&quot;;&quot;-&quot;;&quot;&quot;))">
            <text:p/>
          </table:table-cell>
          <table:table-cell table:formula="of:=IF([.BL110]=&quot;x&quot;;&quot;x&quot;;IF([.BL110]=&quot;-&quot;;&quot;-&quot;;&quot;&quot;))">
            <text:p/>
          </table:table-cell>
          <table:table-cell table:formula="of:=IF([.BM110]=&quot;x&quot;;&quot;x&quot;;IF([.BM110]=&quot;-&quot;;&quot;-&quot;;&quot;&quot;))">
            <text:p/>
          </table:table-cell>
          <table:table-cell table:formula="of:=IF([.BN110]=&quot;x&quot;;&quot;x&quot;;IF([.BN110]=&quot;-&quot;;&quot;-&quot;;&quot;&quot;))">
            <text:p/>
          </table:table-cell>
          <table:table-cell table:formula="of:=IF([.BO110]=&quot;x&quot;;&quot;x&quot;;IF([.BO110]=&quot;-&quot;;&quot;-&quot;;&quot;&quot;))">
            <text:p/>
          </table:table-cell>
          <table:table-cell table:formula="of:=IF([.BP110]=&quot;x&quot;;&quot;x&quot;;IF([.BP110]=&quot;-&quot;;&quot;-&quot;;&quot;&quot;))">
            <text:p/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0" calcext:value-type="float">
            <text:p>110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1]=&quot;x&quot;;&quot;x&quot;;IF([.AS111]=&quot;-&quot;;&quot;-&quot;;&quot;&quot;))">
            <text:p/>
          </table:table-cell>
          <table:table-cell table:formula="of:=IF([.AT111]=&quot;x&quot;;&quot;x&quot;;IF([.AT111]=&quot;-&quot;;&quot;-&quot;;&quot;&quot;))">
            <text:p/>
          </table:table-cell>
          <table:table-cell table:formula="of:=IF([.AU111]=&quot;x&quot;;&quot;x&quot;;IF([.AU111]=&quot;-&quot;;&quot;-&quot;;&quot;&quot;))">
            <text:p/>
          </table:table-cell>
          <table:table-cell table:formula="of:=IF([.AV111]=&quot;x&quot;;&quot;x&quot;;IF([.AV111]=&quot;-&quot;;&quot;-&quot;;&quot;&quot;))">
            <text:p/>
          </table:table-cell>
          <table:table-cell table:formula="of:=IF([.AW111]=&quot;x&quot;;&quot;x&quot;;IF([.AW111]=&quot;-&quot;;&quot;-&quot;;&quot;&quot;))">
            <text:p/>
          </table:table-cell>
          <table:table-cell table:formula="of:=IF([.AX111]=&quot;x&quot;;&quot;x&quot;;IF([.AX111]=&quot;-&quot;;&quot;-&quot;;&quot;&quot;))">
            <text:p/>
          </table:table-cell>
          <table:table-cell table:formula="of:=IF([.AY111]=&quot;x&quot;;&quot;x&quot;;IF([.AY111]=&quot;-&quot;;&quot;-&quot;;&quot;&quot;))">
            <text:p/>
          </table:table-cell>
          <table:table-cell table:formula="of:=IF([.AZ111]=&quot;x&quot;;&quot;x&quot;;IF([.AZ111]=&quot;-&quot;;&quot;-&quot;;&quot;&quot;))">
            <text:p/>
          </table:table-cell>
          <table:table-cell table:formula="of:=IF([.BA111]=&quot;x&quot;;&quot;x&quot;;IF([.BA111]=&quot;-&quot;;&quot;-&quot;;&quot;&quot;))">
            <text:p/>
          </table:table-cell>
          <table:table-cell table:formula="of:=IF([.BB111]=&quot;x&quot;;&quot;x&quot;;IF([.BB111]=&quot;-&quot;;&quot;-&quot;;&quot;&quot;))" office:value-type="string" office:string-value="x" calcext:value-type="string">
            <text:p>x</text:p>
          </table:table-cell>
          <table:table-cell table:formula="of:=IF([.BC111]=&quot;x&quot;;&quot;x&quot;;IF([.BC111]=&quot;-&quot;;&quot;-&quot;;&quot;&quot;))">
            <text:p/>
          </table:table-cell>
          <table:table-cell table:formula="of:=IF([.BD111]=&quot;x&quot;;&quot;x&quot;;IF([.BD111]=&quot;-&quot;;&quot;-&quot;;&quot;&quot;))">
            <text:p/>
          </table:table-cell>
          <table:table-cell table:formula="of:=IF([.BE111]=&quot;x&quot;;&quot;x&quot;;IF([.BE111]=&quot;-&quot;;&quot;-&quot;;&quot;&quot;))">
            <text:p/>
          </table:table-cell>
          <table:table-cell table:formula="of:=IF([.BF111]=&quot;x&quot;;&quot;x&quot;;IF([.BF111]=&quot;-&quot;;&quot;-&quot;;&quot;&quot;))">
            <text:p/>
          </table:table-cell>
          <table:table-cell table:formula="of:=IF([.BG111]=&quot;x&quot;;&quot;x&quot;;IF([.BG111]=&quot;-&quot;;&quot;-&quot;;&quot;&quot;))">
            <text:p/>
          </table:table-cell>
          <table:table-cell table:formula="of:=IF([.BH111]=&quot;x&quot;;&quot;x&quot;;IF([.BH111]=&quot;-&quot;;&quot;-&quot;;&quot;&quot;))">
            <text:p/>
          </table:table-cell>
          <table:table-cell table:formula="of:=IF([.BI111]=&quot;x&quot;;&quot;x&quot;;IF([.BI111]=&quot;-&quot;;&quot;-&quot;;&quot;&quot;))">
            <text:p/>
          </table:table-cell>
          <table:table-cell table:formula="of:=IF([.BJ111]=&quot;x&quot;;&quot;x&quot;;IF([.BJ111]=&quot;-&quot;;&quot;-&quot;;&quot;&quot;))">
            <text:p/>
          </table:table-cell>
          <table:table-cell table:formula="of:=IF([.BK111]=&quot;x&quot;;&quot;x&quot;;IF([.BK111]=&quot;-&quot;;&quot;-&quot;;&quot;&quot;))">
            <text:p/>
          </table:table-cell>
          <table:table-cell table:formula="of:=IF([.BL111]=&quot;x&quot;;&quot;x&quot;;IF([.BL111]=&quot;-&quot;;&quot;-&quot;;&quot;&quot;))">
            <text:p/>
          </table:table-cell>
          <table:table-cell table:formula="of:=IF([.BM111]=&quot;x&quot;;&quot;x&quot;;IF([.BM111]=&quot;-&quot;;&quot;-&quot;;&quot;&quot;))">
            <text:p/>
          </table:table-cell>
          <table:table-cell table:formula="of:=IF([.BN111]=&quot;x&quot;;&quot;x&quot;;IF([.BN111]=&quot;-&quot;;&quot;-&quot;;&quot;&quot;))">
            <text:p/>
          </table:table-cell>
          <table:table-cell table:formula="of:=IF([.BO111]=&quot;x&quot;;&quot;x&quot;;IF([.BO111]=&quot;-&quot;;&quot;-&quot;;&quot;&quot;))">
            <text:p/>
          </table:table-cell>
          <table:table-cell table:formula="of:=IF([.BP111]=&quot;x&quot;;&quot;x&quot;;IF([.BP111]=&quot;-&quot;;&quot;-&quot;;&quot;&quot;))">
            <text:p/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1" calcext:value-type="float">
            <text:p>111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2]=&quot;x&quot;;&quot;x&quot;;IF([.AS112]=&quot;-&quot;;&quot;-&quot;;&quot;&quot;))">
            <text:p/>
          </table:table-cell>
          <table:table-cell table:formula="of:=IF([.AT112]=&quot;x&quot;;&quot;x&quot;;IF([.AT112]=&quot;-&quot;;&quot;-&quot;;&quot;&quot;))">
            <text:p/>
          </table:table-cell>
          <table:table-cell table:formula="of:=IF([.AU112]=&quot;x&quot;;&quot;x&quot;;IF([.AU112]=&quot;-&quot;;&quot;-&quot;;&quot;&quot;))">
            <text:p/>
          </table:table-cell>
          <table:table-cell table:formula="of:=IF([.AV112]=&quot;x&quot;;&quot;x&quot;;IF([.AV112]=&quot;-&quot;;&quot;-&quot;;&quot;&quot;))">
            <text:p/>
          </table:table-cell>
          <table:table-cell table:formula="of:=IF([.AW112]=&quot;x&quot;;&quot;x&quot;;IF([.AW112]=&quot;-&quot;;&quot;-&quot;;&quot;&quot;))">
            <text:p/>
          </table:table-cell>
          <table:table-cell table:formula="of:=IF([.AX112]=&quot;x&quot;;&quot;x&quot;;IF([.AX112]=&quot;-&quot;;&quot;-&quot;;&quot;&quot;))">
            <text:p/>
          </table:table-cell>
          <table:table-cell table:formula="of:=IF([.AY112]=&quot;x&quot;;&quot;x&quot;;IF([.AY112]=&quot;-&quot;;&quot;-&quot;;&quot;&quot;))">
            <text:p/>
          </table:table-cell>
          <table:table-cell table:formula="of:=IF([.AZ112]=&quot;x&quot;;&quot;x&quot;;IF([.AZ112]=&quot;-&quot;;&quot;-&quot;;&quot;&quot;))">
            <text:p/>
          </table:table-cell>
          <table:table-cell table:formula="of:=IF([.BA112]=&quot;x&quot;;&quot;x&quot;;IF([.BA112]=&quot;-&quot;;&quot;-&quot;;&quot;&quot;))">
            <text:p/>
          </table:table-cell>
          <table:table-cell table:formula="of:=IF([.BB112]=&quot;x&quot;;&quot;x&quot;;IF([.BB112]=&quot;-&quot;;&quot;-&quot;;&quot;&quot;))" office:value-type="string" office:string-value="x" calcext:value-type="string">
            <text:p>x</text:p>
          </table:table-cell>
          <table:table-cell table:formula="of:=IF([.BC112]=&quot;x&quot;;&quot;x&quot;;IF([.BC112]=&quot;-&quot;;&quot;-&quot;;&quot;&quot;))">
            <text:p/>
          </table:table-cell>
          <table:table-cell table:formula="of:=IF([.BD112]=&quot;x&quot;;&quot;x&quot;;IF([.BD112]=&quot;-&quot;;&quot;-&quot;;&quot;&quot;))">
            <text:p/>
          </table:table-cell>
          <table:table-cell table:formula="of:=IF([.BE112]=&quot;x&quot;;&quot;x&quot;;IF([.BE112]=&quot;-&quot;;&quot;-&quot;;&quot;&quot;))">
            <text:p/>
          </table:table-cell>
          <table:table-cell table:formula="of:=IF([.BF112]=&quot;x&quot;;&quot;x&quot;;IF([.BF112]=&quot;-&quot;;&quot;-&quot;;&quot;&quot;))">
            <text:p/>
          </table:table-cell>
          <table:table-cell table:formula="of:=IF([.BG112]=&quot;x&quot;;&quot;x&quot;;IF([.BG112]=&quot;-&quot;;&quot;-&quot;;&quot;&quot;))">
            <text:p/>
          </table:table-cell>
          <table:table-cell table:formula="of:=IF([.BH112]=&quot;x&quot;;&quot;x&quot;;IF([.BH112]=&quot;-&quot;;&quot;-&quot;;&quot;&quot;))">
            <text:p/>
          </table:table-cell>
          <table:table-cell table:formula="of:=IF([.BI112]=&quot;x&quot;;&quot;x&quot;;IF([.BI112]=&quot;-&quot;;&quot;-&quot;;&quot;&quot;))">
            <text:p/>
          </table:table-cell>
          <table:table-cell table:formula="of:=IF([.BJ112]=&quot;x&quot;;&quot;x&quot;;IF([.BJ112]=&quot;-&quot;;&quot;-&quot;;&quot;&quot;))">
            <text:p/>
          </table:table-cell>
          <table:table-cell table:formula="of:=IF([.BK112]=&quot;x&quot;;&quot;x&quot;;IF([.BK112]=&quot;-&quot;;&quot;-&quot;;&quot;&quot;))">
            <text:p/>
          </table:table-cell>
          <table:table-cell table:formula="of:=IF([.BL112]=&quot;x&quot;;&quot;x&quot;;IF([.BL112]=&quot;-&quot;;&quot;-&quot;;&quot;&quot;))">
            <text:p/>
          </table:table-cell>
          <table:table-cell table:formula="of:=IF([.BM112]=&quot;x&quot;;&quot;x&quot;;IF([.BM112]=&quot;-&quot;;&quot;-&quot;;&quot;&quot;))">
            <text:p/>
          </table:table-cell>
          <table:table-cell table:formula="of:=IF([.BN112]=&quot;x&quot;;&quot;x&quot;;IF([.BN112]=&quot;-&quot;;&quot;-&quot;;&quot;&quot;))">
            <text:p/>
          </table:table-cell>
          <table:table-cell table:formula="of:=IF([.BO112]=&quot;x&quot;;&quot;x&quot;;IF([.BO112]=&quot;-&quot;;&quot;-&quot;;&quot;&quot;))">
            <text:p/>
          </table:table-cell>
          <table:table-cell table:formula="of:=IF([.BP112]=&quot;x&quot;;&quot;x&quot;;IF([.BP112]=&quot;-&quot;;&quot;-&quot;;&quot;&quot;))">
            <text:p/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2" calcext:value-type="float">
            <text:p>112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3]=&quot;x&quot;;&quot;x&quot;;IF([.AS113]=&quot;-&quot;;&quot;-&quot;;&quot;&quot;))">
            <text:p/>
          </table:table-cell>
          <table:table-cell table:formula="of:=IF([.AT113]=&quot;x&quot;;&quot;x&quot;;IF([.AT113]=&quot;-&quot;;&quot;-&quot;;&quot;&quot;))">
            <text:p/>
          </table:table-cell>
          <table:table-cell table:formula="of:=IF([.AU113]=&quot;x&quot;;&quot;x&quot;;IF([.AU113]=&quot;-&quot;;&quot;-&quot;;&quot;&quot;))">
            <text:p/>
          </table:table-cell>
          <table:table-cell table:formula="of:=IF([.AV113]=&quot;x&quot;;&quot;x&quot;;IF([.AV113]=&quot;-&quot;;&quot;-&quot;;&quot;&quot;))">
            <text:p/>
          </table:table-cell>
          <table:table-cell table:formula="of:=IF([.AW113]=&quot;x&quot;;&quot;x&quot;;IF([.AW113]=&quot;-&quot;;&quot;-&quot;;&quot;&quot;))">
            <text:p/>
          </table:table-cell>
          <table:table-cell table:formula="of:=IF([.AX113]=&quot;x&quot;;&quot;x&quot;;IF([.AX113]=&quot;-&quot;;&quot;-&quot;;&quot;&quot;))">
            <text:p/>
          </table:table-cell>
          <table:table-cell table:formula="of:=IF([.AY113]=&quot;x&quot;;&quot;x&quot;;IF([.AY113]=&quot;-&quot;;&quot;-&quot;;&quot;&quot;))">
            <text:p/>
          </table:table-cell>
          <table:table-cell table:formula="of:=IF([.AZ113]=&quot;x&quot;;&quot;x&quot;;IF([.AZ113]=&quot;-&quot;;&quot;-&quot;;&quot;&quot;))">
            <text:p/>
          </table:table-cell>
          <table:table-cell table:formula="of:=IF([.BA113]=&quot;x&quot;;&quot;x&quot;;IF([.BA113]=&quot;-&quot;;&quot;-&quot;;&quot;&quot;))">
            <text:p/>
          </table:table-cell>
          <table:table-cell table:formula="of:=IF([.BB113]=&quot;x&quot;;&quot;x&quot;;IF([.BB113]=&quot;-&quot;;&quot;-&quot;;&quot;&quot;))" office:value-type="string" office:string-value="x" calcext:value-type="string">
            <text:p>x</text:p>
          </table:table-cell>
          <table:table-cell table:formula="of:=IF([.BC113]=&quot;x&quot;;&quot;x&quot;;IF([.BC113]=&quot;-&quot;;&quot;-&quot;;&quot;&quot;))">
            <text:p/>
          </table:table-cell>
          <table:table-cell table:formula="of:=IF([.BD113]=&quot;x&quot;;&quot;x&quot;;IF([.BD113]=&quot;-&quot;;&quot;-&quot;;&quot;&quot;))">
            <text:p/>
          </table:table-cell>
          <table:table-cell table:formula="of:=IF([.BE113]=&quot;x&quot;;&quot;x&quot;;IF([.BE113]=&quot;-&quot;;&quot;-&quot;;&quot;&quot;))">
            <text:p/>
          </table:table-cell>
          <table:table-cell table:formula="of:=IF([.BF113]=&quot;x&quot;;&quot;x&quot;;IF([.BF113]=&quot;-&quot;;&quot;-&quot;;&quot;&quot;))">
            <text:p/>
          </table:table-cell>
          <table:table-cell table:formula="of:=IF([.BG113]=&quot;x&quot;;&quot;x&quot;;IF([.BG113]=&quot;-&quot;;&quot;-&quot;;&quot;&quot;))">
            <text:p/>
          </table:table-cell>
          <table:table-cell table:formula="of:=IF([.BH113]=&quot;x&quot;;&quot;x&quot;;IF([.BH113]=&quot;-&quot;;&quot;-&quot;;&quot;&quot;))">
            <text:p/>
          </table:table-cell>
          <table:table-cell table:formula="of:=IF([.BI113]=&quot;x&quot;;&quot;x&quot;;IF([.BI113]=&quot;-&quot;;&quot;-&quot;;&quot;&quot;))">
            <text:p/>
          </table:table-cell>
          <table:table-cell table:formula="of:=IF([.BJ113]=&quot;x&quot;;&quot;x&quot;;IF([.BJ113]=&quot;-&quot;;&quot;-&quot;;&quot;&quot;))">
            <text:p/>
          </table:table-cell>
          <table:table-cell table:formula="of:=IF([.BK113]=&quot;x&quot;;&quot;x&quot;;IF([.BK113]=&quot;-&quot;;&quot;-&quot;;&quot;&quot;))">
            <text:p/>
          </table:table-cell>
          <table:table-cell table:formula="of:=IF([.BL113]=&quot;x&quot;;&quot;x&quot;;IF([.BL113]=&quot;-&quot;;&quot;-&quot;;&quot;&quot;))">
            <text:p/>
          </table:table-cell>
          <table:table-cell table:formula="of:=IF([.BM113]=&quot;x&quot;;&quot;x&quot;;IF([.BM113]=&quot;-&quot;;&quot;-&quot;;&quot;&quot;))">
            <text:p/>
          </table:table-cell>
          <table:table-cell table:formula="of:=IF([.BN113]=&quot;x&quot;;&quot;x&quot;;IF([.BN113]=&quot;-&quot;;&quot;-&quot;;&quot;&quot;))">
            <text:p/>
          </table:table-cell>
          <table:table-cell table:formula="of:=IF([.BO113]=&quot;x&quot;;&quot;x&quot;;IF([.BO113]=&quot;-&quot;;&quot;-&quot;;&quot;&quot;))">
            <text:p/>
          </table:table-cell>
          <table:table-cell table:formula="of:=IF([.BP113]=&quot;x&quot;;&quot;x&quot;;IF([.BP113]=&quot;-&quot;;&quot;-&quot;;&quot;&quot;))">
            <text:p/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3" calcext:value-type="float">
            <text:p>113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4]=&quot;x&quot;;&quot;x&quot;;IF([.AS114]=&quot;-&quot;;&quot;-&quot;;&quot;&quot;))">
            <text:p/>
          </table:table-cell>
          <table:table-cell table:formula="of:=IF([.AT114]=&quot;x&quot;;&quot;x&quot;;IF([.AT114]=&quot;-&quot;;&quot;-&quot;;&quot;&quot;))">
            <text:p/>
          </table:table-cell>
          <table:table-cell table:formula="of:=IF([.AU114]=&quot;x&quot;;&quot;x&quot;;IF([.AU114]=&quot;-&quot;;&quot;-&quot;;&quot;&quot;))">
            <text:p/>
          </table:table-cell>
          <table:table-cell table:formula="of:=IF([.AV114]=&quot;x&quot;;&quot;x&quot;;IF([.AV114]=&quot;-&quot;;&quot;-&quot;;&quot;&quot;))">
            <text:p/>
          </table:table-cell>
          <table:table-cell table:formula="of:=IF([.AW114]=&quot;x&quot;;&quot;x&quot;;IF([.AW114]=&quot;-&quot;;&quot;-&quot;;&quot;&quot;))">
            <text:p/>
          </table:table-cell>
          <table:table-cell table:formula="of:=IF([.AX114]=&quot;x&quot;;&quot;x&quot;;IF([.AX114]=&quot;-&quot;;&quot;-&quot;;&quot;&quot;))">
            <text:p/>
          </table:table-cell>
          <table:table-cell table:formula="of:=IF([.AY114]=&quot;x&quot;;&quot;x&quot;;IF([.AY114]=&quot;-&quot;;&quot;-&quot;;&quot;&quot;))">
            <text:p/>
          </table:table-cell>
          <table:table-cell table:formula="of:=IF([.AZ114]=&quot;x&quot;;&quot;x&quot;;IF([.AZ114]=&quot;-&quot;;&quot;-&quot;;&quot;&quot;))">
            <text:p/>
          </table:table-cell>
          <table:table-cell table:formula="of:=IF([.BA114]=&quot;x&quot;;&quot;x&quot;;IF([.BA114]=&quot;-&quot;;&quot;-&quot;;&quot;&quot;))">
            <text:p/>
          </table:table-cell>
          <table:table-cell table:formula="of:=IF([.BB114]=&quot;x&quot;;&quot;x&quot;;IF([.BB114]=&quot;-&quot;;&quot;-&quot;;&quot;&quot;))" office:value-type="string" office:string-value="x" calcext:value-type="string">
            <text:p>x</text:p>
          </table:table-cell>
          <table:table-cell table:formula="of:=IF([.BC114]=&quot;x&quot;;&quot;x&quot;;IF([.BC114]=&quot;-&quot;;&quot;-&quot;;&quot;&quot;))">
            <text:p/>
          </table:table-cell>
          <table:table-cell table:formula="of:=IF([.BD114]=&quot;x&quot;;&quot;x&quot;;IF([.BD114]=&quot;-&quot;;&quot;-&quot;;&quot;&quot;))">
            <text:p/>
          </table:table-cell>
          <table:table-cell table:formula="of:=IF([.BE114]=&quot;x&quot;;&quot;x&quot;;IF([.BE114]=&quot;-&quot;;&quot;-&quot;;&quot;&quot;))">
            <text:p/>
          </table:table-cell>
          <table:table-cell table:formula="of:=IF([.BF114]=&quot;x&quot;;&quot;x&quot;;IF([.BF114]=&quot;-&quot;;&quot;-&quot;;&quot;&quot;))">
            <text:p/>
          </table:table-cell>
          <table:table-cell table:formula="of:=IF([.BG114]=&quot;x&quot;;&quot;x&quot;;IF([.BG114]=&quot;-&quot;;&quot;-&quot;;&quot;&quot;))">
            <text:p/>
          </table:table-cell>
          <table:table-cell table:formula="of:=IF([.BH114]=&quot;x&quot;;&quot;x&quot;;IF([.BH114]=&quot;-&quot;;&quot;-&quot;;&quot;&quot;))">
            <text:p/>
          </table:table-cell>
          <table:table-cell table:formula="of:=IF([.BI114]=&quot;x&quot;;&quot;x&quot;;IF([.BI114]=&quot;-&quot;;&quot;-&quot;;&quot;&quot;))">
            <text:p/>
          </table:table-cell>
          <table:table-cell table:formula="of:=IF([.BJ114]=&quot;x&quot;;&quot;x&quot;;IF([.BJ114]=&quot;-&quot;;&quot;-&quot;;&quot;&quot;))">
            <text:p/>
          </table:table-cell>
          <table:table-cell table:formula="of:=IF([.BK114]=&quot;x&quot;;&quot;x&quot;;IF([.BK114]=&quot;-&quot;;&quot;-&quot;;&quot;&quot;))">
            <text:p/>
          </table:table-cell>
          <table:table-cell table:formula="of:=IF([.BL114]=&quot;x&quot;;&quot;x&quot;;IF([.BL114]=&quot;-&quot;;&quot;-&quot;;&quot;&quot;))">
            <text:p/>
          </table:table-cell>
          <table:table-cell table:formula="of:=IF([.BM114]=&quot;x&quot;;&quot;x&quot;;IF([.BM114]=&quot;-&quot;;&quot;-&quot;;&quot;&quot;))">
            <text:p/>
          </table:table-cell>
          <table:table-cell table:formula="of:=IF([.BN114]=&quot;x&quot;;&quot;x&quot;;IF([.BN114]=&quot;-&quot;;&quot;-&quot;;&quot;&quot;))">
            <text:p/>
          </table:table-cell>
          <table:table-cell table:formula="of:=IF([.BO114]=&quot;x&quot;;&quot;x&quot;;IF([.BO114]=&quot;-&quot;;&quot;-&quot;;&quot;&quot;))">
            <text:p/>
          </table:table-cell>
          <table:table-cell table:formula="of:=IF([.BP114]=&quot;x&quot;;&quot;x&quot;;IF([.BP114]=&quot;-&quot;;&quot;-&quot;;&quot;&quot;))">
            <text:p/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4" calcext:value-type="float">
            <text:p>114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5]=&quot;x&quot;;&quot;x&quot;;IF([.AS115]=&quot;-&quot;;&quot;-&quot;;&quot;&quot;))">
            <text:p/>
          </table:table-cell>
          <table:table-cell table:formula="of:=IF([.AT115]=&quot;x&quot;;&quot;x&quot;;IF([.AT115]=&quot;-&quot;;&quot;-&quot;;&quot;&quot;))">
            <text:p/>
          </table:table-cell>
          <table:table-cell table:formula="of:=IF([.AU115]=&quot;x&quot;;&quot;x&quot;;IF([.AU115]=&quot;-&quot;;&quot;-&quot;;&quot;&quot;))">
            <text:p/>
          </table:table-cell>
          <table:table-cell table:formula="of:=IF([.AV115]=&quot;x&quot;;&quot;x&quot;;IF([.AV115]=&quot;-&quot;;&quot;-&quot;;&quot;&quot;))">
            <text:p/>
          </table:table-cell>
          <table:table-cell table:formula="of:=IF([.AW115]=&quot;x&quot;;&quot;x&quot;;IF([.AW115]=&quot;-&quot;;&quot;-&quot;;&quot;&quot;))">
            <text:p/>
          </table:table-cell>
          <table:table-cell table:formula="of:=IF([.AX115]=&quot;x&quot;;&quot;x&quot;;IF([.AX115]=&quot;-&quot;;&quot;-&quot;;&quot;&quot;))">
            <text:p/>
          </table:table-cell>
          <table:table-cell table:formula="of:=IF([.AY115]=&quot;x&quot;;&quot;x&quot;;IF([.AY115]=&quot;-&quot;;&quot;-&quot;;&quot;&quot;))">
            <text:p/>
          </table:table-cell>
          <table:table-cell table:formula="of:=IF([.AZ115]=&quot;x&quot;;&quot;x&quot;;IF([.AZ115]=&quot;-&quot;;&quot;-&quot;;&quot;&quot;))">
            <text:p/>
          </table:table-cell>
          <table:table-cell table:formula="of:=IF([.BA115]=&quot;x&quot;;&quot;x&quot;;IF([.BA115]=&quot;-&quot;;&quot;-&quot;;&quot;&quot;))">
            <text:p/>
          </table:table-cell>
          <table:table-cell table:formula="of:=IF([.BB115]=&quot;x&quot;;&quot;x&quot;;IF([.BB115]=&quot;-&quot;;&quot;-&quot;;&quot;&quot;))" office:value-type="string" office:string-value="x" calcext:value-type="string">
            <text:p>x</text:p>
          </table:table-cell>
          <table:table-cell table:formula="of:=IF([.BC115]=&quot;x&quot;;&quot;x&quot;;IF([.BC115]=&quot;-&quot;;&quot;-&quot;;&quot;&quot;))">
            <text:p/>
          </table:table-cell>
          <table:table-cell table:formula="of:=IF([.BD115]=&quot;x&quot;;&quot;x&quot;;IF([.BD115]=&quot;-&quot;;&quot;-&quot;;&quot;&quot;))">
            <text:p/>
          </table:table-cell>
          <table:table-cell table:formula="of:=IF([.BE115]=&quot;x&quot;;&quot;x&quot;;IF([.BE115]=&quot;-&quot;;&quot;-&quot;;&quot;&quot;))">
            <text:p/>
          </table:table-cell>
          <table:table-cell table:formula="of:=IF([.BF115]=&quot;x&quot;;&quot;x&quot;;IF([.BF115]=&quot;-&quot;;&quot;-&quot;;&quot;&quot;))">
            <text:p/>
          </table:table-cell>
          <table:table-cell table:formula="of:=IF([.BG115]=&quot;x&quot;;&quot;x&quot;;IF([.BG115]=&quot;-&quot;;&quot;-&quot;;&quot;&quot;))">
            <text:p/>
          </table:table-cell>
          <table:table-cell table:formula="of:=IF([.BH115]=&quot;x&quot;;&quot;x&quot;;IF([.BH115]=&quot;-&quot;;&quot;-&quot;;&quot;&quot;))">
            <text:p/>
          </table:table-cell>
          <table:table-cell table:formula="of:=IF([.BI115]=&quot;x&quot;;&quot;x&quot;;IF([.BI115]=&quot;-&quot;;&quot;-&quot;;&quot;&quot;))">
            <text:p/>
          </table:table-cell>
          <table:table-cell table:formula="of:=IF([.BJ115]=&quot;x&quot;;&quot;x&quot;;IF([.BJ115]=&quot;-&quot;;&quot;-&quot;;&quot;&quot;))">
            <text:p/>
          </table:table-cell>
          <table:table-cell table:formula="of:=IF([.BK115]=&quot;x&quot;;&quot;x&quot;;IF([.BK115]=&quot;-&quot;;&quot;-&quot;;&quot;&quot;))">
            <text:p/>
          </table:table-cell>
          <table:table-cell table:formula="of:=IF([.BL115]=&quot;x&quot;;&quot;x&quot;;IF([.BL115]=&quot;-&quot;;&quot;-&quot;;&quot;&quot;))">
            <text:p/>
          </table:table-cell>
          <table:table-cell table:formula="of:=IF([.BM115]=&quot;x&quot;;&quot;x&quot;;IF([.BM115]=&quot;-&quot;;&quot;-&quot;;&quot;&quot;))">
            <text:p/>
          </table:table-cell>
          <table:table-cell table:formula="of:=IF([.BN115]=&quot;x&quot;;&quot;x&quot;;IF([.BN115]=&quot;-&quot;;&quot;-&quot;;&quot;&quot;))">
            <text:p/>
          </table:table-cell>
          <table:table-cell table:formula="of:=IF([.BO115]=&quot;x&quot;;&quot;x&quot;;IF([.BO115]=&quot;-&quot;;&quot;-&quot;;&quot;&quot;))">
            <text:p/>
          </table:table-cell>
          <table:table-cell table:formula="of:=IF([.BP115]=&quot;x&quot;;&quot;x&quot;;IF([.BP115]=&quot;-&quot;;&quot;-&quot;;&quot;&quot;))">
            <text:p/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5" calcext:value-type="float">
            <text:p>115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6]=&quot;x&quot;;&quot;x&quot;;IF([.AS116]=&quot;-&quot;;&quot;-&quot;;&quot;&quot;))">
            <text:p/>
          </table:table-cell>
          <table:table-cell table:formula="of:=IF([.AT116]=&quot;x&quot;;&quot;x&quot;;IF([.AT116]=&quot;-&quot;;&quot;-&quot;;&quot;&quot;))">
            <text:p/>
          </table:table-cell>
          <table:table-cell table:formula="of:=IF([.AU116]=&quot;x&quot;;&quot;x&quot;;IF([.AU116]=&quot;-&quot;;&quot;-&quot;;&quot;&quot;))">
            <text:p/>
          </table:table-cell>
          <table:table-cell table:formula="of:=IF([.AV116]=&quot;x&quot;;&quot;x&quot;;IF([.AV116]=&quot;-&quot;;&quot;-&quot;;&quot;&quot;))">
            <text:p/>
          </table:table-cell>
          <table:table-cell table:formula="of:=IF([.AW116]=&quot;x&quot;;&quot;x&quot;;IF([.AW116]=&quot;-&quot;;&quot;-&quot;;&quot;&quot;))">
            <text:p/>
          </table:table-cell>
          <table:table-cell table:formula="of:=IF([.AX116]=&quot;x&quot;;&quot;x&quot;;IF([.AX116]=&quot;-&quot;;&quot;-&quot;;&quot;&quot;))">
            <text:p/>
          </table:table-cell>
          <table:table-cell table:formula="of:=IF([.AY116]=&quot;x&quot;;&quot;x&quot;;IF([.AY116]=&quot;-&quot;;&quot;-&quot;;&quot;&quot;))">
            <text:p/>
          </table:table-cell>
          <table:table-cell table:formula="of:=IF([.AZ116]=&quot;x&quot;;&quot;x&quot;;IF([.AZ116]=&quot;-&quot;;&quot;-&quot;;&quot;&quot;))">
            <text:p/>
          </table:table-cell>
          <table:table-cell table:formula="of:=IF([.BA116]=&quot;x&quot;;&quot;x&quot;;IF([.BA116]=&quot;-&quot;;&quot;-&quot;;&quot;&quot;))">
            <text:p/>
          </table:table-cell>
          <table:table-cell table:formula="of:=IF([.BB116]=&quot;x&quot;;&quot;x&quot;;IF([.BB116]=&quot;-&quot;;&quot;-&quot;;&quot;&quot;))" office:value-type="string" office:string-value="x" calcext:value-type="string">
            <text:p>x</text:p>
          </table:table-cell>
          <table:table-cell table:formula="of:=IF([.BC116]=&quot;x&quot;;&quot;x&quot;;IF([.BC116]=&quot;-&quot;;&quot;-&quot;;&quot;&quot;))">
            <text:p/>
          </table:table-cell>
          <table:table-cell table:formula="of:=IF([.BD116]=&quot;x&quot;;&quot;x&quot;;IF([.BD116]=&quot;-&quot;;&quot;-&quot;;&quot;&quot;))">
            <text:p/>
          </table:table-cell>
          <table:table-cell table:formula="of:=IF([.BE116]=&quot;x&quot;;&quot;x&quot;;IF([.BE116]=&quot;-&quot;;&quot;-&quot;;&quot;&quot;))">
            <text:p/>
          </table:table-cell>
          <table:table-cell table:formula="of:=IF([.BF116]=&quot;x&quot;;&quot;x&quot;;IF([.BF116]=&quot;-&quot;;&quot;-&quot;;&quot;&quot;))">
            <text:p/>
          </table:table-cell>
          <table:table-cell table:formula="of:=IF([.BG116]=&quot;x&quot;;&quot;x&quot;;IF([.BG116]=&quot;-&quot;;&quot;-&quot;;&quot;&quot;))">
            <text:p/>
          </table:table-cell>
          <table:table-cell table:formula="of:=IF([.BH116]=&quot;x&quot;;&quot;x&quot;;IF([.BH116]=&quot;-&quot;;&quot;-&quot;;&quot;&quot;))">
            <text:p/>
          </table:table-cell>
          <table:table-cell table:formula="of:=IF([.BI116]=&quot;x&quot;;&quot;x&quot;;IF([.BI116]=&quot;-&quot;;&quot;-&quot;;&quot;&quot;))">
            <text:p/>
          </table:table-cell>
          <table:table-cell table:formula="of:=IF([.BJ116]=&quot;x&quot;;&quot;x&quot;;IF([.BJ116]=&quot;-&quot;;&quot;-&quot;;&quot;&quot;))">
            <text:p/>
          </table:table-cell>
          <table:table-cell table:formula="of:=IF([.BK116]=&quot;x&quot;;&quot;x&quot;;IF([.BK116]=&quot;-&quot;;&quot;-&quot;;&quot;&quot;))">
            <text:p/>
          </table:table-cell>
          <table:table-cell table:formula="of:=IF([.BL116]=&quot;x&quot;;&quot;x&quot;;IF([.BL116]=&quot;-&quot;;&quot;-&quot;;&quot;&quot;))">
            <text:p/>
          </table:table-cell>
          <table:table-cell table:formula="of:=IF([.BM116]=&quot;x&quot;;&quot;x&quot;;IF([.BM116]=&quot;-&quot;;&quot;-&quot;;&quot;&quot;))">
            <text:p/>
          </table:table-cell>
          <table:table-cell table:formula="of:=IF([.BN116]=&quot;x&quot;;&quot;x&quot;;IF([.BN116]=&quot;-&quot;;&quot;-&quot;;&quot;&quot;))">
            <text:p/>
          </table:table-cell>
          <table:table-cell table:formula="of:=IF([.BO116]=&quot;x&quot;;&quot;x&quot;;IF([.BO116]=&quot;-&quot;;&quot;-&quot;;&quot;&quot;))">
            <text:p/>
          </table:table-cell>
          <table:table-cell table:formula="of:=IF([.BP116]=&quot;x&quot;;&quot;x&quot;;IF([.BP116]=&quot;-&quot;;&quot;-&quot;;&quot;&quot;))">
            <text:p/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6" calcext:value-type="float">
            <text:p>116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Unassigned</text:p>
          </table:table-cell>
          <table:table-cell table:style-name="ce15" table:content-validation-name="val5"/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7]=&quot;x&quot;;&quot;x&quot;;IF([.AS117]=&quot;-&quot;;&quot;-&quot;;&quot;&quot;))">
            <text:p/>
          </table:table-cell>
          <table:table-cell table:formula="of:=IF([.AT117]=&quot;x&quot;;&quot;x&quot;;IF([.AT117]=&quot;-&quot;;&quot;-&quot;;&quot;&quot;))">
            <text:p/>
          </table:table-cell>
          <table:table-cell table:formula="of:=IF([.AU117]=&quot;x&quot;;&quot;x&quot;;IF([.AU117]=&quot;-&quot;;&quot;-&quot;;&quot;&quot;))">
            <text:p/>
          </table:table-cell>
          <table:table-cell table:formula="of:=IF([.AV117]=&quot;x&quot;;&quot;x&quot;;IF([.AV117]=&quot;-&quot;;&quot;-&quot;;&quot;&quot;))">
            <text:p/>
          </table:table-cell>
          <table:table-cell table:formula="of:=IF([.AW117]=&quot;x&quot;;&quot;x&quot;;IF([.AW117]=&quot;-&quot;;&quot;-&quot;;&quot;&quot;))">
            <text:p/>
          </table:table-cell>
          <table:table-cell table:formula="of:=IF([.AX117]=&quot;x&quot;;&quot;x&quot;;IF([.AX117]=&quot;-&quot;;&quot;-&quot;;&quot;&quot;))">
            <text:p/>
          </table:table-cell>
          <table:table-cell table:formula="of:=IF([.AY117]=&quot;x&quot;;&quot;x&quot;;IF([.AY117]=&quot;-&quot;;&quot;-&quot;;&quot;&quot;))">
            <text:p/>
          </table:table-cell>
          <table:table-cell table:formula="of:=IF([.AZ117]=&quot;x&quot;;&quot;x&quot;;IF([.AZ117]=&quot;-&quot;;&quot;-&quot;;&quot;&quot;))">
            <text:p/>
          </table:table-cell>
          <table:table-cell table:formula="of:=IF([.BA117]=&quot;x&quot;;&quot;x&quot;;IF([.BA117]=&quot;-&quot;;&quot;-&quot;;&quot;&quot;))">
            <text:p/>
          </table:table-cell>
          <table:table-cell table:formula="of:=IF([.BB117]=&quot;x&quot;;&quot;x&quot;;IF([.BB117]=&quot;-&quot;;&quot;-&quot;;&quot;&quot;))" office:value-type="string" office:string-value="x" calcext:value-type="string">
            <text:p>x</text:p>
          </table:table-cell>
          <table:table-cell table:formula="of:=IF([.BC117]=&quot;x&quot;;&quot;x&quot;;IF([.BC117]=&quot;-&quot;;&quot;-&quot;;&quot;&quot;))">
            <text:p/>
          </table:table-cell>
          <table:table-cell table:formula="of:=IF([.BD117]=&quot;x&quot;;&quot;x&quot;;IF([.BD117]=&quot;-&quot;;&quot;-&quot;;&quot;&quot;))">
            <text:p/>
          </table:table-cell>
          <table:table-cell table:formula="of:=IF([.BE117]=&quot;x&quot;;&quot;x&quot;;IF([.BE117]=&quot;-&quot;;&quot;-&quot;;&quot;&quot;))">
            <text:p/>
          </table:table-cell>
          <table:table-cell table:formula="of:=IF([.BF117]=&quot;x&quot;;&quot;x&quot;;IF([.BF117]=&quot;-&quot;;&quot;-&quot;;&quot;&quot;))">
            <text:p/>
          </table:table-cell>
          <table:table-cell table:formula="of:=IF([.BG117]=&quot;x&quot;;&quot;x&quot;;IF([.BG117]=&quot;-&quot;;&quot;-&quot;;&quot;&quot;))">
            <text:p/>
          </table:table-cell>
          <table:table-cell table:formula="of:=IF([.BH117]=&quot;x&quot;;&quot;x&quot;;IF([.BH117]=&quot;-&quot;;&quot;-&quot;;&quot;&quot;))">
            <text:p/>
          </table:table-cell>
          <table:table-cell table:formula="of:=IF([.BI117]=&quot;x&quot;;&quot;x&quot;;IF([.BI117]=&quot;-&quot;;&quot;-&quot;;&quot;&quot;))">
            <text:p/>
          </table:table-cell>
          <table:table-cell table:formula="of:=IF([.BJ117]=&quot;x&quot;;&quot;x&quot;;IF([.BJ117]=&quot;-&quot;;&quot;-&quot;;&quot;&quot;))">
            <text:p/>
          </table:table-cell>
          <table:table-cell table:formula="of:=IF([.BK117]=&quot;x&quot;;&quot;x&quot;;IF([.BK117]=&quot;-&quot;;&quot;-&quot;;&quot;&quot;))">
            <text:p/>
          </table:table-cell>
          <table:table-cell table:formula="of:=IF([.BL117]=&quot;x&quot;;&quot;x&quot;;IF([.BL117]=&quot;-&quot;;&quot;-&quot;;&quot;&quot;))">
            <text:p/>
          </table:table-cell>
          <table:table-cell table:formula="of:=IF([.BM117]=&quot;x&quot;;&quot;x&quot;;IF([.BM117]=&quot;-&quot;;&quot;-&quot;;&quot;&quot;))">
            <text:p/>
          </table:table-cell>
          <table:table-cell table:formula="of:=IF([.BN117]=&quot;x&quot;;&quot;x&quot;;IF([.BN117]=&quot;-&quot;;&quot;-&quot;;&quot;&quot;))">
            <text:p/>
          </table:table-cell>
          <table:table-cell table:formula="of:=IF([.BO117]=&quot;x&quot;;&quot;x&quot;;IF([.BO117]=&quot;-&quot;;&quot;-&quot;;&quot;&quot;))">
            <text:p/>
          </table:table-cell>
          <table:table-cell table:formula="of:=IF([.BP117]=&quot;x&quot;;&quot;x&quot;;IF([.BP117]=&quot;-&quot;;&quot;-&quot;;&quot;&quot;))">
            <text:p/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7" calcext:value-type="float">
            <text:p>117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8]=&quot;x&quot;;&quot;x&quot;;IF([.AS118]=&quot;-&quot;;&quot;-&quot;;&quot;&quot;))">
            <text:p/>
          </table:table-cell>
          <table:table-cell table:formula="of:=IF([.AT118]=&quot;x&quot;;&quot;x&quot;;IF([.AT118]=&quot;-&quot;;&quot;-&quot;;&quot;&quot;))">
            <text:p/>
          </table:table-cell>
          <table:table-cell table:formula="of:=IF([.AU118]=&quot;x&quot;;&quot;x&quot;;IF([.AU118]=&quot;-&quot;;&quot;-&quot;;&quot;&quot;))">
            <text:p/>
          </table:table-cell>
          <table:table-cell table:formula="of:=IF([.AV118]=&quot;x&quot;;&quot;x&quot;;IF([.AV118]=&quot;-&quot;;&quot;-&quot;;&quot;&quot;))">
            <text:p/>
          </table:table-cell>
          <table:table-cell table:formula="of:=IF([.AW118]=&quot;x&quot;;&quot;x&quot;;IF([.AW118]=&quot;-&quot;;&quot;-&quot;;&quot;&quot;))">
            <text:p/>
          </table:table-cell>
          <table:table-cell table:formula="of:=IF([.AX118]=&quot;x&quot;;&quot;x&quot;;IF([.AX118]=&quot;-&quot;;&quot;-&quot;;&quot;&quot;))">
            <text:p/>
          </table:table-cell>
          <table:table-cell table:formula="of:=IF([.AY118]=&quot;x&quot;;&quot;x&quot;;IF([.AY118]=&quot;-&quot;;&quot;-&quot;;&quot;&quot;))">
            <text:p/>
          </table:table-cell>
          <table:table-cell table:formula="of:=IF([.AZ118]=&quot;x&quot;;&quot;x&quot;;IF([.AZ118]=&quot;-&quot;;&quot;-&quot;;&quot;&quot;))">
            <text:p/>
          </table:table-cell>
          <table:table-cell table:formula="of:=IF([.BA118]=&quot;x&quot;;&quot;x&quot;;IF([.BA118]=&quot;-&quot;;&quot;-&quot;;&quot;&quot;))">
            <text:p/>
          </table:table-cell>
          <table:table-cell table:formula="of:=IF([.BB118]=&quot;x&quot;;&quot;x&quot;;IF([.BB118]=&quot;-&quot;;&quot;-&quot;;&quot;&quot;))" office:value-type="string" office:string-value="x" calcext:value-type="string">
            <text:p>x</text:p>
          </table:table-cell>
          <table:table-cell table:formula="of:=IF([.BC118]=&quot;x&quot;;&quot;x&quot;;IF([.BC118]=&quot;-&quot;;&quot;-&quot;;&quot;&quot;))">
            <text:p/>
          </table:table-cell>
          <table:table-cell table:formula="of:=IF([.BD118]=&quot;x&quot;;&quot;x&quot;;IF([.BD118]=&quot;-&quot;;&quot;-&quot;;&quot;&quot;))">
            <text:p/>
          </table:table-cell>
          <table:table-cell table:formula="of:=IF([.BE118]=&quot;x&quot;;&quot;x&quot;;IF([.BE118]=&quot;-&quot;;&quot;-&quot;;&quot;&quot;))">
            <text:p/>
          </table:table-cell>
          <table:table-cell table:formula="of:=IF([.BF118]=&quot;x&quot;;&quot;x&quot;;IF([.BF118]=&quot;-&quot;;&quot;-&quot;;&quot;&quot;))">
            <text:p/>
          </table:table-cell>
          <table:table-cell table:formula="of:=IF([.BG118]=&quot;x&quot;;&quot;x&quot;;IF([.BG118]=&quot;-&quot;;&quot;-&quot;;&quot;&quot;))">
            <text:p/>
          </table:table-cell>
          <table:table-cell table:formula="of:=IF([.BH118]=&quot;x&quot;;&quot;x&quot;;IF([.BH118]=&quot;-&quot;;&quot;-&quot;;&quot;&quot;))">
            <text:p/>
          </table:table-cell>
          <table:table-cell table:formula="of:=IF([.BI118]=&quot;x&quot;;&quot;x&quot;;IF([.BI118]=&quot;-&quot;;&quot;-&quot;;&quot;&quot;))">
            <text:p/>
          </table:table-cell>
          <table:table-cell table:formula="of:=IF([.BJ118]=&quot;x&quot;;&quot;x&quot;;IF([.BJ118]=&quot;-&quot;;&quot;-&quot;;&quot;&quot;))">
            <text:p/>
          </table:table-cell>
          <table:table-cell table:formula="of:=IF([.BK118]=&quot;x&quot;;&quot;x&quot;;IF([.BK118]=&quot;-&quot;;&quot;-&quot;;&quot;&quot;))">
            <text:p/>
          </table:table-cell>
          <table:table-cell table:formula="of:=IF([.BL118]=&quot;x&quot;;&quot;x&quot;;IF([.BL118]=&quot;-&quot;;&quot;-&quot;;&quot;&quot;))">
            <text:p/>
          </table:table-cell>
          <table:table-cell table:formula="of:=IF([.BM118]=&quot;x&quot;;&quot;x&quot;;IF([.BM118]=&quot;-&quot;;&quot;-&quot;;&quot;&quot;))">
            <text:p/>
          </table:table-cell>
          <table:table-cell table:formula="of:=IF([.BN118]=&quot;x&quot;;&quot;x&quot;;IF([.BN118]=&quot;-&quot;;&quot;-&quot;;&quot;&quot;))">
            <text:p/>
          </table:table-cell>
          <table:table-cell table:formula="of:=IF([.BO118]=&quot;x&quot;;&quot;x&quot;;IF([.BO118]=&quot;-&quot;;&quot;-&quot;;&quot;&quot;))">
            <text:p/>
          </table:table-cell>
          <table:table-cell table:formula="of:=IF([.BP118]=&quot;x&quot;;&quot;x&quot;;IF([.BP118]=&quot;-&quot;;&quot;-&quot;;&quot;&quot;))">
            <text:p/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8" calcext:value-type="float">
            <text:p>118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Surface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9]=&quot;x&quot;;&quot;x&quot;;IF([.AS119]=&quot;-&quot;;&quot;-&quot;;&quot;&quot;))">
            <text:p/>
          </table:table-cell>
          <table:table-cell table:formula="of:=IF([.AT119]=&quot;x&quot;;&quot;x&quot;;IF([.AT119]=&quot;-&quot;;&quot;-&quot;;&quot;&quot;))">
            <text:p/>
          </table:table-cell>
          <table:table-cell table:formula="of:=IF([.AU119]=&quot;x&quot;;&quot;x&quot;;IF([.AU119]=&quot;-&quot;;&quot;-&quot;;&quot;&quot;))">
            <text:p/>
          </table:table-cell>
          <table:table-cell table:formula="of:=IF([.AV119]=&quot;x&quot;;&quot;x&quot;;IF([.AV119]=&quot;-&quot;;&quot;-&quot;;&quot;&quot;))">
            <text:p/>
          </table:table-cell>
          <table:table-cell table:formula="of:=IF([.AW119]=&quot;x&quot;;&quot;x&quot;;IF([.AW119]=&quot;-&quot;;&quot;-&quot;;&quot;&quot;))">
            <text:p/>
          </table:table-cell>
          <table:table-cell table:formula="of:=IF([.AX119]=&quot;x&quot;;&quot;x&quot;;IF([.AX119]=&quot;-&quot;;&quot;-&quot;;&quot;&quot;))">
            <text:p/>
          </table:table-cell>
          <table:table-cell table:formula="of:=IF([.AY119]=&quot;x&quot;;&quot;x&quot;;IF([.AY119]=&quot;-&quot;;&quot;-&quot;;&quot;&quot;))">
            <text:p/>
          </table:table-cell>
          <table:table-cell table:formula="of:=IF([.AZ119]=&quot;x&quot;;&quot;x&quot;;IF([.AZ119]=&quot;-&quot;;&quot;-&quot;;&quot;&quot;))">
            <text:p/>
          </table:table-cell>
          <table:table-cell table:formula="of:=IF([.BA119]=&quot;x&quot;;&quot;x&quot;;IF([.BA119]=&quot;-&quot;;&quot;-&quot;;&quot;&quot;))">
            <text:p/>
          </table:table-cell>
          <table:table-cell table:formula="of:=IF([.BB119]=&quot;x&quot;;&quot;x&quot;;IF([.BB119]=&quot;-&quot;;&quot;-&quot;;&quot;&quot;))" office:value-type="string" office:string-value="x" calcext:value-type="string">
            <text:p>x</text:p>
          </table:table-cell>
          <table:table-cell table:formula="of:=IF([.BC119]=&quot;x&quot;;&quot;x&quot;;IF([.BC119]=&quot;-&quot;;&quot;-&quot;;&quot;&quot;))">
            <text:p/>
          </table:table-cell>
          <table:table-cell table:formula="of:=IF([.BD119]=&quot;x&quot;;&quot;x&quot;;IF([.BD119]=&quot;-&quot;;&quot;-&quot;;&quot;&quot;))">
            <text:p/>
          </table:table-cell>
          <table:table-cell table:formula="of:=IF([.BE119]=&quot;x&quot;;&quot;x&quot;;IF([.BE119]=&quot;-&quot;;&quot;-&quot;;&quot;&quot;))">
            <text:p/>
          </table:table-cell>
          <table:table-cell table:formula="of:=IF([.BF119]=&quot;x&quot;;&quot;x&quot;;IF([.BF119]=&quot;-&quot;;&quot;-&quot;;&quot;&quot;))">
            <text:p/>
          </table:table-cell>
          <table:table-cell table:formula="of:=IF([.BG119]=&quot;x&quot;;&quot;x&quot;;IF([.BG119]=&quot;-&quot;;&quot;-&quot;;&quot;&quot;))">
            <text:p/>
          </table:table-cell>
          <table:table-cell table:formula="of:=IF([.BH119]=&quot;x&quot;;&quot;x&quot;;IF([.BH119]=&quot;-&quot;;&quot;-&quot;;&quot;&quot;))">
            <text:p/>
          </table:table-cell>
          <table:table-cell table:formula="of:=IF([.BI119]=&quot;x&quot;;&quot;x&quot;;IF([.BI119]=&quot;-&quot;;&quot;-&quot;;&quot;&quot;))">
            <text:p/>
          </table:table-cell>
          <table:table-cell table:formula="of:=IF([.BJ119]=&quot;x&quot;;&quot;x&quot;;IF([.BJ119]=&quot;-&quot;;&quot;-&quot;;&quot;&quot;))">
            <text:p/>
          </table:table-cell>
          <table:table-cell table:formula="of:=IF([.BK119]=&quot;x&quot;;&quot;x&quot;;IF([.BK119]=&quot;-&quot;;&quot;-&quot;;&quot;&quot;))">
            <text:p/>
          </table:table-cell>
          <table:table-cell table:formula="of:=IF([.BL119]=&quot;x&quot;;&quot;x&quot;;IF([.BL119]=&quot;-&quot;;&quot;-&quot;;&quot;&quot;))">
            <text:p/>
          </table:table-cell>
          <table:table-cell table:formula="of:=IF([.BM119]=&quot;x&quot;;&quot;x&quot;;IF([.BM119]=&quot;-&quot;;&quot;-&quot;;&quot;&quot;))">
            <text:p/>
          </table:table-cell>
          <table:table-cell table:formula="of:=IF([.BN119]=&quot;x&quot;;&quot;x&quot;;IF([.BN119]=&quot;-&quot;;&quot;-&quot;;&quot;&quot;))">
            <text:p/>
          </table:table-cell>
          <table:table-cell table:formula="of:=IF([.BO119]=&quot;x&quot;;&quot;x&quot;;IF([.BO119]=&quot;-&quot;;&quot;-&quot;;&quot;&quot;))">
            <text:p/>
          </table:table-cell>
          <table:table-cell table:formula="of:=IF([.BP119]=&quot;x&quot;;&quot;x&quot;;IF([.BP119]=&quot;-&quot;;&quot;-&quot;;&quot;&quot;))">
            <text:p/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9" calcext:value-type="float">
            <text:p>119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Surface DX 5/6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20]=&quot;x&quot;;&quot;x&quot;;IF([.AS120]=&quot;-&quot;;&quot;-&quot;;&quot;&quot;))">
            <text:p/>
          </table:table-cell>
          <table:table-cell table:formula="of:=IF([.AT120]=&quot;x&quot;;&quot;x&quot;;IF([.AT120]=&quot;-&quot;;&quot;-&quot;;&quot;&quot;))">
            <text:p/>
          </table:table-cell>
          <table:table-cell table:formula="of:=IF([.AU120]=&quot;x&quot;;&quot;x&quot;;IF([.AU120]=&quot;-&quot;;&quot;-&quot;;&quot;&quot;))">
            <text:p/>
          </table:table-cell>
          <table:table-cell table:formula="of:=IF([.AV120]=&quot;x&quot;;&quot;x&quot;;IF([.AV120]=&quot;-&quot;;&quot;-&quot;;&quot;&quot;))">
            <text:p/>
          </table:table-cell>
          <table:table-cell table:formula="of:=IF([.AW120]=&quot;x&quot;;&quot;x&quot;;IF([.AW120]=&quot;-&quot;;&quot;-&quot;;&quot;&quot;))">
            <text:p/>
          </table:table-cell>
          <table:table-cell table:formula="of:=IF([.AX120]=&quot;x&quot;;&quot;x&quot;;IF([.AX120]=&quot;-&quot;;&quot;-&quot;;&quot;&quot;))">
            <text:p/>
          </table:table-cell>
          <table:table-cell table:formula="of:=IF([.AY120]=&quot;x&quot;;&quot;x&quot;;IF([.AY120]=&quot;-&quot;;&quot;-&quot;;&quot;&quot;))">
            <text:p/>
          </table:table-cell>
          <table:table-cell table:formula="of:=IF([.AZ120]=&quot;x&quot;;&quot;x&quot;;IF([.AZ120]=&quot;-&quot;;&quot;-&quot;;&quot;&quot;))">
            <text:p/>
          </table:table-cell>
          <table:table-cell table:formula="of:=IF([.BA120]=&quot;x&quot;;&quot;x&quot;;IF([.BA120]=&quot;-&quot;;&quot;-&quot;;&quot;&quot;))">
            <text:p/>
          </table:table-cell>
          <table:table-cell table:formula="of:=IF([.BB120]=&quot;x&quot;;&quot;x&quot;;IF([.BB120]=&quot;-&quot;;&quot;-&quot;;&quot;&quot;))" office:value-type="string" office:string-value="x" calcext:value-type="string">
            <text:p>x</text:p>
          </table:table-cell>
          <table:table-cell table:formula="of:=IF([.BC120]=&quot;x&quot;;&quot;x&quot;;IF([.BC120]=&quot;-&quot;;&quot;-&quot;;&quot;&quot;))">
            <text:p/>
          </table:table-cell>
          <table:table-cell table:formula="of:=IF([.BD120]=&quot;x&quot;;&quot;x&quot;;IF([.BD120]=&quot;-&quot;;&quot;-&quot;;&quot;&quot;))">
            <text:p/>
          </table:table-cell>
          <table:table-cell table:formula="of:=IF([.BE120]=&quot;x&quot;;&quot;x&quot;;IF([.BE120]=&quot;-&quot;;&quot;-&quot;;&quot;&quot;))">
            <text:p/>
          </table:table-cell>
          <table:table-cell table:formula="of:=IF([.BF120]=&quot;x&quot;;&quot;x&quot;;IF([.BF120]=&quot;-&quot;;&quot;-&quot;;&quot;&quot;))">
            <text:p/>
          </table:table-cell>
          <table:table-cell table:formula="of:=IF([.BG120]=&quot;x&quot;;&quot;x&quot;;IF([.BG120]=&quot;-&quot;;&quot;-&quot;;&quot;&quot;))">
            <text:p/>
          </table:table-cell>
          <table:table-cell table:formula="of:=IF([.BH120]=&quot;x&quot;;&quot;x&quot;;IF([.BH120]=&quot;-&quot;;&quot;-&quot;;&quot;&quot;))">
            <text:p/>
          </table:table-cell>
          <table:table-cell table:formula="of:=IF([.BI120]=&quot;x&quot;;&quot;x&quot;;IF([.BI120]=&quot;-&quot;;&quot;-&quot;;&quot;&quot;))">
            <text:p/>
          </table:table-cell>
          <table:table-cell table:formula="of:=IF([.BJ120]=&quot;x&quot;;&quot;x&quot;;IF([.BJ120]=&quot;-&quot;;&quot;-&quot;;&quot;&quot;))">
            <text:p/>
          </table:table-cell>
          <table:table-cell table:formula="of:=IF([.BK120]=&quot;x&quot;;&quot;x&quot;;IF([.BK120]=&quot;-&quot;;&quot;-&quot;;&quot;&quot;))">
            <text:p/>
          </table:table-cell>
          <table:table-cell table:formula="of:=IF([.BL120]=&quot;x&quot;;&quot;x&quot;;IF([.BL120]=&quot;-&quot;;&quot;-&quot;;&quot;&quot;))">
            <text:p/>
          </table:table-cell>
          <table:table-cell table:formula="of:=IF([.BM120]=&quot;x&quot;;&quot;x&quot;;IF([.BM120]=&quot;-&quot;;&quot;-&quot;;&quot;&quot;))">
            <text:p/>
          </table:table-cell>
          <table:table-cell table:formula="of:=IF([.BN120]=&quot;x&quot;;&quot;x&quot;;IF([.BN120]=&quot;-&quot;;&quot;-&quot;;&quot;&quot;))">
            <text:p/>
          </table:table-cell>
          <table:table-cell table:formula="of:=IF([.BO120]=&quot;x&quot;;&quot;x&quot;;IF([.BO120]=&quot;-&quot;;&quot;-&quot;;&quot;&quot;))">
            <text:p/>
          </table:table-cell>
          <table:table-cell table:formula="of:=IF([.BP120]=&quot;x&quot;;&quot;x&quot;;IF([.BP120]=&quot;-&quot;;&quot;-&quot;;&quot;&quot;))">
            <text:p/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0" calcext:value-type="float">
            <text:p>120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IO 4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21]=&quot;x&quot;;&quot;x&quot;;IF([.AS121]=&quot;-&quot;;&quot;-&quot;;&quot;&quot;))">
            <text:p/>
          </table:table-cell>
          <table:table-cell table:formula="of:=IF([.AT121]=&quot;x&quot;;&quot;x&quot;;IF([.AT121]=&quot;-&quot;;&quot;-&quot;;&quot;&quot;))">
            <text:p/>
          </table:table-cell>
          <table:table-cell table:formula="of:=IF([.AU121]=&quot;x&quot;;&quot;x&quot;;IF([.AU121]=&quot;-&quot;;&quot;-&quot;;&quot;&quot;))">
            <text:p/>
          </table:table-cell>
          <table:table-cell table:formula="of:=IF([.AV121]=&quot;x&quot;;&quot;x&quot;;IF([.AV121]=&quot;-&quot;;&quot;-&quot;;&quot;&quot;))">
            <text:p/>
          </table:table-cell>
          <table:table-cell table:formula="of:=IF([.AW121]=&quot;x&quot;;&quot;x&quot;;IF([.AW121]=&quot;-&quot;;&quot;-&quot;;&quot;&quot;))">
            <text:p/>
          </table:table-cell>
          <table:table-cell table:formula="of:=IF([.AX121]=&quot;x&quot;;&quot;x&quot;;IF([.AX121]=&quot;-&quot;;&quot;-&quot;;&quot;&quot;))">
            <text:p/>
          </table:table-cell>
          <table:table-cell table:formula="of:=IF([.AY121]=&quot;x&quot;;&quot;x&quot;;IF([.AY121]=&quot;-&quot;;&quot;-&quot;;&quot;&quot;))">
            <text:p/>
          </table:table-cell>
          <table:table-cell table:formula="of:=IF([.AZ121]=&quot;x&quot;;&quot;x&quot;;IF([.AZ121]=&quot;-&quot;;&quot;-&quot;;&quot;&quot;))">
            <text:p/>
          </table:table-cell>
          <table:table-cell table:formula="of:=IF([.BA121]=&quot;x&quot;;&quot;x&quot;;IF([.BA121]=&quot;-&quot;;&quot;-&quot;;&quot;&quot;))">
            <text:p/>
          </table:table-cell>
          <table:table-cell table:formula="of:=IF([.BB121]=&quot;x&quot;;&quot;x&quot;;IF([.BB121]=&quot;-&quot;;&quot;-&quot;;&quot;&quot;))" office:value-type="string" office:string-value="x" calcext:value-type="string">
            <text:p>x</text:p>
          </table:table-cell>
          <table:table-cell table:formula="of:=IF([.BC121]=&quot;x&quot;;&quot;x&quot;;IF([.BC121]=&quot;-&quot;;&quot;-&quot;;&quot;&quot;))">
            <text:p/>
          </table:table-cell>
          <table:table-cell table:formula="of:=IF([.BD121]=&quot;x&quot;;&quot;x&quot;;IF([.BD121]=&quot;-&quot;;&quot;-&quot;;&quot;&quot;))">
            <text:p/>
          </table:table-cell>
          <table:table-cell table:formula="of:=IF([.BE121]=&quot;x&quot;;&quot;x&quot;;IF([.BE121]=&quot;-&quot;;&quot;-&quot;;&quot;&quot;))">
            <text:p/>
          </table:table-cell>
          <table:table-cell table:formula="of:=IF([.BF121]=&quot;x&quot;;&quot;x&quot;;IF([.BF121]=&quot;-&quot;;&quot;-&quot;;&quot;&quot;))">
            <text:p/>
          </table:table-cell>
          <table:table-cell table:formula="of:=IF([.BG121]=&quot;x&quot;;&quot;x&quot;;IF([.BG121]=&quot;-&quot;;&quot;-&quot;;&quot;&quot;))">
            <text:p/>
          </table:table-cell>
          <table:table-cell table:formula="of:=IF([.BH121]=&quot;x&quot;;&quot;x&quot;;IF([.BH121]=&quot;-&quot;;&quot;-&quot;;&quot;&quot;))">
            <text:p/>
          </table:table-cell>
          <table:table-cell table:formula="of:=IF([.BI121]=&quot;x&quot;;&quot;x&quot;;IF([.BI121]=&quot;-&quot;;&quot;-&quot;;&quot;&quot;))">
            <text:p/>
          </table:table-cell>
          <table:table-cell table:formula="of:=IF([.BJ121]=&quot;x&quot;;&quot;x&quot;;IF([.BJ121]=&quot;-&quot;;&quot;-&quot;;&quot;&quot;))">
            <text:p/>
          </table:table-cell>
          <table:table-cell table:formula="of:=IF([.BK121]=&quot;x&quot;;&quot;x&quot;;IF([.BK121]=&quot;-&quot;;&quot;-&quot;;&quot;&quot;))">
            <text:p/>
          </table:table-cell>
          <table:table-cell table:formula="of:=IF([.BL121]=&quot;x&quot;;&quot;x&quot;;IF([.BL121]=&quot;-&quot;;&quot;-&quot;;&quot;&quot;))">
            <text:p/>
          </table:table-cell>
          <table:table-cell table:formula="of:=IF([.BM121]=&quot;x&quot;;&quot;x&quot;;IF([.BM121]=&quot;-&quot;;&quot;-&quot;;&quot;&quot;))">
            <text:p/>
          </table:table-cell>
          <table:table-cell table:formula="of:=IF([.BN121]=&quot;x&quot;;&quot;x&quot;;IF([.BN121]=&quot;-&quot;;&quot;-&quot;;&quot;&quot;))">
            <text:p/>
          </table:table-cell>
          <table:table-cell table:formula="of:=IF([.BO121]=&quot;x&quot;;&quot;x&quot;;IF([.BO121]=&quot;-&quot;;&quot;-&quot;;&quot;&quot;))">
            <text:p/>
          </table:table-cell>
          <table:table-cell table:formula="of:=IF([.BP121]=&quot;x&quot;;&quot;x&quot;;IF([.BP121]=&quot;-&quot;;&quot;-&quot;;&quot;&quot;))">
            <text:p/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1" calcext:value-type="float">
            <text:p>121</text:p>
          </table:table-cell>
          <table:table-cell table:style-name="ce7" office:value-type="string" calcext:value-type="string">
            <text:p>TST12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IO 5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2]=&quot;x&quot;;&quot;x&quot;;IF([.AS122]=&quot;-&quot;;&quot;-&quot;;&quot;&quot;))">
            <text:p/>
          </table:table-cell>
          <table:table-cell table:formula="of:=IF([.AT122]=&quot;x&quot;;&quot;x&quot;;IF([.AT122]=&quot;-&quot;;&quot;-&quot;;&quot;&quot;))">
            <text:p/>
          </table:table-cell>
          <table:table-cell table:formula="of:=IF([.AU122]=&quot;x&quot;;&quot;x&quot;;IF([.AU122]=&quot;-&quot;;&quot;-&quot;;&quot;&quot;))">
            <text:p/>
          </table:table-cell>
          <table:table-cell table:formula="of:=IF([.AV122]=&quot;x&quot;;&quot;x&quot;;IF([.AV122]=&quot;-&quot;;&quot;-&quot;;&quot;&quot;))">
            <text:p/>
          </table:table-cell>
          <table:table-cell table:formula="of:=IF([.AW122]=&quot;x&quot;;&quot;x&quot;;IF([.AW122]=&quot;-&quot;;&quot;-&quot;;&quot;&quot;))">
            <text:p/>
          </table:table-cell>
          <table:table-cell table:formula="of:=IF([.AX122]=&quot;x&quot;;&quot;x&quot;;IF([.AX122]=&quot;-&quot;;&quot;-&quot;;&quot;&quot;))">
            <text:p/>
          </table:table-cell>
          <table:table-cell table:formula="of:=IF([.AY122]=&quot;x&quot;;&quot;x&quot;;IF([.AY122]=&quot;-&quot;;&quot;-&quot;;&quot;&quot;))">
            <text:p/>
          </table:table-cell>
          <table:table-cell table:formula="of:=IF([.AZ122]=&quot;x&quot;;&quot;x&quot;;IF([.AZ122]=&quot;-&quot;;&quot;-&quot;;&quot;&quot;))">
            <text:p/>
          </table:table-cell>
          <table:table-cell table:formula="of:=IF([.BA122]=&quot;x&quot;;&quot;x&quot;;IF([.BA122]=&quot;-&quot;;&quot;-&quot;;&quot;&quot;))">
            <text:p/>
          </table:table-cell>
          <table:table-cell table:formula="of:=IF([.BB122]=&quot;x&quot;;&quot;x&quot;;IF([.BB122]=&quot;-&quot;;&quot;-&quot;;&quot;&quot;))">
            <text:p/>
          </table:table-cell>
          <table:table-cell table:formula="of:=IF([.BC122]=&quot;x&quot;;&quot;x&quot;;IF([.BC122]=&quot;-&quot;;&quot;-&quot;;&quot;&quot;))" office:value-type="string" office:string-value="x" calcext:value-type="string">
            <text:p>x</text:p>
          </table:table-cell>
          <table:table-cell table:formula="of:=IF([.BD122]=&quot;x&quot;;&quot;x&quot;;IF([.BD122]=&quot;-&quot;;&quot;-&quot;;&quot;&quot;))">
            <text:p/>
          </table:table-cell>
          <table:table-cell table:formula="of:=IF([.BE122]=&quot;x&quot;;&quot;x&quot;;IF([.BE122]=&quot;-&quot;;&quot;-&quot;;&quot;&quot;))">
            <text:p/>
          </table:table-cell>
          <table:table-cell table:formula="of:=IF([.BF122]=&quot;x&quot;;&quot;x&quot;;IF([.BF122]=&quot;-&quot;;&quot;-&quot;;&quot;&quot;))">
            <text:p/>
          </table:table-cell>
          <table:table-cell table:formula="of:=IF([.BG122]=&quot;x&quot;;&quot;x&quot;;IF([.BG122]=&quot;-&quot;;&quot;-&quot;;&quot;&quot;))">
            <text:p/>
          </table:table-cell>
          <table:table-cell table:formula="of:=IF([.BH122]=&quot;x&quot;;&quot;x&quot;;IF([.BH122]=&quot;-&quot;;&quot;-&quot;;&quot;&quot;))">
            <text:p/>
          </table:table-cell>
          <table:table-cell table:formula="of:=IF([.BI122]=&quot;x&quot;;&quot;x&quot;;IF([.BI122]=&quot;-&quot;;&quot;-&quot;;&quot;&quot;))">
            <text:p/>
          </table:table-cell>
          <table:table-cell table:formula="of:=IF([.BJ122]=&quot;x&quot;;&quot;x&quot;;IF([.BJ122]=&quot;-&quot;;&quot;-&quot;;&quot;&quot;))">
            <text:p/>
          </table:table-cell>
          <table:table-cell table:formula="of:=IF([.BK122]=&quot;x&quot;;&quot;x&quot;;IF([.BK122]=&quot;-&quot;;&quot;-&quot;;&quot;&quot;))">
            <text:p/>
          </table:table-cell>
          <table:table-cell table:formula="of:=IF([.BL122]=&quot;x&quot;;&quot;x&quot;;IF([.BL122]=&quot;-&quot;;&quot;-&quot;;&quot;&quot;))">
            <text:p/>
          </table:table-cell>
          <table:table-cell table:formula="of:=IF([.BM122]=&quot;x&quot;;&quot;x&quot;;IF([.BM122]=&quot;-&quot;;&quot;-&quot;;&quot;&quot;))">
            <text:p/>
          </table:table-cell>
          <table:table-cell table:formula="of:=IF([.BN122]=&quot;x&quot;;&quot;x&quot;;IF([.BN122]=&quot;-&quot;;&quot;-&quot;;&quot;&quot;))">
            <text:p/>
          </table:table-cell>
          <table:table-cell table:formula="of:=IF([.BO122]=&quot;x&quot;;&quot;x&quot;;IF([.BO122]=&quot;-&quot;;&quot;-&quot;;&quot;&quot;))">
            <text:p/>
          </table:table-cell>
          <table:table-cell table:formula="of:=IF([.BP122]=&quot;x&quot;;&quot;x&quot;;IF([.BP122]=&quot;-&quot;;&quot;-&quot;;&quot;&quot;))">
            <text:p/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2" calcext:value-type="float">
            <text:p>122</text:p>
          </table:table-cell>
          <table:table-cell table:style-name="ce7" office:value-type="string" calcext:value-type="string">
            <text:p>TST1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USB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3]=&quot;x&quot;;&quot;x&quot;;IF([.AS123]=&quot;-&quot;;&quot;-&quot;;&quot;&quot;))">
            <text:p/>
          </table:table-cell>
          <table:table-cell table:formula="of:=IF([.AT123]=&quot;x&quot;;&quot;x&quot;;IF([.AT123]=&quot;-&quot;;&quot;-&quot;;&quot;&quot;))">
            <text:p/>
          </table:table-cell>
          <table:table-cell table:formula="of:=IF([.AU123]=&quot;x&quot;;&quot;x&quot;;IF([.AU123]=&quot;-&quot;;&quot;-&quot;;&quot;&quot;))">
            <text:p/>
          </table:table-cell>
          <table:table-cell table:formula="of:=IF([.AV123]=&quot;x&quot;;&quot;x&quot;;IF([.AV123]=&quot;-&quot;;&quot;-&quot;;&quot;&quot;))">
            <text:p/>
          </table:table-cell>
          <table:table-cell table:formula="of:=IF([.AW123]=&quot;x&quot;;&quot;x&quot;;IF([.AW123]=&quot;-&quot;;&quot;-&quot;;&quot;&quot;))">
            <text:p/>
          </table:table-cell>
          <table:table-cell table:formula="of:=IF([.AX123]=&quot;x&quot;;&quot;x&quot;;IF([.AX123]=&quot;-&quot;;&quot;-&quot;;&quot;&quot;))">
            <text:p/>
          </table:table-cell>
          <table:table-cell table:formula="of:=IF([.AY123]=&quot;x&quot;;&quot;x&quot;;IF([.AY123]=&quot;-&quot;;&quot;-&quot;;&quot;&quot;))">
            <text:p/>
          </table:table-cell>
          <table:table-cell table:formula="of:=IF([.AZ123]=&quot;x&quot;;&quot;x&quot;;IF([.AZ123]=&quot;-&quot;;&quot;-&quot;;&quot;&quot;))">
            <text:p/>
          </table:table-cell>
          <table:table-cell table:formula="of:=IF([.BA123]=&quot;x&quot;;&quot;x&quot;;IF([.BA123]=&quot;-&quot;;&quot;-&quot;;&quot;&quot;))">
            <text:p/>
          </table:table-cell>
          <table:table-cell table:formula="of:=IF([.BB123]=&quot;x&quot;;&quot;x&quot;;IF([.BB123]=&quot;-&quot;;&quot;-&quot;;&quot;&quot;))">
            <text:p/>
          </table:table-cell>
          <table:table-cell table:formula="of:=IF([.BC123]=&quot;x&quot;;&quot;x&quot;;IF([.BC123]=&quot;-&quot;;&quot;-&quot;;&quot;&quot;))" office:value-type="string" office:string-value="x" calcext:value-type="string">
            <text:p>x</text:p>
          </table:table-cell>
          <table:table-cell table:formula="of:=IF([.BD123]=&quot;x&quot;;&quot;x&quot;;IF([.BD123]=&quot;-&quot;;&quot;-&quot;;&quot;&quot;))">
            <text:p/>
          </table:table-cell>
          <table:table-cell table:formula="of:=IF([.BE123]=&quot;x&quot;;&quot;x&quot;;IF([.BE123]=&quot;-&quot;;&quot;-&quot;;&quot;&quot;))">
            <text:p/>
          </table:table-cell>
          <table:table-cell table:formula="of:=IF([.BF123]=&quot;x&quot;;&quot;x&quot;;IF([.BF123]=&quot;-&quot;;&quot;-&quot;;&quot;&quot;))">
            <text:p/>
          </table:table-cell>
          <table:table-cell table:formula="of:=IF([.BG123]=&quot;x&quot;;&quot;x&quot;;IF([.BG123]=&quot;-&quot;;&quot;-&quot;;&quot;&quot;))">
            <text:p/>
          </table:table-cell>
          <table:table-cell table:formula="of:=IF([.BH123]=&quot;x&quot;;&quot;x&quot;;IF([.BH123]=&quot;-&quot;;&quot;-&quot;;&quot;&quot;))">
            <text:p/>
          </table:table-cell>
          <table:table-cell table:formula="of:=IF([.BI123]=&quot;x&quot;;&quot;x&quot;;IF([.BI123]=&quot;-&quot;;&quot;-&quot;;&quot;&quot;))">
            <text:p/>
          </table:table-cell>
          <table:table-cell table:formula="of:=IF([.BJ123]=&quot;x&quot;;&quot;x&quot;;IF([.BJ123]=&quot;-&quot;;&quot;-&quot;;&quot;&quot;))">
            <text:p/>
          </table:table-cell>
          <table:table-cell table:formula="of:=IF([.BK123]=&quot;x&quot;;&quot;x&quot;;IF([.BK123]=&quot;-&quot;;&quot;-&quot;;&quot;&quot;))">
            <text:p/>
          </table:table-cell>
          <table:table-cell table:formula="of:=IF([.BL123]=&quot;x&quot;;&quot;x&quot;;IF([.BL123]=&quot;-&quot;;&quot;-&quot;;&quot;&quot;))">
            <text:p/>
          </table:table-cell>
          <table:table-cell table:formula="of:=IF([.BM123]=&quot;x&quot;;&quot;x&quot;;IF([.BM123]=&quot;-&quot;;&quot;-&quot;;&quot;&quot;))">
            <text:p/>
          </table:table-cell>
          <table:table-cell table:formula="of:=IF([.BN123]=&quot;x&quot;;&quot;x&quot;;IF([.BN123]=&quot;-&quot;;&quot;-&quot;;&quot;&quot;))">
            <text:p/>
          </table:table-cell>
          <table:table-cell table:formula="of:=IF([.BO123]=&quot;x&quot;;&quot;x&quot;;IF([.BO123]=&quot;-&quot;;&quot;-&quot;;&quot;&quot;))">
            <text:p/>
          </table:table-cell>
          <table:table-cell table:formula="of:=IF([.BP123]=&quot;x&quot;;&quot;x&quot;;IF([.BP123]=&quot;-&quot;;&quot;-&quot;;&quot;&quot;))">
            <text:p/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3" calcext:value-type="float">
            <text:p>123</text:p>
          </table:table-cell>
          <table:table-cell table:style-name="ce7" office:value-type="string" calcext:value-type="string">
            <text:p>TST12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4]=&quot;x&quot;;&quot;x&quot;;IF([.AS124]=&quot;-&quot;;&quot;-&quot;;&quot;&quot;))">
            <text:p/>
          </table:table-cell>
          <table:table-cell table:formula="of:=IF([.AT124]=&quot;x&quot;;&quot;x&quot;;IF([.AT124]=&quot;-&quot;;&quot;-&quot;;&quot;&quot;))">
            <text:p/>
          </table:table-cell>
          <table:table-cell table:formula="of:=IF([.AU124]=&quot;x&quot;;&quot;x&quot;;IF([.AU124]=&quot;-&quot;;&quot;-&quot;;&quot;&quot;))">
            <text:p/>
          </table:table-cell>
          <table:table-cell table:formula="of:=IF([.AV124]=&quot;x&quot;;&quot;x&quot;;IF([.AV124]=&quot;-&quot;;&quot;-&quot;;&quot;&quot;))">
            <text:p/>
          </table:table-cell>
          <table:table-cell table:formula="of:=IF([.AW124]=&quot;x&quot;;&quot;x&quot;;IF([.AW124]=&quot;-&quot;;&quot;-&quot;;&quot;&quot;))">
            <text:p/>
          </table:table-cell>
          <table:table-cell table:formula="of:=IF([.AX124]=&quot;x&quot;;&quot;x&quot;;IF([.AX124]=&quot;-&quot;;&quot;-&quot;;&quot;&quot;))">
            <text:p/>
          </table:table-cell>
          <table:table-cell table:formula="of:=IF([.AY124]=&quot;x&quot;;&quot;x&quot;;IF([.AY124]=&quot;-&quot;;&quot;-&quot;;&quot;&quot;))">
            <text:p/>
          </table:table-cell>
          <table:table-cell table:formula="of:=IF([.AZ124]=&quot;x&quot;;&quot;x&quot;;IF([.AZ124]=&quot;-&quot;;&quot;-&quot;;&quot;&quot;))">
            <text:p/>
          </table:table-cell>
          <table:table-cell table:formula="of:=IF([.BA124]=&quot;x&quot;;&quot;x&quot;;IF([.BA124]=&quot;-&quot;;&quot;-&quot;;&quot;&quot;))">
            <text:p/>
          </table:table-cell>
          <table:table-cell table:formula="of:=IF([.BB124]=&quot;x&quot;;&quot;x&quot;;IF([.BB124]=&quot;-&quot;;&quot;-&quot;;&quot;&quot;))">
            <text:p/>
          </table:table-cell>
          <table:table-cell table:formula="of:=IF([.BC124]=&quot;x&quot;;&quot;x&quot;;IF([.BC124]=&quot;-&quot;;&quot;-&quot;;&quot;&quot;))" office:value-type="string" office:string-value="x" calcext:value-type="string">
            <text:p>x</text:p>
          </table:table-cell>
          <table:table-cell table:formula="of:=IF([.BD124]=&quot;x&quot;;&quot;x&quot;;IF([.BD124]=&quot;-&quot;;&quot;-&quot;;&quot;&quot;))">
            <text:p/>
          </table:table-cell>
          <table:table-cell table:formula="of:=IF([.BE124]=&quot;x&quot;;&quot;x&quot;;IF([.BE124]=&quot;-&quot;;&quot;-&quot;;&quot;&quot;))">
            <text:p/>
          </table:table-cell>
          <table:table-cell table:formula="of:=IF([.BF124]=&quot;x&quot;;&quot;x&quot;;IF([.BF124]=&quot;-&quot;;&quot;-&quot;;&quot;&quot;))">
            <text:p/>
          </table:table-cell>
          <table:table-cell table:formula="of:=IF([.BG124]=&quot;x&quot;;&quot;x&quot;;IF([.BG124]=&quot;-&quot;;&quot;-&quot;;&quot;&quot;))">
            <text:p/>
          </table:table-cell>
          <table:table-cell table:formula="of:=IF([.BH124]=&quot;x&quot;;&quot;x&quot;;IF([.BH124]=&quot;-&quot;;&quot;-&quot;;&quot;&quot;))">
            <text:p/>
          </table:table-cell>
          <table:table-cell table:formula="of:=IF([.BI124]=&quot;x&quot;;&quot;x&quot;;IF([.BI124]=&quot;-&quot;;&quot;-&quot;;&quot;&quot;))">
            <text:p/>
          </table:table-cell>
          <table:table-cell table:formula="of:=IF([.BJ124]=&quot;x&quot;;&quot;x&quot;;IF([.BJ124]=&quot;-&quot;;&quot;-&quot;;&quot;&quot;))">
            <text:p/>
          </table:table-cell>
          <table:table-cell table:formula="of:=IF([.BK124]=&quot;x&quot;;&quot;x&quot;;IF([.BK124]=&quot;-&quot;;&quot;-&quot;;&quot;&quot;))">
            <text:p/>
          </table:table-cell>
          <table:table-cell table:formula="of:=IF([.BL124]=&quot;x&quot;;&quot;x&quot;;IF([.BL124]=&quot;-&quot;;&quot;-&quot;;&quot;&quot;))">
            <text:p/>
          </table:table-cell>
          <table:table-cell table:formula="of:=IF([.BM124]=&quot;x&quot;;&quot;x&quot;;IF([.BM124]=&quot;-&quot;;&quot;-&quot;;&quot;&quot;))">
            <text:p/>
          </table:table-cell>
          <table:table-cell table:formula="of:=IF([.BN124]=&quot;x&quot;;&quot;x&quot;;IF([.BN124]=&quot;-&quot;;&quot;-&quot;;&quot;&quot;))">
            <text:p/>
          </table:table-cell>
          <table:table-cell table:formula="of:=IF([.BO124]=&quot;x&quot;;&quot;x&quot;;IF([.BO124]=&quot;-&quot;;&quot;-&quot;;&quot;&quot;))">
            <text:p/>
          </table:table-cell>
          <table:table-cell table:formula="of:=IF([.BP124]=&quot;x&quot;;&quot;x&quot;;IF([.BP124]=&quot;-&quot;;&quot;-&quot;;&quot;&quot;))">
            <text:p/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4" calcext:value-type="float">
            <text:p>124</text:p>
          </table:table-cell>
          <table:table-cell table:style-name="ce7" office:value-type="string" calcext:value-type="string">
            <text:p>TST12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5]=&quot;x&quot;;&quot;x&quot;;IF([.AS125]=&quot;-&quot;;&quot;-&quot;;&quot;&quot;))">
            <text:p/>
          </table:table-cell>
          <table:table-cell table:formula="of:=IF([.AT125]=&quot;x&quot;;&quot;x&quot;;IF([.AT125]=&quot;-&quot;;&quot;-&quot;;&quot;&quot;))">
            <text:p/>
          </table:table-cell>
          <table:table-cell table:formula="of:=IF([.AU125]=&quot;x&quot;;&quot;x&quot;;IF([.AU125]=&quot;-&quot;;&quot;-&quot;;&quot;&quot;))">
            <text:p/>
          </table:table-cell>
          <table:table-cell table:formula="of:=IF([.AV125]=&quot;x&quot;;&quot;x&quot;;IF([.AV125]=&quot;-&quot;;&quot;-&quot;;&quot;&quot;))">
            <text:p/>
          </table:table-cell>
          <table:table-cell table:formula="of:=IF([.AW125]=&quot;x&quot;;&quot;x&quot;;IF([.AW125]=&quot;-&quot;;&quot;-&quot;;&quot;&quot;))">
            <text:p/>
          </table:table-cell>
          <table:table-cell table:formula="of:=IF([.AX125]=&quot;x&quot;;&quot;x&quot;;IF([.AX125]=&quot;-&quot;;&quot;-&quot;;&quot;&quot;))">
            <text:p/>
          </table:table-cell>
          <table:table-cell table:formula="of:=IF([.AY125]=&quot;x&quot;;&quot;x&quot;;IF([.AY125]=&quot;-&quot;;&quot;-&quot;;&quot;&quot;))">
            <text:p/>
          </table:table-cell>
          <table:table-cell table:formula="of:=IF([.AZ125]=&quot;x&quot;;&quot;x&quot;;IF([.AZ125]=&quot;-&quot;;&quot;-&quot;;&quot;&quot;))">
            <text:p/>
          </table:table-cell>
          <table:table-cell table:formula="of:=IF([.BA125]=&quot;x&quot;;&quot;x&quot;;IF([.BA125]=&quot;-&quot;;&quot;-&quot;;&quot;&quot;))">
            <text:p/>
          </table:table-cell>
          <table:table-cell table:formula="of:=IF([.BB125]=&quot;x&quot;;&quot;x&quot;;IF([.BB125]=&quot;-&quot;;&quot;-&quot;;&quot;&quot;))">
            <text:p/>
          </table:table-cell>
          <table:table-cell table:formula="of:=IF([.BC125]=&quot;x&quot;;&quot;x&quot;;IF([.BC125]=&quot;-&quot;;&quot;-&quot;;&quot;&quot;))" office:value-type="string" office:string-value="x" calcext:value-type="string">
            <text:p>x</text:p>
          </table:table-cell>
          <table:table-cell table:formula="of:=IF([.BD125]=&quot;x&quot;;&quot;x&quot;;IF([.BD125]=&quot;-&quot;;&quot;-&quot;;&quot;&quot;))">
            <text:p/>
          </table:table-cell>
          <table:table-cell table:formula="of:=IF([.BE125]=&quot;x&quot;;&quot;x&quot;;IF([.BE125]=&quot;-&quot;;&quot;-&quot;;&quot;&quot;))">
            <text:p/>
          </table:table-cell>
          <table:table-cell table:formula="of:=IF([.BF125]=&quot;x&quot;;&quot;x&quot;;IF([.BF125]=&quot;-&quot;;&quot;-&quot;;&quot;&quot;))">
            <text:p/>
          </table:table-cell>
          <table:table-cell table:formula="of:=IF([.BG125]=&quot;x&quot;;&quot;x&quot;;IF([.BG125]=&quot;-&quot;;&quot;-&quot;;&quot;&quot;))">
            <text:p/>
          </table:table-cell>
          <table:table-cell table:formula="of:=IF([.BH125]=&quot;x&quot;;&quot;x&quot;;IF([.BH125]=&quot;-&quot;;&quot;-&quot;;&quot;&quot;))">
            <text:p/>
          </table:table-cell>
          <table:table-cell table:formula="of:=IF([.BI125]=&quot;x&quot;;&quot;x&quot;;IF([.BI125]=&quot;-&quot;;&quot;-&quot;;&quot;&quot;))">
            <text:p/>
          </table:table-cell>
          <table:table-cell table:formula="of:=IF([.BJ125]=&quot;x&quot;;&quot;x&quot;;IF([.BJ125]=&quot;-&quot;;&quot;-&quot;;&quot;&quot;))">
            <text:p/>
          </table:table-cell>
          <table:table-cell table:formula="of:=IF([.BK125]=&quot;x&quot;;&quot;x&quot;;IF([.BK125]=&quot;-&quot;;&quot;-&quot;;&quot;&quot;))">
            <text:p/>
          </table:table-cell>
          <table:table-cell table:formula="of:=IF([.BL125]=&quot;x&quot;;&quot;x&quot;;IF([.BL125]=&quot;-&quot;;&quot;-&quot;;&quot;&quot;))">
            <text:p/>
          </table:table-cell>
          <table:table-cell table:formula="of:=IF([.BM125]=&quot;x&quot;;&quot;x&quot;;IF([.BM125]=&quot;-&quot;;&quot;-&quot;;&quot;&quot;))">
            <text:p/>
          </table:table-cell>
          <table:table-cell table:formula="of:=IF([.BN125]=&quot;x&quot;;&quot;x&quot;;IF([.BN125]=&quot;-&quot;;&quot;-&quot;;&quot;&quot;))">
            <text:p/>
          </table:table-cell>
          <table:table-cell table:formula="of:=IF([.BO125]=&quot;x&quot;;&quot;x&quot;;IF([.BO125]=&quot;-&quot;;&quot;-&quot;;&quot;&quot;))">
            <text:p/>
          </table:table-cell>
          <table:table-cell table:formula="of:=IF([.BP125]=&quot;x&quot;;&quot;x&quot;;IF([.BP125]=&quot;-&quot;;&quot;-&quot;;&quot;&quot;))">
            <text:p/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5" calcext:value-type="float">
            <text:p>125</text:p>
          </table:table-cell>
          <table:table-cell table:style-name="ce7" office:value-type="string" calcext:value-type="string">
            <text:p>TST12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IO 1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6]=&quot;x&quot;;&quot;x&quot;;IF([.AS126]=&quot;-&quot;;&quot;-&quot;;&quot;&quot;))">
            <text:p/>
          </table:table-cell>
          <table:table-cell table:formula="of:=IF([.AT126]=&quot;x&quot;;&quot;x&quot;;IF([.AT126]=&quot;-&quot;;&quot;-&quot;;&quot;&quot;))">
            <text:p/>
          </table:table-cell>
          <table:table-cell table:formula="of:=IF([.AU126]=&quot;x&quot;;&quot;x&quot;;IF([.AU126]=&quot;-&quot;;&quot;-&quot;;&quot;&quot;))">
            <text:p/>
          </table:table-cell>
          <table:table-cell table:formula="of:=IF([.AV126]=&quot;x&quot;;&quot;x&quot;;IF([.AV126]=&quot;-&quot;;&quot;-&quot;;&quot;&quot;))">
            <text:p/>
          </table:table-cell>
          <table:table-cell table:formula="of:=IF([.AW126]=&quot;x&quot;;&quot;x&quot;;IF([.AW126]=&quot;-&quot;;&quot;-&quot;;&quot;&quot;))">
            <text:p/>
          </table:table-cell>
          <table:table-cell table:formula="of:=IF([.AX126]=&quot;x&quot;;&quot;x&quot;;IF([.AX126]=&quot;-&quot;;&quot;-&quot;;&quot;&quot;))">
            <text:p/>
          </table:table-cell>
          <table:table-cell table:formula="of:=IF([.AY126]=&quot;x&quot;;&quot;x&quot;;IF([.AY126]=&quot;-&quot;;&quot;-&quot;;&quot;&quot;))">
            <text:p/>
          </table:table-cell>
          <table:table-cell table:formula="of:=IF([.AZ126]=&quot;x&quot;;&quot;x&quot;;IF([.AZ126]=&quot;-&quot;;&quot;-&quot;;&quot;&quot;))">
            <text:p/>
          </table:table-cell>
          <table:table-cell table:formula="of:=IF([.BA126]=&quot;x&quot;;&quot;x&quot;;IF([.BA126]=&quot;-&quot;;&quot;-&quot;;&quot;&quot;))">
            <text:p/>
          </table:table-cell>
          <table:table-cell table:formula="of:=IF([.BB126]=&quot;x&quot;;&quot;x&quot;;IF([.BB126]=&quot;-&quot;;&quot;-&quot;;&quot;&quot;))">
            <text:p/>
          </table:table-cell>
          <table:table-cell table:formula="of:=IF([.BC126]=&quot;x&quot;;&quot;x&quot;;IF([.BC126]=&quot;-&quot;;&quot;-&quot;;&quot;&quot;))" office:value-type="string" office:string-value="x" calcext:value-type="string">
            <text:p>x</text:p>
          </table:table-cell>
          <table:table-cell table:formula="of:=IF([.BD126]=&quot;x&quot;;&quot;x&quot;;IF([.BD126]=&quot;-&quot;;&quot;-&quot;;&quot;&quot;))">
            <text:p/>
          </table:table-cell>
          <table:table-cell table:formula="of:=IF([.BE126]=&quot;x&quot;;&quot;x&quot;;IF([.BE126]=&quot;-&quot;;&quot;-&quot;;&quot;&quot;))">
            <text:p/>
          </table:table-cell>
          <table:table-cell table:formula="of:=IF([.BF126]=&quot;x&quot;;&quot;x&quot;;IF([.BF126]=&quot;-&quot;;&quot;-&quot;;&quot;&quot;))">
            <text:p/>
          </table:table-cell>
          <table:table-cell table:formula="of:=IF([.BG126]=&quot;x&quot;;&quot;x&quot;;IF([.BG126]=&quot;-&quot;;&quot;-&quot;;&quot;&quot;))">
            <text:p/>
          </table:table-cell>
          <table:table-cell table:formula="of:=IF([.BH126]=&quot;x&quot;;&quot;x&quot;;IF([.BH126]=&quot;-&quot;;&quot;-&quot;;&quot;&quot;))">
            <text:p/>
          </table:table-cell>
          <table:table-cell table:formula="of:=IF([.BI126]=&quot;x&quot;;&quot;x&quot;;IF([.BI126]=&quot;-&quot;;&quot;-&quot;;&quot;&quot;))">
            <text:p/>
          </table:table-cell>
          <table:table-cell table:formula="of:=IF([.BJ126]=&quot;x&quot;;&quot;x&quot;;IF([.BJ126]=&quot;-&quot;;&quot;-&quot;;&quot;&quot;))">
            <text:p/>
          </table:table-cell>
          <table:table-cell table:formula="of:=IF([.BK126]=&quot;x&quot;;&quot;x&quot;;IF([.BK126]=&quot;-&quot;;&quot;-&quot;;&quot;&quot;))">
            <text:p/>
          </table:table-cell>
          <table:table-cell table:formula="of:=IF([.BL126]=&quot;x&quot;;&quot;x&quot;;IF([.BL126]=&quot;-&quot;;&quot;-&quot;;&quot;&quot;))">
            <text:p/>
          </table:table-cell>
          <table:table-cell table:formula="of:=IF([.BM126]=&quot;x&quot;;&quot;x&quot;;IF([.BM126]=&quot;-&quot;;&quot;-&quot;;&quot;&quot;))">
            <text:p/>
          </table:table-cell>
          <table:table-cell table:formula="of:=IF([.BN126]=&quot;x&quot;;&quot;x&quot;;IF([.BN126]=&quot;-&quot;;&quot;-&quot;;&quot;&quot;))">
            <text:p/>
          </table:table-cell>
          <table:table-cell table:formula="of:=IF([.BO126]=&quot;x&quot;;&quot;x&quot;;IF([.BO126]=&quot;-&quot;;&quot;-&quot;;&quot;&quot;))">
            <text:p/>
          </table:table-cell>
          <table:table-cell table:formula="of:=IF([.BP126]=&quot;x&quot;;&quot;x&quot;;IF([.BP126]=&quot;-&quot;;&quot;-&quot;;&quot;&quot;))">
            <text:p/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6" calcext:value-type="float">
            <text:p>126</text:p>
          </table:table-cell>
          <table:table-cell table:style-name="ce7" office:value-type="string" calcext:value-type="string">
            <text:p>TST126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IO 2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7]=&quot;x&quot;;&quot;x&quot;;IF([.AS127]=&quot;-&quot;;&quot;-&quot;;&quot;&quot;))">
            <text:p/>
          </table:table-cell>
          <table:table-cell table:formula="of:=IF([.AT127]=&quot;x&quot;;&quot;x&quot;;IF([.AT127]=&quot;-&quot;;&quot;-&quot;;&quot;&quot;))">
            <text:p/>
          </table:table-cell>
          <table:table-cell table:formula="of:=IF([.AU127]=&quot;x&quot;;&quot;x&quot;;IF([.AU127]=&quot;-&quot;;&quot;-&quot;;&quot;&quot;))">
            <text:p/>
          </table:table-cell>
          <table:table-cell table:formula="of:=IF([.AV127]=&quot;x&quot;;&quot;x&quot;;IF([.AV127]=&quot;-&quot;;&quot;-&quot;;&quot;&quot;))">
            <text:p/>
          </table:table-cell>
          <table:table-cell table:formula="of:=IF([.AW127]=&quot;x&quot;;&quot;x&quot;;IF([.AW127]=&quot;-&quot;;&quot;-&quot;;&quot;&quot;))">
            <text:p/>
          </table:table-cell>
          <table:table-cell table:formula="of:=IF([.AX127]=&quot;x&quot;;&quot;x&quot;;IF([.AX127]=&quot;-&quot;;&quot;-&quot;;&quot;&quot;))">
            <text:p/>
          </table:table-cell>
          <table:table-cell table:formula="of:=IF([.AY127]=&quot;x&quot;;&quot;x&quot;;IF([.AY127]=&quot;-&quot;;&quot;-&quot;;&quot;&quot;))">
            <text:p/>
          </table:table-cell>
          <table:table-cell table:formula="of:=IF([.AZ127]=&quot;x&quot;;&quot;x&quot;;IF([.AZ127]=&quot;-&quot;;&quot;-&quot;;&quot;&quot;))">
            <text:p/>
          </table:table-cell>
          <table:table-cell table:formula="of:=IF([.BA127]=&quot;x&quot;;&quot;x&quot;;IF([.BA127]=&quot;-&quot;;&quot;-&quot;;&quot;&quot;))">
            <text:p/>
          </table:table-cell>
          <table:table-cell table:formula="of:=IF([.BB127]=&quot;x&quot;;&quot;x&quot;;IF([.BB127]=&quot;-&quot;;&quot;-&quot;;&quot;&quot;))">
            <text:p/>
          </table:table-cell>
          <table:table-cell table:formula="of:=IF([.BC127]=&quot;x&quot;;&quot;x&quot;;IF([.BC127]=&quot;-&quot;;&quot;-&quot;;&quot;&quot;))" office:value-type="string" office:string-value="x" calcext:value-type="string">
            <text:p>x</text:p>
          </table:table-cell>
          <table:table-cell table:formula="of:=IF([.BD127]=&quot;x&quot;;&quot;x&quot;;IF([.BD127]=&quot;-&quot;;&quot;-&quot;;&quot;&quot;))">
            <text:p/>
          </table:table-cell>
          <table:table-cell table:formula="of:=IF([.BE127]=&quot;x&quot;;&quot;x&quot;;IF([.BE127]=&quot;-&quot;;&quot;-&quot;;&quot;&quot;))">
            <text:p/>
          </table:table-cell>
          <table:table-cell table:formula="of:=IF([.BF127]=&quot;x&quot;;&quot;x&quot;;IF([.BF127]=&quot;-&quot;;&quot;-&quot;;&quot;&quot;))">
            <text:p/>
          </table:table-cell>
          <table:table-cell table:formula="of:=IF([.BG127]=&quot;x&quot;;&quot;x&quot;;IF([.BG127]=&quot;-&quot;;&quot;-&quot;;&quot;&quot;))">
            <text:p/>
          </table:table-cell>
          <table:table-cell table:formula="of:=IF([.BH127]=&quot;x&quot;;&quot;x&quot;;IF([.BH127]=&quot;-&quot;;&quot;-&quot;;&quot;&quot;))">
            <text:p/>
          </table:table-cell>
          <table:table-cell table:formula="of:=IF([.BI127]=&quot;x&quot;;&quot;x&quot;;IF([.BI127]=&quot;-&quot;;&quot;-&quot;;&quot;&quot;))">
            <text:p/>
          </table:table-cell>
          <table:table-cell table:formula="of:=IF([.BJ127]=&quot;x&quot;;&quot;x&quot;;IF([.BJ127]=&quot;-&quot;;&quot;-&quot;;&quot;&quot;))">
            <text:p/>
          </table:table-cell>
          <table:table-cell table:formula="of:=IF([.BK127]=&quot;x&quot;;&quot;x&quot;;IF([.BK127]=&quot;-&quot;;&quot;-&quot;;&quot;&quot;))">
            <text:p/>
          </table:table-cell>
          <table:table-cell table:formula="of:=IF([.BL127]=&quot;x&quot;;&quot;x&quot;;IF([.BL127]=&quot;-&quot;;&quot;-&quot;;&quot;&quot;))">
            <text:p/>
          </table:table-cell>
          <table:table-cell table:formula="of:=IF([.BM127]=&quot;x&quot;;&quot;x&quot;;IF([.BM127]=&quot;-&quot;;&quot;-&quot;;&quot;&quot;))">
            <text:p/>
          </table:table-cell>
          <table:table-cell table:formula="of:=IF([.BN127]=&quot;x&quot;;&quot;x&quot;;IF([.BN127]=&quot;-&quot;;&quot;-&quot;;&quot;&quot;))">
            <text:p/>
          </table:table-cell>
          <table:table-cell table:formula="of:=IF([.BO127]=&quot;x&quot;;&quot;x&quot;;IF([.BO127]=&quot;-&quot;;&quot;-&quot;;&quot;&quot;))">
            <text:p/>
          </table:table-cell>
          <table:table-cell table:formula="of:=IF([.BP127]=&quot;x&quot;;&quot;x&quot;;IF([.BP127]=&quot;-&quot;;&quot;-&quot;;&quot;&quot;))">
            <text:p/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7" calcext:value-type="float">
            <text:p>127</text:p>
          </table:table-cell>
          <table:table-cell table:style-name="ce7" office:value-type="string" calcext:value-type="string">
            <text:p>TST127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IO 3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8]=&quot;x&quot;;&quot;x&quot;;IF([.AS128]=&quot;-&quot;;&quot;-&quot;;&quot;&quot;))">
            <text:p/>
          </table:table-cell>
          <table:table-cell table:formula="of:=IF([.AT128]=&quot;x&quot;;&quot;x&quot;;IF([.AT128]=&quot;-&quot;;&quot;-&quot;;&quot;&quot;))">
            <text:p/>
          </table:table-cell>
          <table:table-cell table:formula="of:=IF([.AU128]=&quot;x&quot;;&quot;x&quot;;IF([.AU128]=&quot;-&quot;;&quot;-&quot;;&quot;&quot;))">
            <text:p/>
          </table:table-cell>
          <table:table-cell table:formula="of:=IF([.AV128]=&quot;x&quot;;&quot;x&quot;;IF([.AV128]=&quot;-&quot;;&quot;-&quot;;&quot;&quot;))">
            <text:p/>
          </table:table-cell>
          <table:table-cell table:formula="of:=IF([.AW128]=&quot;x&quot;;&quot;x&quot;;IF([.AW128]=&quot;-&quot;;&quot;-&quot;;&quot;&quot;))">
            <text:p/>
          </table:table-cell>
          <table:table-cell table:formula="of:=IF([.AX128]=&quot;x&quot;;&quot;x&quot;;IF([.AX128]=&quot;-&quot;;&quot;-&quot;;&quot;&quot;))">
            <text:p/>
          </table:table-cell>
          <table:table-cell table:formula="of:=IF([.AY128]=&quot;x&quot;;&quot;x&quot;;IF([.AY128]=&quot;-&quot;;&quot;-&quot;;&quot;&quot;))">
            <text:p/>
          </table:table-cell>
          <table:table-cell table:formula="of:=IF([.AZ128]=&quot;x&quot;;&quot;x&quot;;IF([.AZ128]=&quot;-&quot;;&quot;-&quot;;&quot;&quot;))">
            <text:p/>
          </table:table-cell>
          <table:table-cell table:formula="of:=IF([.BA128]=&quot;x&quot;;&quot;x&quot;;IF([.BA128]=&quot;-&quot;;&quot;-&quot;;&quot;&quot;))">
            <text:p/>
          </table:table-cell>
          <table:table-cell table:formula="of:=IF([.BB128]=&quot;x&quot;;&quot;x&quot;;IF([.BB128]=&quot;-&quot;;&quot;-&quot;;&quot;&quot;))">
            <text:p/>
          </table:table-cell>
          <table:table-cell table:formula="of:=IF([.BC128]=&quot;x&quot;;&quot;x&quot;;IF([.BC128]=&quot;-&quot;;&quot;-&quot;;&quot;&quot;))" office:value-type="string" office:string-value="x" calcext:value-type="string">
            <text:p>x</text:p>
          </table:table-cell>
          <table:table-cell table:formula="of:=IF([.BD128]=&quot;x&quot;;&quot;x&quot;;IF([.BD128]=&quot;-&quot;;&quot;-&quot;;&quot;&quot;))">
            <text:p/>
          </table:table-cell>
          <table:table-cell table:formula="of:=IF([.BE128]=&quot;x&quot;;&quot;x&quot;;IF([.BE128]=&quot;-&quot;;&quot;-&quot;;&quot;&quot;))">
            <text:p/>
          </table:table-cell>
          <table:table-cell table:formula="of:=IF([.BF128]=&quot;x&quot;;&quot;x&quot;;IF([.BF128]=&quot;-&quot;;&quot;-&quot;;&quot;&quot;))">
            <text:p/>
          </table:table-cell>
          <table:table-cell table:formula="of:=IF([.BG128]=&quot;x&quot;;&quot;x&quot;;IF([.BG128]=&quot;-&quot;;&quot;-&quot;;&quot;&quot;))">
            <text:p/>
          </table:table-cell>
          <table:table-cell table:formula="of:=IF([.BH128]=&quot;x&quot;;&quot;x&quot;;IF([.BH128]=&quot;-&quot;;&quot;-&quot;;&quot;&quot;))">
            <text:p/>
          </table:table-cell>
          <table:table-cell table:formula="of:=IF([.BI128]=&quot;x&quot;;&quot;x&quot;;IF([.BI128]=&quot;-&quot;;&quot;-&quot;;&quot;&quot;))">
            <text:p/>
          </table:table-cell>
          <table:table-cell table:formula="of:=IF([.BJ128]=&quot;x&quot;;&quot;x&quot;;IF([.BJ128]=&quot;-&quot;;&quot;-&quot;;&quot;&quot;))">
            <text:p/>
          </table:table-cell>
          <table:table-cell table:formula="of:=IF([.BK128]=&quot;x&quot;;&quot;x&quot;;IF([.BK128]=&quot;-&quot;;&quot;-&quot;;&quot;&quot;))">
            <text:p/>
          </table:table-cell>
          <table:table-cell table:formula="of:=IF([.BL128]=&quot;x&quot;;&quot;x&quot;;IF([.BL128]=&quot;-&quot;;&quot;-&quot;;&quot;&quot;))">
            <text:p/>
          </table:table-cell>
          <table:table-cell table:formula="of:=IF([.BM128]=&quot;x&quot;;&quot;x&quot;;IF([.BM128]=&quot;-&quot;;&quot;-&quot;;&quot;&quot;))">
            <text:p/>
          </table:table-cell>
          <table:table-cell table:formula="of:=IF([.BN128]=&quot;x&quot;;&quot;x&quot;;IF([.BN128]=&quot;-&quot;;&quot;-&quot;;&quot;&quot;))">
            <text:p/>
          </table:table-cell>
          <table:table-cell table:formula="of:=IF([.BO128]=&quot;x&quot;;&quot;x&quot;;IF([.BO128]=&quot;-&quot;;&quot;-&quot;;&quot;&quot;))">
            <text:p/>
          </table:table-cell>
          <table:table-cell table:formula="of:=IF([.BP128]=&quot;x&quot;;&quot;x&quot;;IF([.BP128]=&quot;-&quot;;&quot;-&quot;;&quot;&quot;))">
            <text:p/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TST128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SigGen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9]=&quot;x&quot;;&quot;x&quot;;IF([.AS129]=&quot;-&quot;;&quot;-&quot;;&quot;&quot;))">
            <text:p/>
          </table:table-cell>
          <table:table-cell table:formula="of:=IF([.AT129]=&quot;x&quot;;&quot;x&quot;;IF([.AT129]=&quot;-&quot;;&quot;-&quot;;&quot;&quot;))">
            <text:p/>
          </table:table-cell>
          <table:table-cell table:formula="of:=IF([.AU129]=&quot;x&quot;;&quot;x&quot;;IF([.AU129]=&quot;-&quot;;&quot;-&quot;;&quot;&quot;))">
            <text:p/>
          </table:table-cell>
          <table:table-cell table:formula="of:=IF([.AV129]=&quot;x&quot;;&quot;x&quot;;IF([.AV129]=&quot;-&quot;;&quot;-&quot;;&quot;&quot;))">
            <text:p/>
          </table:table-cell>
          <table:table-cell table:formula="of:=IF([.AW129]=&quot;x&quot;;&quot;x&quot;;IF([.AW129]=&quot;-&quot;;&quot;-&quot;;&quot;&quot;))">
            <text:p/>
          </table:table-cell>
          <table:table-cell table:formula="of:=IF([.AX129]=&quot;x&quot;;&quot;x&quot;;IF([.AX129]=&quot;-&quot;;&quot;-&quot;;&quot;&quot;))">
            <text:p/>
          </table:table-cell>
          <table:table-cell table:formula="of:=IF([.AY129]=&quot;x&quot;;&quot;x&quot;;IF([.AY129]=&quot;-&quot;;&quot;-&quot;;&quot;&quot;))">
            <text:p/>
          </table:table-cell>
          <table:table-cell table:formula="of:=IF([.AZ129]=&quot;x&quot;;&quot;x&quot;;IF([.AZ129]=&quot;-&quot;;&quot;-&quot;;&quot;&quot;))">
            <text:p/>
          </table:table-cell>
          <table:table-cell table:formula="of:=IF([.BA129]=&quot;x&quot;;&quot;x&quot;;IF([.BA129]=&quot;-&quot;;&quot;-&quot;;&quot;&quot;))">
            <text:p/>
          </table:table-cell>
          <table:table-cell table:formula="of:=IF([.BB129]=&quot;x&quot;;&quot;x&quot;;IF([.BB129]=&quot;-&quot;;&quot;-&quot;;&quot;&quot;))">
            <text:p/>
          </table:table-cell>
          <table:table-cell table:formula="of:=IF([.BC129]=&quot;x&quot;;&quot;x&quot;;IF([.BC129]=&quot;-&quot;;&quot;-&quot;;&quot;&quot;))" office:value-type="string" office:string-value="x" calcext:value-type="string">
            <text:p>x</text:p>
          </table:table-cell>
          <table:table-cell table:formula="of:=IF([.BD129]=&quot;x&quot;;&quot;x&quot;;IF([.BD129]=&quot;-&quot;;&quot;-&quot;;&quot;&quot;))">
            <text:p/>
          </table:table-cell>
          <table:table-cell table:formula="of:=IF([.BE129]=&quot;x&quot;;&quot;x&quot;;IF([.BE129]=&quot;-&quot;;&quot;-&quot;;&quot;&quot;))">
            <text:p/>
          </table:table-cell>
          <table:table-cell table:formula="of:=IF([.BF129]=&quot;x&quot;;&quot;x&quot;;IF([.BF129]=&quot;-&quot;;&quot;-&quot;;&quot;&quot;))">
            <text:p/>
          </table:table-cell>
          <table:table-cell table:formula="of:=IF([.BG129]=&quot;x&quot;;&quot;x&quot;;IF([.BG129]=&quot;-&quot;;&quot;-&quot;;&quot;&quot;))">
            <text:p/>
          </table:table-cell>
          <table:table-cell table:formula="of:=IF([.BH129]=&quot;x&quot;;&quot;x&quot;;IF([.BH129]=&quot;-&quot;;&quot;-&quot;;&quot;&quot;))">
            <text:p/>
          </table:table-cell>
          <table:table-cell table:formula="of:=IF([.BI129]=&quot;x&quot;;&quot;x&quot;;IF([.BI129]=&quot;-&quot;;&quot;-&quot;;&quot;&quot;))">
            <text:p/>
          </table:table-cell>
          <table:table-cell table:formula="of:=IF([.BJ129]=&quot;x&quot;;&quot;x&quot;;IF([.BJ129]=&quot;-&quot;;&quot;-&quot;;&quot;&quot;))">
            <text:p/>
          </table:table-cell>
          <table:table-cell table:formula="of:=IF([.BK129]=&quot;x&quot;;&quot;x&quot;;IF([.BK129]=&quot;-&quot;;&quot;-&quot;;&quot;&quot;))">
            <text:p/>
          </table:table-cell>
          <table:table-cell table:formula="of:=IF([.BL129]=&quot;x&quot;;&quot;x&quot;;IF([.BL129]=&quot;-&quot;;&quot;-&quot;;&quot;&quot;))">
            <text:p/>
          </table:table-cell>
          <table:table-cell table:formula="of:=IF([.BM129]=&quot;x&quot;;&quot;x&quot;;IF([.BM129]=&quot;-&quot;;&quot;-&quot;;&quot;&quot;))">
            <text:p/>
          </table:table-cell>
          <table:table-cell table:formula="of:=IF([.BN129]=&quot;x&quot;;&quot;x&quot;;IF([.BN129]=&quot;-&quot;;&quot;-&quot;;&quot;&quot;))">
            <text:p/>
          </table:table-cell>
          <table:table-cell table:formula="of:=IF([.BO129]=&quot;x&quot;;&quot;x&quot;;IF([.BO129]=&quot;-&quot;;&quot;-&quot;;&quot;&quot;))">
            <text:p/>
          </table:table-cell>
          <table:table-cell table:formula="of:=IF([.BP129]=&quot;x&quot;;&quot;x&quot;;IF([.BP129]=&quot;-&quot;;&quot;-&quot;;&quot;&quot;))">
            <text:p/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 table:number-rows-repeated="19">
          <table:table-cell table:number-columns-repeated="15"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3" table:number-rows-repeated="1048421">
          <table:table-cell table:number-columns-repeated="129"/>
          <table:table-cell table:style-name="Default" table:number-columns-repeated="16255"/>
        </table:table-row>
        <table:table-row table:style-name="ro3">
          <table:table-cell table:number-columns-repeated="129"/>
          <table:table-cell table:style-name="Default" table:number-columns-repeated="16255"/>
        </table:table-row>
        <calcext:conditional-formats>
          <calcext:conditional-format calcext:target-range-address="Channels.G1:Channels.I1 Channels.H130:Channels.I1048576 Channels.G3:Channels.G13 Channels.G18:Channels.G1048576 Channels.H28:Channels.I28 Channels.D1:Channels.F1048576 Channels.A2:Channels.A129 Channels.AP4:Channels.AP1048576 Channels.AP1:Channels.AP1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10" table:default-cell-style-name="ce18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number-columns-repeated="7" table:default-cell-style-name="ce5"/>
        <table:table-column table:style-name="co15" table:number-columns-repeated="4" table:default-cell-style-name="ce5"/>
        <table:table-column table:style-name="co14" table:default-cell-style-name="ce5"/>
        <table:table-column table:style-name="co14" table:number-columns-repeated="2" table:default-cell-style-name="ce18"/>
        <table:table-column table:style-name="co15" table:number-columns-repeated="2" table:default-cell-style-name="ce18"/>
        <table:table-column table:style-name="co16" table:default-cell-style-name="ce18"/>
        <table:table-column table:style-name="co17" table:number-columns-repeated="16362"/>
        <table:table-row table:style-name="ro4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table:table-column table:style-name="co17" table:default-cell-style-name="ce5"/>
        <table:table-column table:style-name="co18" table:number-columns-repeated="2" table:default-cell-style-name="ce18"/>
        <table:table-column table:style-name="co19" table:default-cell-style-name="ce18"/>
        <table:table-column table:style-name="co19" table:default-cell-style-name="ce5"/>
        <table:table-column table:style-name="co20" table:default-cell-style-name="ce18"/>
        <table:table-column table:style-name="co17" table:default-cell-style-name="Default"/>
        <table:table-column table:style-name="co17" table:visibility="collapse" table:default-cell-style-name="ce5"/>
        <table:table-column table:style-name="co21" table:number-columns-repeated="2" table:default-cell-style-name="ce5"/>
        <table:table-column table:style-name="co22" table:default-cell-style-name="ce18"/>
        <table:table-column table:style-name="co17" table:default-cell-style-name="Default"/>
        <table:table-column table:style-name="co17" table:visibility="collapse" table:default-cell-style-name="ce18"/>
        <table:table-column table:style-name="co17" table:default-cell-style-name="Default"/>
        <table:table-column table:style-name="co17" table:default-cell-style-name="ce5"/>
        <table:table-column table:style-name="co18" table:default-cell-style-name="ce18"/>
        <table:table-column table:style-name="co17" table:default-cell-style-name="Default"/>
        <table:table-column table:style-name="co17" table:visibility="collapse" table:default-cell-style-name="ce5"/>
        <table:table-column table:style-name="co23" table:number-columns-repeated="2" table:default-cell-style-name="ce5"/>
        <table:table-column table:style-name="co24" table:default-cell-style-name="ce18"/>
        <table:table-column table:style-name="co25" table:default-cell-style-name="ce18"/>
        <table:table-column table:style-name="co17" table:visibility="collapse" table:default-cell-style-name="ce5"/>
        <table:table-column table:style-name="co18" table:number-columns-repeated="2" table:default-cell-style-name="ce5"/>
        <table:table-column table:style-name="co21" table:default-cell-style-name="ce18"/>
        <table:table-column table:style-name="co26" table:default-cell-style-name="ce18"/>
        <table:table-column table:style-name="co19" table:visibility="collapse" table:default-cell-style-name="ce18"/>
        <table:table-column table:style-name="co23" table:default-cell-style-name="ce18"/>
        <table:table-column table:style-name="co23" table:default-cell-style-name="ce5"/>
        <table:table-column table:style-name="co27" table:default-cell-style-name="ce18"/>
        <table:table-column table:style-name="co24" table:default-cell-style-name="ce18"/>
        <table:table-column table:style-name="co17" table:visibility="collapse" table:default-cell-style-name="ce5"/>
        <table:table-column table:style-name="co28" table:default-cell-style-name="ce5"/>
        <table:table-column table:style-name="co28" table:default-cell-style-name="ce18"/>
        <table:table-column table:style-name="co17" table:number-columns-repeated="2" table:default-cell-style-name="Default"/>
        <table:table-column table:style-name="co17" table:visibility="collapse" table:default-cell-style-name="ce18"/>
        <table:table-column table:style-name="co27" table:number-columns-repeated="2" table:default-cell-style-name="ce18"/>
        <table:table-column table:style-name="co17" table:number-columns-repeated="2" table:default-cell-style-name="Default"/>
        <table:table-column table:style-name="co17" table:visibility="collapse" table:default-cell-style-name="ce18"/>
        <table:table-column table:style-name="co17" table:number-columns-repeated="2" table:default-cell-style-name="Default"/>
        <table:table-column table:style-name="co29" table:default-cell-style-name="ce18"/>
        <table:table-column table:style-name="co30" table:default-cell-style-name="ce18"/>
        <table:table-column table:style-name="co17" table:number-columns-repeated="2" table:default-cell-style-name="Default"/>
        <table:table-column table:style-name="co31" table:default-cell-style-name="ce18"/>
        <table:table-column table:style-name="co17" table:number-columns-repeated="3" table:default-cell-style-name="Default"/>
        <table:table-column table:style-name="co32" table:default-cell-style-name="ce18"/>
        <table:table-column table:style-name="co33" table:default-cell-style-name="ce18"/>
        <table:table-column table:style-name="co17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5"/>
          <table:table-cell table:style-name="ce36" office:value-type="string" calcext:value-type="string">
            <text:p>Mono Auxes</text:p>
          </table:table-cell>
          <table:table-cell table:style-name="ce36" office:value-type="string" calcext:value-type="string">
            <text:p>Aux Name</text:p>
          </table:table-cell>
          <table:table-cell table:style-name="ce36" office:value-type="string" calcext:value-type="string">
            <text:p>Aux Color</text:p>
          </table:table-cell>
          <table:table-cell table:style-name="ce35" table:number-columns-repeated="2"/>
          <table:table-cell table:style-name="ce36" office:value-type="string" calcext:value-type="string">
            <text:p>Stereo Auxes</text:p>
          </table:table-cell>
          <table:table-cell table:style-name="ce36" office:value-type="string" calcext:value-type="string">
            <text:p>StAux Name</text:p>
          </table:table-cell>
          <table:table-cell table:style-name="ce36" office:value-type="string" calcext:value-type="string">
            <text:p>StAux Color</text:p>
          </table:table-cell>
          <table:table-cell table:style-name="ce35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5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5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5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6" office:value-type="string" calcext:value-type="string">
            <text:p>Mono FX Send</text:p>
          </table:table-cell>
          <table:table-cell table:style-name="ce36" office:value-type="string" calcext:value-type="string">
            <text:p>FX Name</text:p>
          </table:table-cell>
          <table:table-cell table:style-name="ce36" office:value-type="string" calcext:value-type="string">
            <text:p>FX Color</text:p>
          </table:table-cell>
          <table:table-cell table:number-columns-repeated="2"/>
          <table:table-cell table:style-name="ce36" office:value-type="string" calcext:value-type="string">
            <text:p>Stereo FX Send</text:p>
          </table:table-cell>
          <table:table-cell table:style-name="ce36" office:value-type="string" calcext:value-type="string">
            <text:p>StFX Name</text:p>
          </table:table-cell>
          <table:table-cell table:style-name="ce36" office:value-type="string" calcext:value-type="string">
            <text:p>StFX Color</text:p>
          </table:table-cell>
          <table:table-cell/>
          <table:table-cell table:style-name="ce18"/>
          <table:table-cell table:style-name="ce43" office:value-type="string" calcext:value-type="string">
            <text:p>FX Return</text:p>
          </table:table-cell>
          <table:table-cell table:style-name="ce43" office:value-type="string" calcext:value-type="string">
            <text:p>FX Return Name</text:p>
          </table:table-cell>
          <table:table-cell table:style-name="ce43" office:value-type="string" calcext:value-type="string">
            <text:p>FX Return Color</text:p>
          </table:table-cell>
          <table:table-cell table:style-name="ce18"/>
          <table:table-cell table:style-name="ce36" office:value-type="string" calcext:value-type="string">
            <text:p>UFX Send</text:p>
          </table:table-cell>
          <table:table-cell table:style-name="ce36" office:value-type="string" calcext:value-type="string">
            <text:p>UFX Name</text:p>
          </table:table-cell>
          <table:table-cell table:style-name="ce36" office:value-type="string" calcext:value-type="string">
            <text:p>UFX Color</text:p>
          </table:table-cell>
          <table:table-cell table:style-name="ce18"/>
          <table:table-cell table:style-name="ce43" office:value-type="string" calcext:value-type="string">
            <text:p>UFX Return</text:p>
          </table:table-cell>
          <table:table-cell table:style-name="ce43" office:value-type="string" calcext:value-type="string">
            <text:p>UFX Return Name</text:p>
          </table:table-cell>
          <table:table-cell table:style-name="ce43" office:value-type="string" calcext:value-type="string">
            <text:p>UFX Return Color</text:p>
          </table:table-cell>
          <table:table-cell table:style-name="ce18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ca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K2]&lt;&gt;CONCATENATE(&quot;STAux&quot;;[.J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Z2]&lt;&gt;CONCATENATE(&quot;Mtx&quot;;[.Y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AJ2]&lt;&gt;CONCATENATE(&quot;Fx&quot;;[.AI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AO2]&lt;&gt;CONCATENATE(&quot;StFx&quot;;[.AN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Ret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Ret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Dca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Au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Au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K3]&lt;&gt;CONCATENATE(&quot;STAux&quot;;[.J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Grp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Grp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t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Z3]&lt;&gt;CONCATENATE(&quot;Mtx&quot;;[.Y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Mt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AJ3]&lt;&gt;CONCATENATE(&quot;Fx&quot;;[.AI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AO3]&lt;&gt;CONCATENATE(&quot;StFx&quot;;[.AN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Ret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Ret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Dca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Au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Au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K4]&lt;&gt;CONCATENATE(&quot;STAux&quot;;[.J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Grp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Grp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t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Z4]&lt;&gt;CONCATENATE(&quot;Mtx&quot;;[.Y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Mt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AJ4]&lt;&gt;CONCATENATE(&quot;Fx&quot;;[.AI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AO4]&lt;&gt;CONCATENATE(&quot;StFx&quot;;[.AN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Ret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Ret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Dca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Au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Au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K5]&lt;&gt;CONCATENATE(&quot;STAux&quot;;[.J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Grp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Grp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Mt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Z5]&lt;&gt;CONCATENATE(&quot;Mtx&quot;;[.Y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Mt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AJ5]&lt;&gt;CONCATENATE(&quot;Fx&quot;;[.AI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AO5]&lt;&gt;CONCATENATE(&quot;StFx&quot;;[.AN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Ret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Ret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ca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6]&lt;&gt;CONCATENATE(&quot;STAux&quot;;[.J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Grp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Grp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Mt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Z6]&lt;&gt;CONCATENATE(&quot;Mtx&quot;;[.Y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Mt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6]&lt;&gt;CONCATENATE(&quot;Fx&quot;;[.AI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6]&lt;&gt;CONCATENATE(&quot;StFx&quot;;[.AN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Ret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Ret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ca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u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Au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7]&lt;&gt;CONCATENATE(&quot;STAux&quot;;[.J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Grp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Grp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Mt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7]&lt;&gt;CONCATENATE(&quot;Mtx&quot;;[.Y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Mt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J7]&lt;&gt;CONCATENATE(&quot;Fx&quot;;[.AI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O7]&lt;&gt;CONCATENATE(&quot;StFx&quot;;[.AN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Ret6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Ret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Dca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Au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Au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8]&lt;&gt;CONCATENATE(&quot;STAux&quot;;[.J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Grp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Grp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Mt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8]&lt;&gt;CONCATENATE(&quot;Mtx&quot;;[.Y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Mt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AJ8]&lt;&gt;CONCATENATE(&quot;Fx&quot;;[.AI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AO8]&lt;&gt;CONCATENATE(&quot;StFx&quot;;[.AN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Ret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Ret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Dca8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u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Au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9]&lt;&gt;CONCATENATE(&quot;STAux&quot;;[.J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Grp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Grp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Mt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9]&lt;&gt;CONCATENATE(&quot;Mtx&quot;;[.Y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Mt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AJ9]&lt;&gt;CONCATENATE(&quot;Fx&quot;;[.AI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AO9]&lt;&gt;CONCATENATE(&quot;StFx&quot;;[.AN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Ret8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Ret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Dca9</text:p>
          </table:table-cell>
          <table:table-cell table:style-name="ce34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u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Au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10]&lt;&gt;CONCATENATE(&quot;STAux&quot;;[.J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Grp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Grp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Mt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10]&lt;&gt;CONCATENATE(&quot;Mtx&quot;;[.Y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Mt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AJ10]&lt;&gt;CONCATENATE(&quot;Fx&quot;;[.AI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F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AO10]&lt;&gt;CONCATENATE(&quot;StFx&quot;;[.AN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Ret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4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Au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Au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11]&lt;&gt;CONCATENATE(&quot;STAux&quot;;[.J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Grp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Grp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t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11]&lt;&gt;CONCATENATE(&quot;Mtx&quot;;[.Y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Mt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AJ11]&lt;&gt;CONCATENATE(&quot;Fx&quot;;[.AI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F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AO11]&lt;&gt;CONCATENATE(&quot;StFx&quot;;[.AN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Ret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Au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Au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12]&lt;&gt;CONCATENATE(&quot;STAux&quot;;[.J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Grp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Grp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Mt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12]&lt;&gt;CONCATENATE(&quot;Mtx&quot;;[.Y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Mt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AJ12]&lt;&gt;CONCATENATE(&quot;Fx&quot;;[.AI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F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AO12]&lt;&gt;CONCATENATE(&quot;StFx&quot;;[.AN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Ret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Au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Au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13]&lt;&gt;CONCATENATE(&quot;STAux&quot;;[.J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Grp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Grp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t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13]&lt;&gt;CONCATENATE(&quot;Mtx&quot;;[.Y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Mt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AJ13]&lt;&gt;CONCATENATE(&quot;Fx&quot;;[.AI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F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AO13]&lt;&gt;CONCATENATE(&quot;StFx&quot;;[.AN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Ret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Au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Au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14]&lt;&gt;CONCATENATE(&quot;STAux&quot;;[.J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Grp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Grp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Mt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14]&lt;&gt;CONCATENATE(&quot;Mtx&quot;;[.Y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Mt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F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AJ14]&lt;&gt;CONCATENATE(&quot;Fx&quot;;[.AI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F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AO14]&lt;&gt;CONCATENATE(&quot;StFx&quot;;[.AN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FxRet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Au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Au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15]&lt;&gt;CONCATENATE(&quot;STAux&quot;;[.J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Grp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Grp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Mt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15]&lt;&gt;CONCATENATE(&quot;Mtx&quot;;[.Y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Mt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F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J15]&lt;&gt;CONCATENATE(&quot;Fx&quot;;[.AI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F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O15]&lt;&gt;CONCATENATE(&quot;StFx&quot;;[.AN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FxRet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Au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Au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16]&lt;&gt;CONCATENATE(&quot;STAux&quot;;[.J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Grp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Grp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t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16]&lt;&gt;CONCATENATE(&quot;Mtx&quot;;[.Y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Mt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Fx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AJ16]&lt;&gt;CONCATENATE(&quot;Fx&quot;;[.AI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Fx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AO16]&lt;&gt;CONCATENATE(&quot;StFx&quot;;[.AN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FxRet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Au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Au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17]&lt;&gt;CONCATENATE(&quot;STAux&quot;;[.J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Grp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Grp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Mt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17]&lt;&gt;CONCATENATE(&quot;Mtx&quot;;[.Y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Mt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Fx16</text:p>
          </table:table-cell>
          <table:table-cell table:style-name="ce34" table:content-validation-name="val18"/>
          <table:table-cell table:style-name="ce5" table:formula="of:=IF([.AJ17]&lt;&gt;CONCATENATE(&quot;Fx&quot;;[.AI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Fx16</text:p>
          </table:table-cell>
          <table:table-cell table:style-name="ce34" table:content-validation-name="val18"/>
          <table:table-cell table:style-name="ce5" table:formula="of:=IF([.AO17]&lt;&gt;CONCATENATE(&quot;StFx&quot;;[.AN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FxRet16</text:p>
          </table:table-cell>
          <table:table-cell table:style-name="ce34" table:content-validation-name="val18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Dca17</text:p>
          </table:table-cell>
          <table:table-cell table:style-name="ce34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Au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Au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18]&lt;&gt;CONCATENATE(&quot;STAux&quot;;[.J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Grp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Grp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Mt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18]&lt;&gt;CONCATENATE(&quot;Mtx&quot;;[.Y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Mt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Dca18</text:p>
          </table:table-cell>
          <table:table-cell table:style-name="ce34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Au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Au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19]&lt;&gt;CONCATENATE(&quot;STAux&quot;;[.J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Grp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Grp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Mt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19]&lt;&gt;CONCATENATE(&quot;Mtx&quot;;[.Y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Mt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ca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Au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Au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20]&lt;&gt;CONCATENATE(&quot;STAux&quot;;[.J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Grp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Grp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Mt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20]&lt;&gt;CONCATENATE(&quot;Mtx&quot;;[.Y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Mt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ca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Au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Au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21]&lt;&gt;CONCATENATE(&quot;STAux&quot;;[.J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Grp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Grp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t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21]&lt;&gt;CONCATENATE(&quot;Mtx&quot;;[.Y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Mt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2" office:value-type="string" calcext:value-type="string">
            <text:p>Dca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Au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Au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22]&lt;&gt;CONCATENATE(&quot;STAux&quot;;[.J2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Grp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Grp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Mt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22]&lt;&gt;CONCATENATE(&quot;Mtx&quot;;[.Y2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Mt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Dca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Au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Au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23]&lt;&gt;CONCATENATE(&quot;STAux&quot;;[.J2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Grp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Grp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Mt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23]&lt;&gt;CONCATENATE(&quot;Mtx&quot;;[.Y2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Mt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ca23</text:p>
          </table:table-cell>
          <table:table-cell table:style-name="ce34" table:content-validation-name="val18" office:value-type="string" calcext:value-type="string">
            <text:p>-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Au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Au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24]&lt;&gt;CONCATENATE(&quot;STAux&quot;;[.J2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Grp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Grp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Mt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24]&lt;&gt;CONCATENATE(&quot;Mtx&quot;;[.Y2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Mt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Dca24</text:p>
          </table:table-cell>
          <table:table-cell table:style-name="ce34" table:content-validation-name="val18"/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Au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Au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25]&lt;&gt;CONCATENATE(&quot;STAux&quot;;[.J2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Grp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Grp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Mt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25]&lt;&gt;CONCATENATE(&quot;Mtx&quot;;[.Y2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Mt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Au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Au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26]&lt;&gt;CONCATENATE(&quot;STAux&quot;;[.J2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Grp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Grp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Mt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26]&lt;&gt;CONCATENATE(&quot;Mtx&quot;;[.Y2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Mt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Au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Au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27]&lt;&gt;CONCATENATE(&quot;STAux&quot;;[.J2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Grp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Grp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Mt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27]&lt;&gt;CONCATENATE(&quot;Mtx&quot;;[.Y2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Mt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Au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Au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28]&lt;&gt;CONCATENATE(&quot;STAux&quot;;[.J2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Grp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Grp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Mt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28]&lt;&gt;CONCATENATE(&quot;Mtx&quot;;[.Y2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Mt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Au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Au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29]&lt;&gt;CONCATENATE(&quot;STAux&quot;;[.J2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Grp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Grp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Mt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29]&lt;&gt;CONCATENATE(&quot;Mtx&quot;;[.Y2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Mt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Au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Au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30]&lt;&gt;CONCATENATE(&quot;STAux&quot;;[.J3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Grp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Grp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Mt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30]&lt;&gt;CONCATENATE(&quot;Mtx&quot;;[.Y3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Mt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Aux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Aux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K31]&lt;&gt;CONCATENATE(&quot;STAux&quot;;[.J3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Grp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Grp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Mtx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31]&lt;&gt;CONCATENATE(&quot;Mtx&quot;;[.Y3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Mtx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Aux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Aux31</text:p>
          </table:table-cell>
          <table:table-cell table:style-name="ce34" table:content-validation-name="val18"/>
          <table:table-cell table:style-name="ce5" table:formula="of:=IF([.K32]&lt;&gt;CONCATENATE(&quot;STAux&quot;;[.J3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Grp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Grp31</text:p>
          </table:table-cell>
          <table:table-cell table:style-name="ce34" table:content-validation-name="val18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Mtx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32]&lt;&gt;CONCATENATE(&quot;Mtx&quot;;[.Y3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Mtx31</text:p>
          </table:table-cell>
          <table:table-cell table:style-name="ce34" table:content-validation-name="val18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Aux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9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Grp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9" table:content-validation-name="val19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Mtx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33]&lt;&gt;CONCATENATE(&quot;Mtx&quot;;[.Y33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42" table:content-validation-name="val19"/>
          <table:table-cell table:number-columns-repeated="3"/>
          <table:table-cell table:style-name="ce38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Aux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Grp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Mtx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34]&lt;&gt;CONCATENATE(&quot;Mtx&quot;;[.Y34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39" table:content-validation-name="val19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Aux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Grp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Mtx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35]&lt;&gt;CONCATENATE(&quot;Mtx&quot;;[.Y35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38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Aux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Grp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Mtx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36]&lt;&gt;CONCATENATE(&quot;Mtx&quot;;[.Y3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Aux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Grp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Mtx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37]&lt;&gt;CONCATENATE(&quot;Mtx&quot;;[.Y3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Aux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Grp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Mtx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38]&lt;&gt;CONCATENATE(&quot;Mtx&quot;;[.Y3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Aux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Grp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Mtx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39]&lt;&gt;CONCATENATE(&quot;Mtx&quot;;[.Y3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Aux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Grp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Mtx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40]&lt;&gt;CONCATENATE(&quot;Mtx&quot;;[.Y4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Aux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Grp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Mtx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41]&lt;&gt;CONCATENATE(&quot;Mtx&quot;;[.Y4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Aux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Grp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Mtx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42]&lt;&gt;CONCATENATE(&quot;Mtx&quot;;[.Y4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Aux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Grp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Mtx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43]&lt;&gt;CONCATENATE(&quot;Mtx&quot;;[.Y4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Aux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Grp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Mtx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44]&lt;&gt;CONCATENATE(&quot;Mtx&quot;;[.Y44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Aux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Grp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Mtx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45]&lt;&gt;CONCATENATE(&quot;Mtx&quot;;[.Y45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Aux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Grp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Mtx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46]&lt;&gt;CONCATENATE(&quot;Mtx&quot;;[.Y4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Aux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Grp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Mtx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47]&lt;&gt;CONCATENATE(&quot;Mtx&quot;;[.Y4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Aux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Grp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Mtx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48]&lt;&gt;CONCATENATE(&quot;Mtx&quot;;[.Y4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Aux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Grp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Mtx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49]&lt;&gt;CONCATENATE(&quot;Mtx&quot;;[.Y4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Aux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Grp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Mtx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50]&lt;&gt;CONCATENATE(&quot;Mtx&quot;;[.Y5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Aux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Grp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Mtx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51]&lt;&gt;CONCATENATE(&quot;Mtx&quot;;[.Y5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Aux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Grp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Mtx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52]&lt;&gt;CONCATENATE(&quot;Mtx&quot;;[.Y5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Aux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Grp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Mtx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53]&lt;&gt;CONCATENATE(&quot;Mtx&quot;;[.Y5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Aux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Grp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Mtx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54]&lt;&gt;CONCATENATE(&quot;Mtx&quot;;[.Y54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Aux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Grp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Mtx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55]&lt;&gt;CONCATENATE(&quot;Mtx&quot;;[.Y55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Aux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Grp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Mtx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56]&lt;&gt;CONCATENATE(&quot;Mtx&quot;;[.Y5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Aux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Grp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Mtx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57]&lt;&gt;CONCATENATE(&quot;Mtx&quot;;[.Y5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Aux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Grp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Mtx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58]&lt;&gt;CONCATENATE(&quot;Mtx&quot;;[.Y5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Aux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Grp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Mtx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59]&lt;&gt;CONCATENATE(&quot;Mtx&quot;;[.Y5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Aux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Grp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Mtx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60]&lt;&gt;CONCATENATE(&quot;Mtx&quot;;[.Y6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Aux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Grp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Mtx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61]&lt;&gt;CONCATENATE(&quot;Mtx&quot;;[.Y6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Aux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Grp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Mtx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Z62]&lt;&gt;CONCATENATE(&quot;Mtx&quot;;[.Y6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Aux62</text:p>
          </table:table-cell>
          <table:table-cell table:style-name="ce34" table:content-validation-name="val18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Grp62</text:p>
          </table:table-cell>
          <table:table-cell table:style-name="ce34" table:content-validation-name="val18"/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Mtx62</text:p>
          </table:table-cell>
          <table:table-cell table:style-name="ce34" table:content-validation-name="val18"/>
          <table:table-cell table:style-name="ce5" table:formula="of:=IF([.Z63]&lt;&gt;CONCATENATE(&quot;Mtx&quot;;[.Y6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8"/>
          <table:table-cell table:style-name="ce33" table:content-validation-name="val18"/>
          <table:table-cell table:number-columns-repeated="8"/>
          <table:table-cell table:style-name="ce38"/>
          <table:table-cell table:style-name="ce39" table:content-validation-name="val19"/>
          <table:table-cell table:number-columns-repeated="9"/>
          <table:table-cell table:style-name="ce39" table:content-validation-name="val19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5" table:formula="of:=COUNTIF([.M2:.M63];1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9" table:content-validation-name="val1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9"/>
          <table:table-cell table:style-name="ce5" table:formula="of:=COUNTIF([.AB2:.AB63];1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5" table:formula="of:=COUNTIF([.AL2:.AL63];1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style-name="ce5" table:formula="of:=COUNTIF([.AQ2:.AQ63];1)" office:value-type="float" office:value="0" calcext:value-type="float">
            <text:p>0</text:p>
          </table:table-cell>
          <table:table-cell table:style-name="ce5"/>
          <table:table-cell table:number-columns-repeated="11"/>
          <table:table-cell table:style-name="Default" table:number-columns-repeated="16329"/>
        </table:table-row>
        <table:table-row table:style-name="ro2" table:number-rows-repeated="8">
          <table:table-cell table:number-columns-repeated="6"/>
          <table:table-cell table:style-name="ce33" table:content-validation-name="val18"/>
          <table:table-cell table:number-columns-repeated="48"/>
          <table:table-cell table:style-name="Default" table:number-columns-repeated="16329"/>
        </table:table-row>
        <table:table-row table:style-name="ro3" table:number-rows-repeated="1048502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73 Groups.AK2:Groups.AK17 Groups.AP2:Groups.AP17 Groups.AU2:Groups.AU17 Groups.L2:Groups.L33 Groups.Q2:Groups.Q65 Groups.V2:Groups.V33 Groups.AA2:Groups.AA65 Groups.AF2:Groups.AF33 Groups.AY2:Groups.AY9 Groups.BC2:Groups.BC9 Groups.AJ34:Groups.AJ34 Groups.C2:Groups.C25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4" table:number-columns-repeated="6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style-name="ce31" table:formula="of:=[$Groups.R65]" office:value-type="float" office:value="0" calcext:value-type="float">
            <text:p>0</text:p>
          </table:table-cell>
          <table:table-cell table:style-name="ce31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FX</text:p>
          </table:table-cell>
          <table:table-cell table:style-name="ce31" table:formula="of:=[$Groups.AL65]" office:value-type="float" office:value="0" calcext:value-type="float">
            <text:p>0</text:p>
          </table:table-cell>
          <table:table-cell table:style-name="ce31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Aux</text:p>
          </table:table-cell>
          <table:table-cell table:style-name="ce31" table:formula="of:=[$Groups.H65]" office:value-type="float" office:value="0" calcext:value-type="float">
            <text:p>0</text:p>
          </table:table-cell>
          <table:table-cell table:style-name="ce31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style-name="ce31" table:formula="of:=[$Groups.AB65]" office:value-type="float" office:value="0" calcext:value-type="float">
            <text:p>0</text:p>
          </table:table-cell>
          <table:table-cell table:style-name="ce31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office:forms form:automatic-focus="false" form:apply-design-mode="false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1" table:number-columns-repeated="16381"/>
        <table:table-row table:style-name="ro5">
          <table:table-cell table:style-name="ce35" office:value-type="string" calcext:value-type="string">
            <text:p>Property</text:p>
          </table:table-cell>
          <table:table-cell table:style-name="ce35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2-14T02:25:47.420362000</dc:date>
    <meta:editing-cycles>301</meta:editing-cycles>
    <meta:editing-duration>P1DT7H44M13S</meta:editing-duration>
    <meta:generator>LibreOffice/25.8.2.2$MacOSX_X86_64 LibreOffice_project/d401f2107ccab8f924a8e2df40f573aab7605b6f</meta:generator>
    <meta:document-statistic meta:table-count="5" meta:cell-count="13683" meta:object-count="0"/>
    <meta:user-defined meta:name="AppVersion">15.0000</meta:user-defined>
  </office:meta>
</office:document-meta>
</file>